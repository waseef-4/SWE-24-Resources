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A20000021212010852.png" manifest:media-type="image/png"/>
  <manifest:file-entry manifest:full-path="Pictures/10000001000003A90000023496161E0C.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text-properties style:font-name="Times New Roman" fo:font-size="18pt" fo:font-weight="bold" officeooo:rsid="000e0c5f" officeooo:paragraph-rsid="000e0c5f" style:font-size-asian="15.75pt" style:font-weight-asian="bold" style:font-size-complex="18pt" style:font-weight-complex="bold"/>
    </style:style>
    <style:style style:name="P2" style:family="paragraph" style:parent-style-name="Standard" style:list-style-name="Numbering_20_123">
      <style:text-properties style:font-name="Times New Roman" fo:font-size="18pt" fo:font-weight="bold" officeooo:rsid="0010a393" officeooo:paragraph-rsid="0010a393" style:font-size-asian="15.75pt" style:font-weight-asian="bold" style:font-size-complex="18pt" style:font-weight-complex="bold"/>
    </style:style>
    <style:style style:name="P3" style:family="paragraph" style:parent-style-name="Standard" style:list-style-name="Numbering_20_123">
      <style:text-properties style:font-name="Times New Roman" fo:font-size="18pt" fo:font-weight="bold" officeooo:rsid="00114bea" officeooo:paragraph-rsid="00114bea" style:font-size-asian="15.75pt" style:font-weight-asian="bold" style:font-size-complex="18pt" style:font-weight-complex="bold"/>
    </style:style>
    <style:style style:name="P4" style:family="paragraph" style:parent-style-name="Standard" style:list-style-name="Numbering_20_123">
      <style:text-properties style:font-name="Times New Roman" fo:font-size="18pt" fo:font-weight="bold" officeooo:rsid="00124d71" officeooo:paragraph-rsid="00124d71" style:font-size-asian="15.75pt" style:font-weight-asian="bold" style:font-size-complex="18pt" style:font-weight-complex="bold"/>
    </style:style>
    <style:style style:name="P5" style:family="paragraph" style:parent-style-name="Standard">
      <style:text-properties style:font-name="Times New Roman" fo:font-size="18pt" fo:font-weight="normal" officeooo:rsid="00124d71" officeooo:paragraph-rsid="00124d71" style:font-size-asian="15.75pt" style:font-weight-asian="normal" style:font-size-complex="18pt" style:font-weight-complex="normal"/>
    </style:style>
    <style:style style:name="P6" style:family="paragraph" style:parent-style-name="Standard">
      <style:text-properties officeooo:paragraph-rsid="001d580a"/>
    </style:style>
    <style:style style:name="P7" style:family="paragraph" style:parent-style-name="Standard">
      <style:text-properties style:font-name="Times New Roman" fo:font-size="18pt" fo:font-weight="bold" officeooo:rsid="00129098" officeooo:paragraph-rsid="001a6969" style:font-size-asian="15.75pt" style:font-weight-asian="bold" style:font-size-complex="18pt" style:font-weight-complex="bold"/>
    </style:style>
    <style:style style:name="P8" style:family="paragraph" style:parent-style-name="Standard">
      <style:text-properties style:font-name="Times New Roman" fo:font-size="18pt" fo:font-weight="normal" officeooo:rsid="00129098" officeooo:paragraph-rsid="00129098" style:font-size-asian="15.75pt" style:font-weight-asian="normal" style:font-size-complex="18pt" style:font-weight-complex="normal"/>
    </style:style>
    <style:style style:name="P9" style:family="paragraph" style:parent-style-name="Standard">
      <style:text-properties style:font-name="Times New Roman" fo:font-size="18pt" fo:font-weight="normal" officeooo:rsid="0013b691" officeooo:paragraph-rsid="00129098" style:font-size-asian="15.75pt" style:font-weight-asian="normal" style:font-size-complex="18pt" style:font-weight-complex="normal"/>
    </style:style>
    <style:style style:name="P10" style:family="paragraph" style:parent-style-name="Standard">
      <style:text-properties style:font-name="Times New Roman" fo:font-size="18pt" fo:font-weight="normal" officeooo:rsid="00129098" officeooo:paragraph-rsid="00147f38" style:font-size-asian="15.75pt" style:font-weight-asian="normal" style:font-size-complex="18pt" style:font-weight-complex="normal"/>
    </style:style>
    <style:style style:name="P11" style:family="paragraph" style:parent-style-name="Standard">
      <style:text-properties style:font-name="Times New Roman" fo:font-size="18pt" fo:font-weight="normal" officeooo:rsid="0015a27c" officeooo:paragraph-rsid="00164768" style:font-size-asian="15.75pt" style:font-weight-asian="normal" style:font-size-complex="18pt" style:font-weight-complex="normal"/>
    </style:style>
    <style:style style:name="T1" style:family="text">
      <style:text-properties officeooo:rsid="00124d71"/>
    </style:style>
    <style:style style:name="T2" style:family="text">
      <style:text-properties fo:font-weight="normal" style:font-weight-asian="normal" style:font-weight-complex="normal"/>
    </style:style>
    <style:style style:name="T3" style:family="text">
      <style:text-properties officeooo:rsid="0010a393"/>
    </style:style>
    <style:style style:name="T4" style:family="text">
      <style:text-properties fo:font-weight="normal" officeooo:rsid="00114bea" style:font-weight-asian="normal" style:font-weight-complex="normal"/>
    </style:style>
    <style:style style:name="T5" style:family="text">
      <style:text-properties fo:font-weight="normal" officeooo:rsid="00124d71" style:font-weight-asian="normal" style:font-weight-complex="normal"/>
    </style:style>
    <style:style style:name="T6" style:family="text">
      <style:text-properties style:font-name="Times New Roman" fo:font-size="18pt" fo:font-weight="bold" officeooo:rsid="00129098" style:font-size-asian="15.75pt" style:font-weight-asian="bold" style:font-size-complex="18pt" style:font-weight-complex="bold"/>
    </style:style>
    <style:style style:name="T7" style:family="text">
      <style:text-properties style:font-name="Times New Roman" fo:font-size="18pt" fo:font-weight="bold" officeooo:rsid="00129098" style:font-size-asian="18pt" style:font-weight-asian="bold" style:font-size-complex="18pt" style:font-weight-complex="bold"/>
    </style:style>
    <style:style style:name="T8" style:family="text">
      <style:text-properties style:font-name="Times New Roman" fo:font-size="18pt" fo:font-weight="normal" officeooo:rsid="001a6969" style:font-size-asian="18pt" style:font-weight-asian="normal" style:font-size-complex="18pt" style:font-weight-complex="normal"/>
    </style:style>
    <style:style style:name="T9" style:family="text">
      <style:text-properties style:font-name="Times New Roman" fo:font-size="18pt" fo:font-weight="normal" officeooo:rsid="001c3cd1" style:font-size-asian="18pt" style:font-weight-asian="normal" style:font-size-complex="18pt" style:font-weight-complex="normal"/>
    </style:style>
    <style:style style:name="T10" style:family="text">
      <style:text-properties style:font-name="Times New Roman" fo:font-size="18pt" fo:font-weight="normal" officeooo:rsid="001c4704" style:font-size-asian="18pt" style:font-weight-asian="normal" style:font-size-complex="18pt" style:font-weight-complex="normal"/>
    </style:style>
    <style:style style:name="T11" style:family="text">
      <style:text-properties officeooo:rsid="00136cf2"/>
    </style:style>
    <style:style style:name="T12" style:family="text">
      <style:text-properties officeooo:rsid="0013b691"/>
    </style:style>
    <style:style style:name="T13" style:family="text">
      <style:text-properties fo:font-weight="bold" style:font-weight-asian="bold" style:font-weight-complex="bold"/>
    </style:style>
    <style:style style:name="T14" style:family="text">
      <style:text-properties officeooo:rsid="00147f38"/>
    </style:style>
    <style:style style:name="T15" style:family="text">
      <style:text-properties officeooo:rsid="00164768"/>
    </style:style>
    <style:style style:name="T16" style:family="text">
      <style:text-properties officeooo:rsid="0015a27c"/>
    </style:style>
    <style:style style:name="T17" style:family="text">
      <style:text-properties officeooo:rsid="00129098"/>
    </style:style>
    <style:style style:name="T18" style:family="text">
      <style:text-properties officeooo:rsid="00160da3"/>
    </style:style>
    <style:style style:name="fr1" style:family="graphic" style:parent-style-name="Graphics">
      <style:graphic-properties style:vertical-pos="from-top" style:vertical-rel="paragraph" style:horizontal-pos="from-left" style:horizontal-rel="paragraph" fo:background-color="transparent" draw:fill="none" draw:fill-color="#ffffff" draw:opacity="100%" fo:padding="0.0193in" fo:border="0.06pt solid #ffffff"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fill-color="#729fcf" fo:padding="0.0193in" fo:border="0.06pt solid #ffffff"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ame of</text:span> Mobile Application: <text:span text:style-name="T2">AB Direct<text:line-break/><text:line-break/></text:span><text:span text:style-name="T3">Existing UI Issues:</text:span></text:p>
      <text:list text:style-name="Numbering_20_123">
        <text:list-item>
          <text:p text:style-name="P2">Account Number Visibility: <text:span text:style-name="T2">In the old </text:span><text:span text:style-name="T4">UI, sensitive information like full account number is shown by default, which may create privacy risks in public use; redesigned UI hides these information and displays only limited details.</text:span></text:p>
        </text:list-item>
        <text:list-item>
          <text:p text:style-name="P3">Clarity and Visual Hierarchy:<text:span text:style-name="T2"> Existing UI presents balance information, shortcuts and promotional banners with similar visual weight which reduces clarity and weakens hierarchy; redesigned UI clearly highlights the account card and balance section at the top and separate other sections properly.</text:span></text:p>
        </text:list-item>
        <text:list-item>
          <text:p text:style-name="P3">Simplicity and Minimalism:<text:span text:style-name="T2"> The old UI contains too many sections and options on screen which makes it visually overwhelming; redesigned UI removes unnecessary options and groups features into categories.</text:span></text:p>
        </text:list-item>
        <text:list-item>
          <text:p text:style-name="P3">Consistency and Navigation Structure:<text:span text:style-name="T2"> </text:span><text:span text:style-name="T5">In the previous UI, multiple sections are combined without a clear structure which may confuse users; redesigned UI maintains a consistent navigation bar and clearly labeled primary sections.</text:span></text:p>
        </text:list-item>
        <text:list-item>
          <text:p text:style-name="P4">Task Focus and Efficiency:<text:span text:style-name="T2"> Existing UI contains a large promotional banner that distracts users from primary banking tasks; redesigned UI reduces the size of the advertisement section which helps users focus properly on banking activities.</text:span></text:p>
        </text:list-item>
      </text:list>
      <text:p text:style-name="P5"/>
      <text:p text:style-name="P5"/>
      <text:p text:style-name="P5"/>
      <text:p text:style-name="P6"><text:span text:style-name="T6">UI Redesign:</text:span><text:span text:style-name="T7"> </text:span><text:span text:style-name="T8">Attached in </text:span></text:p>
      <text:p text:style-name="P6"><text:span text:style-name="T8">‘</text:span><text:span text:style-name="T9">240042148_</text:span><text:span text:style-name="T10">assignment_2_</text:span><text:span text:style-name="T8">UI</text:span><text:span text:style-name="T9">_</text:span><text:span text:style-name="T8">design.</text:span><text:span text:style-name="T9">pdf</text:span><text:span text:style-name="T8">’ file.<text:line-break/></text:span></text:p>
      <text:p text:style-name="P7"/>
      <text:p text:style-name="P7"/>
      <text:p text:style-name="P7"/>
      <text:p text:style-name="P7"><text:soft-page-break/>Justification of Improved Usability:</text:p>
      <text:p text:style-name="P8">The <text:span text:style-name="T11">redesigned user interface significantly improves usability by decreasing visual clutter and showing only the most important functions on the home screen. Home screen navigation is now more simplified through a consistent and clearly labeled bottom navigation bar that remains stable across sections. Important information such as account number, account balance and primary actions are displayed at the top which allows users to access them easily. The new layout follows a clean and </text:span><text:span text:style-name="T12">structured hierarchy that reduces unnecessary load and improves content scanning. By applying the basic usability principles of simplicity, consistency, visibility and minimalism, the redesigned user interface improves efficiency and overall user experience.</text:span></text:p>
      <text:p text:style-name="P9"><text:line-break/><text:span text:style-name="T13">User Interface Evaluation Chart:<text:line-break/></text:span><text:span text:style-name="T14">The evaluation </text:span><text:span text:style-name="T15">was</text:span><text:span text:style-name="T14"> </text:span><text:span text:style-name="T15">conducted with a sample size of </text:span><text:span text:style-name="T14">10 users via Google Forms. The chart of old UI and redesigned UI evaluation </text:span><text:span text:style-name="T16">are</text:span><text:span text:style-name="T14"> shown below: <text:line-break/><text:line-break/></text:span><text:span text:style-name="T17">• </text:span><text:span text:style-name="T14">Old UI Evaluation:</text:span></text:p>
      <text:p text:style-name="P8"><draw:frame draw:style-name="fr1" draw:name="Image3" text:anchor-type="char" svg:x="0.0972in" svg:y="0.0957in" svg:width="6.0402in" svg:height="3.2972in" draw:z-index="0"><draw:image xlink:href="Pictures/10000001000003A20000021212010852.png" xlink:type="simple" xlink:show="embed" xlink:actuate="onLoad" draw:mime-type="image/png"/></draw:frame></text:p>
      <text:p text:style-name="P10"><text:soft-page-break/>• <text:span text:style-name="T14">Redesigned UI Evaluation:</text:span><draw:frame draw:style-name="fr2" draw:name="Image4" text:anchor-type="char" svg:x="0.098in" svg:y="0.3264in" svg:width="6.0846in" svg:height="3.4957in" draw:z-index="1"><draw:image xlink:href="Pictures/10000001000003A90000023496161E0C.png" xlink:type="simple" xlink:show="embed" xlink:actuate="onLoad" draw:mime-type="image/png"/></draw:frame></text:p>
      <text:p text:style-name="P11"><text:line-break/>From the charts above, it is seen that the old user interface <text:span text:style-name="T18">received</text:span> an average rating of 3.10, while the redesigned user interface <text:span text:style-name="T15">achieved</text:span> an average rating of 4.70. <text:span text:style-name="T15">This indicates a clear improvement in user satisfaction with the redesigned interface compared to the old one. Therefore, </text:span>it can be said that the redesigned user interface <text:span text:style-name="T15">is more accepted among users, providing</text:span> more friendly and convenient app experience.</text:p>
      <text:p text:style-name="P8"/>
      <text:p text:style-name="P8"/>
      <text:p text:style-name="P8"/>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List_20_Contents" style:display-name="List Contents" style:family="paragraph" style:parent-style-name="Standard" style:class="html">
      <style:paragraph-properties fo:margin-left="0.3937in"/>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5709in" fo:text-indent="-0.2756in" fo:margin-left="1.5709in"/>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1.8346in" fo:text-indent="-0.2598in" fo:margin-left="1.8346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945in" fo:text-indent="-0.2598in" fo:margin-left="2.094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3543in" fo:text-indent="-0.2598in" fo:margin-left="2.354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6138in" fo:text-indent="-0.2598in" fo:margin-left="2.6138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8736in" fo:text-indent="-0.2598in" fo:margin-left="2.8736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1335in" fo:text-indent="-0.2598in" fo:margin-left="3.133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3929in" fo:text-indent="-0.2598in" fo:margin-left="3.3929in"/>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14T10:39:30.560570400</meta:creation-date>
    <dc:date>2026-02-15T10:59:37.794023900</dc:date>
    <meta:editing-duration>PT20M23S</meta:editing-duration>
    <meta:editing-cycles>6</meta:editing-cycles>
    <meta:generator>LibreOffice/25.8.3.2$Windows_X86_64 LibreOffice_project/8ca8d55c161d602844f5428fa4b58097424e324e</meta:generator>
    <meta:print-date>2026-02-15T10:57:40.734222500</meta:print-date>
    <meta:printed-by>PDF files</meta:printed-by>
    <meta:document-statistic meta:table-count="0" meta:image-count="2" meta:object-count="0" meta:page-count="3" meta:paragraph-count="13" meta:word-count="407" meta:character-count="2769" meta:non-whitespace-character-count="2373"/>
  </office:meta>
</office:document-meta>
</file>