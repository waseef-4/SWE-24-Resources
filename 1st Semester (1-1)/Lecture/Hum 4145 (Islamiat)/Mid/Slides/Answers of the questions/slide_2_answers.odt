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text-properties style:font-name="Times New Roman" fo:font-size="18pt" style:font-size-asian="15.75pt" style:font-size-complex="18pt"/>
    </style:style>
    <style:style style:name="P2" style:family="paragraph" style:parent-style-name="Text_20_body">
      <style:text-properties style:font-name="Times New Roman" fo:font-size="18pt" style:font-size-asian="15.75pt" style:font-size-complex="18pt"/>
    </style:style>
    <style:style style:name="P3" style:family="paragraph" style:parent-style-name="Text_20_body">
      <style:text-properties style:font-name="Times New Roman" fo:font-size="16pt" style:font-size-asian="16pt" style:font-size-complex="16pt"/>
    </style:style>
    <style:style style:name="P4" style:family="paragraph" style:parent-style-name="Quotations">
      <style:paragraph-properties fo:margin-left="0in" fo:text-indent="0in" style:auto-text-indent="false"/>
      <style:text-properties style:font-name="Times New Roman" fo:font-size="18pt" style:font-size-asian="15.75pt" style:font-size-complex="18pt"/>
    </style:style>
    <style:style style:name="P5" style:family="paragraph" style:parent-style-name="Quotations">
      <style:text-properties style:font-name="Times New Roman" fo:font-size="18pt" style:font-size-asian="15.75pt" style:font-size-complex="18pt"/>
    </style:style>
    <style:style style:name="P6" style:family="paragraph" style:parent-style-name="Horizontal_20_Line">
      <style:text-properties style:font-name="Times New Roman" fo:font-size="18pt" style:font-size-asian="15.75pt" style:font-size-complex="18pt"/>
    </style:style>
    <style:style style:name="P7" style:family="paragraph" style:parent-style-name="Heading_20_2">
      <style:text-properties style:font-name="Times New Roman" style:font-size-asian="15.75pt"/>
    </style:style>
    <style:style style:name="P8" style:family="paragraph" style:parent-style-name="Quotations">
      <style:paragraph-properties fo:margin-left="0in" fo:text-indent="0in" style:auto-text-indent="false"/>
      <style:text-properties style:font-name="Times New Roman" fo:font-size="16pt" style:font-size-asian="16pt" style:font-size-complex="16pt"/>
    </style:style>
    <style:style style:name="P9" style:family="paragraph" style:parent-style-name="Text_20_body">
      <style:text-properties style:font-name="Times New Roman" fo:font-size="16pt" officeooo:paragraph-rsid="001cb381" style:font-size-asian="16pt" style:font-size-complex="16pt"/>
    </style:style>
    <style:style style:name="P10" style:family="paragraph" style:parent-style-name="Quotations">
      <style:paragraph-properties fo:margin-left="0in" fo:text-indent="0in" style:auto-text-indent="false"/>
      <style:text-properties style:font-name="Times New Roman" fo:font-size="18pt" officeooo:paragraph-rsid="001cb381" style:font-size-asian="15.75pt" style:font-size-complex="18pt"/>
    </style:style>
    <style:style style:name="P11" style:family="paragraph" style:parent-style-name="Heading_20_3">
      <style:text-properties style:font-name="Times New Roman" fo:font-size="18pt" style:font-size-asian="15.75pt" style:font-size-complex="18pt"/>
    </style:style>
    <style:style style:name="P12" style:family="paragraph" style:parent-style-name="Text_20_body" style:list-style-name="L1">
      <style:text-properties style:font-name="Times New Roman" fo:font-size="18pt" style:font-size-asian="15.75pt" style:font-size-complex="18pt"/>
    </style:style>
    <style:style style:name="P13" style:family="paragraph" style:parent-style-name="Text_20_body" style:list-style-name="L2">
      <style:text-properties style:font-name="Times New Roman" fo:font-size="18pt" style:font-size-asian="15.75pt" style:font-size-complex="18pt"/>
    </style:style>
    <style:style style:name="P14" style:family="paragraph" style:parent-style-name="Text_20_body" style:list-style-name="L3">
      <style:text-properties style:font-name="Times New Roman" fo:font-size="18pt" style:font-size-asian="15.75pt" style:font-size-complex="18pt"/>
    </style:style>
    <style:style style:name="P15" style:family="paragraph" style:parent-style-name="Horizontal_20_Line">
      <style:text-properties style:font-name="Times New Roman" fo:font-size="18pt" officeooo:paragraph-rsid="0019966b" style:font-size-asian="15.75pt" style:font-size-complex="18pt"/>
    </style:style>
    <style:style style:name="P16" style:family="paragraph" style:parent-style-name="Heading_20_2">
      <style:text-properties officeooo:paragraph-rsid="0019966b"/>
    </style:style>
    <style:style style:name="P17" style:family="paragraph" style:parent-style-name="Text_20_body">
      <style:text-properties style:font-name="Times New Roman" fo:font-weight="bold" officeooo:rsid="0019966b" style:font-size-asian="15.75pt" style:font-weight-asian="bold" style:font-weight-complex="bold"/>
    </style:style>
    <style:style style:name="P18" style:family="paragraph" style:parent-style-name="Text_20_body">
      <style:text-properties style:font-name="Times New Roman" fo:font-size="18pt" fo:font-weight="normal" officeooo:rsid="0019966b" style:font-size-asian="18pt" style:font-weight-asian="normal" style:font-size-complex="18pt" style:font-weight-complex="normal"/>
    </style:style>
    <style:style style:name="P19" style:family="paragraph" style:parent-style-name="Quotations">
      <style:paragraph-properties fo:margin-left="0in" fo:margin-top="0in" fo:margin-bottom="0.0972in" style:contextual-spacing="false" fo:line-height="115%" fo:text-indent="0in" style:auto-text-indent="false"/>
      <style:text-properties style:font-name="Times New Roman" fo:font-weight="bold" officeooo:rsid="0019966b" style:font-size-asian="15.75pt" style:font-weight-asian="bold" style:font-weight-complex="bold"/>
    </style:style>
    <style:style style:name="P20" style:family="paragraph" style:parent-style-name="Horizontal_20_Line">
      <style:paragraph-properties fo:margin-top="0in" fo:margin-bottom="0.0972in" style:contextual-spacing="false" fo:line-height="115%"/>
      <style:text-properties style:font-name="Times New Roman" fo:font-size="18pt" fo:font-weight="normal" officeooo:rsid="0019966b" style:font-size-asian="18pt" style:font-weight-asian="normal" style:font-size-complex="18pt" style:font-weight-complex="normal"/>
    </style:style>
    <style:style style:name="P21" style:family="paragraph" style:parent-style-name="Heading_20_2">
      <style:paragraph-properties fo:margin-top="0in" fo:margin-bottom="0.0972in" style:contextual-spacing="false" fo:line-height="115%"/>
      <style:text-properties style:font-name="Times New Roman" officeooo:rsid="0019966b" style:font-size-asian="15.75pt"/>
    </style:style>
    <style:style style:name="P22" style:family="paragraph" style:parent-style-name="Text_20_body">
      <style:text-properties style:font-name="Times New Roman" fo:font-size="16pt" fo:font-weight="normal" officeooo:rsid="0019966b" style:font-size-asian="16pt" style:font-weight-asian="normal" style:font-size-complex="16pt" style:font-weight-complex="normal"/>
    </style:style>
    <style:style style:name="P23" style:family="paragraph" style:parent-style-name="Text_20_body">
      <style:text-properties style:font-name="Times New Roman" officeooo:paragraph-rsid="0019966b" style:font-size-asian="15.75pt"/>
    </style:style>
    <style:style style:name="P24" style:family="paragraph" style:parent-style-name="Horizontal_20_Line">
      <style:paragraph-properties fo:margin-top="0in" fo:margin-bottom="0.0972in" style:contextual-spacing="false" fo:line-height="115%"/>
      <style:text-properties style:font-name="Times New Roman" fo:font-size="18pt" fo:font-weight="normal" officeooo:rsid="0019966b" officeooo:paragraph-rsid="0019966b" style:font-size-asian="18pt" style:font-weight-asian="normal" style:font-size-complex="18pt" style:font-weight-complex="normal"/>
    </style:style>
    <style:style style:name="P25" style:family="paragraph" style:parent-style-name="Heading_20_2">
      <style:text-properties style:font-name="Times New Roman" officeooo:paragraph-rsid="0019966b" style:font-size-asian="15.75pt"/>
    </style:style>
    <style:style style:name="P26" style:family="paragraph" style:parent-style-name="Text_20_body">
      <style:text-properties style:font-name="Times New Roman" fo:font-size="18pt" officeooo:rsid="0019966b" style:font-size-asian="18pt" style:font-size-complex="18pt"/>
    </style:style>
    <style:style style:name="P27" style:family="paragraph" style:parent-style-name="Text_20_body">
      <style:text-properties style:font-name="Times New Roman" fo:font-size="16pt" officeooo:rsid="0019966b" style:font-size-asian="16pt" style:font-size-complex="16pt"/>
    </style:style>
    <style:style style:name="P28" style:family="paragraph" style:parent-style-name="Quotations">
      <style:paragraph-properties fo:margin-left="0in" fo:margin-top="0in" fo:margin-bottom="0.0972in" style:contextual-spacing="false" fo:line-height="115%" fo:text-indent="0in" style:auto-text-indent="false"/>
      <style:text-properties style:font-name="Times New Roman" fo:font-size="18pt" officeooo:rsid="0019966b" style:font-size-asian="18pt" style:font-size-complex="18pt"/>
    </style:style>
    <style:style style:name="P29" style:family="paragraph" style:parent-style-name="Text_20_body">
      <style:text-properties style:font-name="Times New Roman" fo:font-size="16pt" officeooo:rsid="0019966b" officeooo:paragraph-rsid="001cb381" style:font-size-asian="16pt" style:font-size-complex="16pt"/>
    </style:style>
    <style:style style:name="P30" style:family="paragraph" style:parent-style-name="Text_20_body" style:list-style-name="L4">
      <style:text-properties style:font-name="Times New Roman" fo:font-size="18pt" officeooo:rsid="0019966b" style:font-size-asian="18pt" style:font-size-complex="18pt"/>
    </style:style>
    <style:style style:name="P31" style:family="paragraph" style:parent-style-name="Horizontal_20_Line">
      <style:paragraph-properties fo:margin-top="0in" fo:margin-bottom="0.0972in" style:contextual-spacing="false" fo:line-height="115%"/>
      <style:text-properties style:font-name="Times New Roman" fo:font-size="18pt" officeooo:rsid="0019966b" style:font-size-asian="18pt" style:font-size-complex="18pt"/>
    </style:style>
    <style:style style:name="P32" style:family="paragraph" style:parent-style-name="Heading_20_2">
      <style:paragraph-properties fo:margin-top="0in" fo:margin-bottom="0.0972in" style:contextual-spacing="false" fo:line-height="115%"/>
      <style:text-properties style:font-name="Times New Roman" fo:font-weight="normal" officeooo:rsid="0019966b" style:font-weight-asian="normal" style:font-weight-complex="normal"/>
    </style:style>
    <style:style style:name="P33" style:family="paragraph" style:parent-style-name="Text_20_body" style:list-style-name="L5">
      <style:text-properties style:font-name="Times New Roman" fo:font-size="18pt" officeooo:rsid="0019966b" style:font-size-asian="18pt" style:font-size-complex="18pt"/>
    </style:style>
    <style:style style:name="T1" style:family="text">
      <style:text-properties fo:font-size="16pt" style:font-size-asian="16pt" style:font-size-complex="16pt" style:font-weight-complex="bold"/>
    </style:style>
    <style:style style:name="T2" style:family="text">
      <style:text-properties fo:font-size="16pt" style:font-size-asian="16pt" style:font-size-complex="16pt"/>
    </style:style>
    <style:style style:name="T3" style:family="text">
      <style:text-properties style:font-name="Times New Roman" style:text-underline-style="none" fo:font-weight="bold" officeooo:rsid="0019966b" style:font-size-asian="15.75pt" style:font-weight-asian="bold" style:font-weight-complex="bold"/>
    </style:style>
    <style:style style:name="T4" style:family="text">
      <style:text-properties style:font-name="Times New Roman" fo:font-size="18pt" style:text-underline-style="none" fo:font-weight="bold" officeooo:rsid="0019966b" style:font-size-asian="18pt" style:font-weight-asian="bold" style:font-size-complex="18pt" style:font-weight-complex="bold"/>
    </style:style>
    <style:style style:name="T5" style:family="text">
      <style:text-properties style:font-name="Times New Roman" fo:font-size="18pt" style:text-underline-style="solid" style:text-underline-width="auto" style:text-underline-color="font-color" fo:font-weight="bold" officeooo:rsid="0019966b" style:font-size-asian="18pt" style:font-weight-asian="bold" style:font-size-complex="1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9" style:family="text">
      <style:text-properties fo:font-size="15.5pt" style:font-size-asian="15.5pt" style:font-size-complex="15.5pt"/>
    </style:style>
    <style:style style:name="T10" style:family="text">
      <style:text-properties style:font-weight-complex="bold"/>
    </style:style>
    <style:style style:name="T11" style:family="text">
      <style:text-properties fo:font-size="18pt" style:text-underline-style="none" fo:font-weight="normal" officeooo:rsid="0019966b" style:font-size-asian="18pt" style:font-weight-asian="normal" style:font-size-complex="18pt" style:font-weight-complex="normal"/>
    </style:style>
    <style:style style:name="T12" style:family="text">
      <style:text-properties fo:font-size="18pt" style:text-underline-style="none" officeooo:rsid="0019966b" style:font-size-asian="18pt" style:font-size-complex="18pt"/>
    </style:style>
    <style:style style:name="T13" style:family="text">
      <style:text-properties fo:font-weight="normal" style:font-weight-asian="normal" style:font-weight-complex="bold"/>
    </style:style>
    <style:style style:name="T14" style:family="text">
      <style:text-properties fo:font-weight="normal" style:font-weight-asian="normal" style:font-weight-complex="normal"/>
    </style:style>
    <style:style style:name="T15" style:family="text">
      <style:text-properties fo:font-size="18pt" style:font-size-asian="18pt" style:font-size-complex="18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Q1. “Seeking Engineering knowledge is an Ibadah” — Explain it in the light of the Qur’an, Hadith, and Dr. Martin Luther King Jr.’s saying</text:span></text:h>
      <text:p text:style-name="P2">In Islam, <text:span text:style-name="Strong_20_Emphasis">seeking beneficial knowledge</text:span>, including engineering knowledge, is considered an <text:span text:style-name="Strong_20_Emphasis">act of Ibadah</text:span> when it is pursued with the right intention. Islam does not separate religious knowledge from worldly knowledge if that knowledge benefits humanity and is used in obedience to Allah.</text:p>
      <text:p text:style-name="P2">Allah commands believers to seek knowledge in the Qur’an:</text:p>
      <text:p text:style-name="P3">قُلْ هَلْ يَسْتَوِي الَّذِينَ يَعْلَمُونَ وَالَّذِينَ لَا يَعْلَمُونَ </text:p>
      <text:p text:style-name="P4"><text:span text:style-name="Emphasis">“Say: Are those who know equal to those who do not know?”</text:span><text:line-break/>(Qur’an 39:9)</text:p>
      <text:p text:style-name="P2">Engineering knowledge helps society through infrastructure, technology, healthcare systems, and safety. When a Muslim engineer uses his skills to serve people honestly and ethically, it becomes worship. The Prophet ﷺ said:</text:p>
      <text:p text:style-name="P3">طَلَبُ الْعِلْمِ فَرِيضَةٌ عَلَى كُلِّ مُسْلِمٍ</text:p>
      <text:p text:style-name="P4"><text:span text:style-name="Emphasis">“Seeking knowledge is obligatory upon every Muslim.”</text:span><text:line-break/>(Ibn Majah)</text:p>
      <text:p text:style-name="P2">Islam emphasizes <text:span text:style-name="Strong_20_Emphasis">intention (niyyah)</text:span>. If a student studies engineering to serve humanity, earn halal income, and strengthen the Muslim community, it becomes an act of worship. This aligns with the Islamic principle that <text:span text:style-name="Strong_20_Emphasis">actions are judged by intentions</text:span> (Bukhari).</text:p>
      <text:p text:style-name="P2">Dr. Martin Luther King Jr. said:</text:p>
      <text:p text:style-name="P5"><text:soft-page-break/><text:span text:style-name="Emphasis">“Intelligence plus character — that is the goal of true education.”</text:span></text:p>
      <text:p text:style-name="P2">This statement strongly matches Islamic teachings. Islam does not value intelligence alone; it values <text:span text:style-name="Strong_20_Emphasis">knowledge with character (akhlaq)</text:span>. A skilled engineer without honesty may harm society, while an engineer with faith and character benefits humanity.</text:p>
      <text:p text:style-name="P2">The Qur’an praises those who use knowledge responsibly:</text:p>
      <text:p text:style-name="P2"><text:span text:style-name="T1">إِنَّ أَكْرَمَكُمْ عِندَ اللَّهِ أَتْقَاكُمْ</text:span> </text:p>
      <text:p text:style-name="P4"><text:span text:style-name="Emphasis">“Indeed, the most honored of you in the sight of Allah is the most righteous.”</text:span><text:line-break/>(Qur’an 49:13)</text:p>
      <text:p text:style-name="P2">Thus, engineering knowledge becomes <text:span text:style-name="Strong_20_Emphasis">Ibadah</text:span> when combined with faith, sincerity, ethical conduct, and service to mankind. This understanding perfectly reflects the Islamic worldview presented in the course.</text:p>
      <text:p text:style-name="P6"/>
      <text:h text:style-name="P7" text:outline-level="2"><text:span text:style-name="Strong_20_Emphasis">Q2. What is Trinity? Write down one popular Nullifier of Eeman existing in society.</text:span></text:h>
      <text:p text:style-name="P2"><text:span text:style-name="Strong_20_Emphasis">Trinity</text:span> is a Christian belief which states that <text:span text:style-name="Strong_20_Emphasis">God exists as three persons</text:span>: the Father, the Son (Jesus), and the Holy Spirit, yet they are considered one God. From an Islamic perspective, this belief directly contradicts <text:span text:style-name="Strong_20_Emphasis">Tawheed (Oneness of Allah)</text:span>.</text:p>
      <text:p text:style-name="P2">Allah clearly rejects this concept in the Qur’an:</text:p>
      <text:p text:style-name="P2"><text:span text:style-name="Emphasis"/></text:p>
      <text:p text:style-name="P2"><text:span text:style-name="Emphasis"/></text:p>
      <text:p text:style-name="P8"><text:soft-page-break/>لَّقَدْ كَفَرَ الَّذِينَ قَالُوا إِنَّ اللَّهَ ثَالِثُ ثَلَاثَةٍ</text:p>
      <text:p text:style-name="P4"><text:span text:style-name="Emphasis">“They have certainly disbelieved who say, ‘Allah is the third of three.’”</text:span><text:line-break/>(Qur’an 5:73)</text:p>
      <text:p text:style-name="P2">Islam teaches that Allah is <text:span text:style-name="Strong_20_Emphasis">One</text:span>, without partners, children, or divisions. Associating partners with Allah is known as <text:span text:style-name="Strong_20_Emphasis">Shirk</text:span>, which is the <text:span text:style-name="Strong_20_Emphasis">greatest nullifier of Eeman</text:span>.</text:p>
      <text:p text:style-name="P2">One <text:span text:style-name="Strong_20_Emphasis">popular nullifier of Eeman in society today</text:span> is <text:span text:style-name="Strong_20_Emphasis">Shirk in worship</text:span>, such as calling upon saints, graves, or spiritual leaders for help instead of Allah. Many people claim they are only using them as intermediaries, but this practice was also done by the Mushrikeen of Makkah.</text:p>
      <text:p text:style-name="P2">Allah says:</text:p>
      <text:p text:style-name="P2"><text:span text:style-name="T2">وَقَالَ رَبُّكُمُ ادْعُونِي أَسْتَجِبْ لَكُمْ</text:span> </text:p>
      <text:p text:style-name="P4"><text:span text:style-name="Emphasis">“And your Lord says: Call upon Me; I will respond to you.”</text:span><text:line-break/>(Qur’an 40:60)</text:p>
      <text:p text:style-name="P2">The Prophet ﷺ warned strongly against Shirk and said:</text:p>
      <text:p text:style-name="P4"><text:span text:style-name="Emphasis">“The most feared thing for my Ummah is minor shirk.”</text:span><text:line-break/>(Ahmad)</text:p>
      <text:p text:style-name="P2">This nullifier exists widely due to ignorance, cultural practices, and blind following of traditions. According to Islamic belief, <text:span text:style-name="Strong_20_Emphasis">any form of Shirk nullifies Eeman</text:span>, unless one sincerely repents.</text:p>
      <text:p text:style-name="P2">Therefore, understanding and avoiding beliefs like Trinity and all forms of Shirk is essential to protect one’s faith.</text:p>
      <text:p text:style-name="P6"/>
      <text:h text:style-name="P7" text:outline-level="2"><text:soft-page-break/><text:span text:style-name="Strong_20_Emphasis">Q3. Discuss Shirk: Meaning, Classification, and Manifestations.</text:span></text:h>
      <text:p text:style-name="P2"><text:span text:style-name="Strong_20_Emphasis">Shirk</text:span> means associating partners with Allah in His Lordship, worship, or attributes. It is the <text:span text:style-name="Strong_20_Emphasis">opposite of Tawheed</text:span> and the <text:span text:style-name="Strong_20_Emphasis">greatest nullifier of Eeman</text:span>. Allah says:</text:p>
      <text:p text:style-name="P9">إِنَّ اللَّهَ لَا يَغْفِرُ أَن يُشْرَكَ بِهِ وَيَغْفِرُ مَا دُونَ ذَٰلِكَ لِمَن يَشَاءُ </text:p>
      <text:p text:style-name="P10"><text:span text:style-name="Emphasis">“Indeed, Allah does not forgive association with Him, but He forgives what is less than that for whom He wills.”</text:span><text:line-break/>(Qur’an 4:48)</text:p>
      <text:h text:style-name="P11" text:outline-level="3"><text:span text:style-name="Strong_20_Emphasis">Classification of Shirk</text:span></text:h>
      <text:list text:style-name="L1">
        <text:list-item>
          <text:p text:style-name="P12"><text:span text:style-name="Strong_20_Emphasis">Major Shirk (Shirk Akbar):</text:span><text:line-break/>This occurs when someone worships others besides Allah or believes that someone shares Allah’s divine powers. This form takes a person <text:span text:style-name="Strong_20_Emphasis">out of Islam</text:span>.<text:line-break/>Example: Worshipping idols, saints, or believing Jesus is divine.</text:p>
        </text:list-item>
      </text:list>
      <text:p text:style-name="P2">Allah says:</text:p>
      <text:p text:style-name="P2"><text:span text:style-name="T2">إِنَّهُ مَن يُشْرِكْ بِاللَّهِ فَقَدْ حَرَّمَ اللَّهُ عَلَيْهِ الْجَنَّةَ</text:span> </text:p>
      <text:p text:style-name="P4"><text:span text:style-name="Emphasis">“Whoever associates partners with Allah, Paradise is forbidden for him.”</text:span><text:line-break/>(Qur’an 5:72)</text:p>
      <text:list text:style-name="L2">
        <text:list-item>
          <text:p text:style-name="P13"><text:span text:style-name="Strong_20_Emphasis">Minor Shirk (Shirk Asghar):</text:span><text:line-break/>This does not take one out of Islam but <text:span text:style-name="Strong_20_Emphasis">destroys good deeds</text:span>.<text:line-break/>Example: Showing off in worship (Riya).</text:p>
        </text:list-item>
      </text:list>
      <text:p text:style-name="P2">The Prophet ﷺ said:</text:p>
      <text:p text:style-name="P5"><text:soft-page-break/><text:span text:style-name="Emphasis">“The thing I fear most for you is minor shirk: showing off.”</text:span><text:line-break/>(Ahmad)</text:p>
      <text:h text:style-name="P11" text:outline-level="3"><text:span text:style-name="Strong_20_Emphasis">Manifestations of Shirk</text:span></text:h>
      <text:list text:style-name="L3">
        <text:list-item>
          <text:p text:style-name="P14">Making du‘a to other than Allah</text:p>
        </text:list-item>
        <text:list-item>
          <text:p text:style-name="P14">Swearing by someone other than Allah</text:p>
        </text:list-item>
        <text:list-item>
          <text:p text:style-name="P14">Using amulets believing they protect independently</text:p>
        </text:list-item>
        <text:list-item>
          <text:p text:style-name="P14">Seeking supernatural help from the dead</text:p>
        </text:list-item>
      </text:list>
      <text:p text:style-name="P2">The Qur’an compares Shirk to total loss:</text:p>
      <text:p text:style-name="P2"><text:span text:style-name="T2">وَمَن يُشْرِكْ بِاللَّهِ فَكَأَنَّمَا خَرَّ مِنَ السَّمَاءِ</text:span> </text:p>
      <text:p text:style-name="P4"><text:span text:style-name="Emphasis">“Whoever associates partners with Allah is like one who falls from the sky…”</text:span><text:line-break/>(Qur’an 22:31)</text:p>
      <text:p text:style-name="P2">Thus, Shirk destroys faith, nullifies deeds, and leads to eternal loss if not repented from. Avoiding Shirk is the foundation of Islam and the core message of all Prophets.</text:p>
      <text:p text:style-name="P15"/>
      <text:h text:style-name="P16" text:outline-level="2"><text:span text:style-name="Strong_20_Emphasis"><text:span text:style-name="T3">Q4: Short notes on - </text:span></text:span></text:h>
      <text:h text:style-name="P16" text:outline-level="2"><text:span text:style-name="Strong_20_Emphasis"><text:span text:style-name="T3"><text:line-break/></text:span></text:span><text:span text:style-name="Strong_20_Emphasis"><text:span text:style-name="T4">A. </text:span></text:span><text:span text:style-name="Strong_20_Emphasis"><text:span text:style-name="T5">Al-Wala wal-Bara (Loyalty and Disavowal)</text:span></text:span><text:span text:style-name="Strong_20_Emphasis"><text:span text:style-name="T4">:</text:span></text:span></text:h>
      <text:p text:style-name="P17"><text:span text:style-name="Strong_20_Emphasis"><text:span text:style-name="T6">Al-Wala wal-Bara</text:span></text:span><text:span text:style-name="T6"> is an important concept in Islam which means loyalty and love for the sake of Allah, and disassociation from disbelief and falsehood. </text:span><text:span text:style-name="Strong_20_Emphasis"><text:span text:style-name="T6">Al-Wala</text:span></text:span><text:span text:style-name="T6"> refers to loving, supporting, and standing with believers because of their faith. </text:span><text:span text:style-name="Strong_20_Emphasis"><text:span text:style-name="T6">Al-Bara</text:span></text:span><text:span text:style-name="T6"> means rejecting disbelief, Shirk, and actions that go against Islam.</text:span></text:p>
      <text:p text:style-name="P18"><text:soft-page-break/>Allah says:</text:p>
      <text:p text:style-name="P18"><text:span text:style-name="T1">وَالْمُؤْمِنُونَ وَالْمُؤْمِنَاتُ بَعْضُهُمْ أَوْلِيَاءُ بَعْضٍ</text:span> </text:p>
      <text:p text:style-name="P19"><text:span text:style-name="Emphasis"><text:span text:style-name="T6">“The believers are allies of one another.”</text:span></text:span><text:span text:style-name="T6"> (Qur’an 9:71)</text:span></text:p>
      <text:p text:style-name="P17"><text:span text:style-name="T6">This concept does not teach hatred or injustice. Islam commands Muslims to be fair, kind, and just toward non-Muslims. However, a Muslim must not love disbelief or support ideas that oppose Allah’s guidance. Supporting disbelievers against Muslims is considered a </text:span><text:span text:style-name="Strong_20_Emphasis"><text:span text:style-name="T6">nullifier of Eeman</text:span></text:span><text:span text:style-name="T6">, as mentioned in the course.</text:span></text:p>
      <text:p text:style-name="P18">Allah warns:</text:p>
      <text:p text:style-name="P18"><text:span text:style-name="T2">وَمَن يَتَوَلَّهُم مِّنكُمْ فَإِنَّهُ مِنْهُمْ</text:span> </text:p>
      <text:p text:style-name="P19"><text:span text:style-name="Emphasis"><text:span text:style-name="T6">“Whoever among you takes them as allies is indeed one of them.”</text:span></text:span><text:span text:style-name="T6"> (Qur’an 5:51)</text:span></text:p>
      <text:p text:style-name="P18">Al-Wala wal-Bara protects a Muslim’s identity and belief system. It ensures that faith is based on Tawheed, not culture or worldly interests. When properly understood, it strengthens Eeman while maintaining justice and good character in society.</text:p>
      <text:p text:style-name="P20"/>
      <text:h text:style-name="P21" text:outline-level="2"><text:span text:style-name="Strong_20_Emphasis"><text:span text:style-name="T7">B. </text:span></text:span><text:span text:style-name="Strong_20_Emphasis"><text:span text:style-name="T8">True Magic and False Magic</text:span></text:span><text:span text:style-name="Strong_20_Emphasis"><text:span text:style-name="T7">:</text:span></text:span></text:h>
      <text:p text:style-name="P17"><text:span text:style-name="T6">Magic (</text:span><text:span text:style-name="Strong_20_Emphasis"><text:span text:style-name="T6">Sihr</text:span></text:span><text:span text:style-name="T6">) is strictly forbidden in Islam and is considered an act of disbelief. Islam recognizes </text:span><text:span text:style-name="Strong_20_Emphasis"><text:span text:style-name="T6">two types of magic</text:span></text:span><text:span text:style-name="T6">: true magic and false magic.</text:span></text:p>
      <text:p text:style-name="P17"><text:span text:style-name="Strong_20_Emphasis"><text:span text:style-name="T6">True magic (Sihr Haqiqi)</text:span></text:span><text:span text:style-name="T6"> involves cooperation with jinn and devils and can cause real harm, such as creating hatred between spouses or illness. Allah refers to this type of magic in the Qur’an:</text:span></text:p>
      <text:p text:style-name="P18"/>
      <text:p text:style-name="P18"><text:soft-page-break/><text:span text:style-name="T9">وَمِن شَرِّ النَّفَّاثَاتِ فِي الْعُقَدِ</text:span> </text:p>
      <text:p text:style-name="P19"><text:span text:style-name="Emphasis"><text:span text:style-name="T6">“And from the evil of the blowers in knots.”</text:span></text:span><text:span text:style-name="T6"> (Qur’an 113:4)</text:span></text:p>
      <text:p text:style-name="P17"><text:span text:style-name="Strong_20_Emphasis"><text:span text:style-name="T6">False magic (Sihr Khayali)</text:span></text:span><text:span text:style-name="T6"> is based on illusion and deception. An example is the magicians of Pharaoh during the time of Prophet Musa (AS), who made people think ropes were moving.</text:span></text:p>
      <text:p text:style-name="P18">Allah says about magic:</text:p>
      <text:p text:style-name="P18"><text:span text:style-name="T2">وَمَا كَفَرَ سُلَيْمَانُ وَلَٰكِنَّ الشَّيَاطِينَ كَفَرُوا</text:span> </text:p>
      <text:p text:style-name="P19"><text:span text:style-name="Emphasis"><text:span text:style-name="T6">“Do not commit disbelief.”</text:span></text:span><text:span text:style-name="T6"> (Qur’an 2:102)</text:span></text:p>
      <text:p text:style-name="P17"><text:span text:style-name="T6">Both forms are </text:span><text:span text:style-name="Strong_20_Emphasis"><text:span text:style-name="T6">haram</text:span></text:span><text:span text:style-name="T6">, and liking or approving magic is also disbelief. Islam allows protection only through </text:span><text:span text:style-name="Strong_20_Emphasis"><text:span text:style-name="T6">Qur’an, du‘a, and Sunnah</text:span></text:span><text:span text:style-name="T6">, not by using magic to fight magic. The Prophet ﷺ said:</text:span></text:p>
      <text:p text:style-name="P19"><text:span text:style-name="Emphasis"><text:span text:style-name="T6">“Allah has not placed a cure in what He has forbidden.”</text:span></text:span><text:span text:style-name="T6"> (Bukhari)</text:span></text:p>
      <text:p text:style-name="P20"/>
      <text:h text:style-name="P21" text:outline-level="2"><text:span text:style-name="Strong_20_Emphasis"><text:span text:style-name="T7">C. </text:span></text:span><text:span text:style-name="Strong_20_Emphasis"><text:span text:style-name="T8">Fardh ul Ayn and Fardh Kifayah</text:span></text:span><text:span text:style-name="Strong_20_Emphasis"><text:span text:style-name="T7">:</text:span></text:span></text:h>
      <text:p text:style-name="P17"><text:span text:style-name="T6">Islam divides religious obligations into </text:span><text:span text:style-name="Strong_20_Emphasis"><text:span text:style-name="T6">Fardh ul Ayn</text:span></text:span><text:span text:style-name="T6"> and </text:span><text:span text:style-name="Strong_20_Emphasis"><text:span text:style-name="T6">Fardh Kifayah</text:span></text:span><text:span text:style-name="T6">.</text:span></text:p>
      <text:p text:style-name="P17"><text:span text:style-name="Strong_20_Emphasis"><text:span text:style-name="T6">Fardh ul Ayn</text:span></text:span><text:span text:style-name="T6"> is knowledge and action required from every individual Muslim. This includes belief in Tawheed, prayer, fasting, and basic Islamic rules. Ignoring this knowledge is dangerous and may lead to disbelief, as mentioned in the Nullifiers of Eeman.</text:span></text:p>
      <text:p text:style-name="P17"><text:span text:style-name="Strong_20_Emphasis"><text:span text:style-name="T6">Fardh Kifayah</text:span></text:span><text:span text:style-name="T6"> is a communal obligation. If some Muslims fulfill it, others are free from sin. Examples include advanced Islamic studies, medicine, engineering, and defense.</text:span></text:p>
      <text:p text:style-name="P18"><text:soft-page-break/>The Prophet ﷺ said:</text:p>
      <text:p text:style-name="P22"><text:span text:style-name="T10">مَنْ يُرِدِ اللَّهُ بِهِ خَيْرًا يُفَقِّهْهُ فِي الدِّينِ</text:span> </text:p>
      <text:p text:style-name="P19"><text:span text:style-name="Emphasis"><text:span text:style-name="T6">“When Allah wants good for someone, He gives him understanding of the religion.”</text:span></text:span><text:span text:style-name="T6"> (Bukhari)</text:span></text:p>
      <text:p text:style-name="P18">Both types are important. Fardh ul Ayn preserves personal faith, while Fardh Kifayah ensures the survival and progress of the Muslim community. Neglecting either weakens society and Eeman.</text:p>
      <text:p text:style-name="P20"/>
      <text:h text:style-name="P21" text:outline-level="2"><text:span text:style-name="Strong_20_Emphasis"><text:span text:style-name="T7">D. </text:span></text:span><text:span text:style-name="Strong_20_Emphasis"><text:span text:style-name="T8">Yaqeen (Certainty)</text:span></text:span><text:span text:style-name="Strong_20_Emphasis"><text:span text:style-name="T7">:</text:span></text:span></text:h>
      <text:p text:style-name="P17"><text:span text:style-name="Strong_20_Emphasis"><text:span text:style-name="T6">Yaqeen</text:span></text:span><text:span text:style-name="T6"> means complete certainty and firm belief in Allah, His promises, and the Hereafter. In Islamic texts, </text:span><text:span text:style-name="Emphasis"><text:span text:style-name="T6">Yaqeen</text:span></text:span><text:span text:style-name="T6"> often refers to </text:span><text:span text:style-name="Strong_20_Emphasis"><text:span text:style-name="T6">death</text:span></text:span><text:span text:style-name="T6">, not a spiritual stage where worship ends.</text:span></text:p>
      <text:p text:style-name="P18">Allah says:</text:p>
      <text:p text:style-name="P22"><text:span text:style-name="T10">وَاعْبُدْ رَبَّكَ حَتَّىٰ يَأْتِيَكَ الْيَقِينُ</text:span> </text:p>
      <text:p text:style-name="P19"><text:span text:style-name="Emphasis"><text:span text:style-name="T6">“Worship your Lord until certainty (death) comes to you.”</text:span></text:span><text:span text:style-name="T6"> (Qur’an 15:99)</text:span></text:p>
      <text:p text:style-name="P18">Some people misunderstand Yaqeen and claim that once they reach spiritual certainty, they no longer need to pray or follow Shari‘ah. This belief is false and dangerous. Even the Prophet Muhammad ﷺ worshipped Allah continuously until his death.</text:p>
      <text:p text:style-name="P18">True Yaqeen increases obedience, patience, and trust in Allah. It strengthens a believer during hardships and keeps him away from sins. The companions understood Yaqeen as commitment, not freedom from religious duties.</text:p>
      <text:p text:style-name="P18"><text:soft-page-break/>Therefore, correct understanding of Yaqeen protects Eeman and prevents deviation, as highlighted in the course material.</text:p>
      <text:p text:style-name="P20"/>
      <text:h text:style-name="P21" text:outline-level="2"><text:span text:style-name="Strong_20_Emphasis"><text:span text:style-name="T7">E. </text:span></text:span><text:span text:style-name="Strong_20_Emphasis"><text:span text:style-name="T8">Istidraj (استدراج)</text:span></text:span><text:span text:style-name="Strong_20_Emphasis"><text:span text:style-name="T7">:</text:span></text:span></text:h>
      <text:p text:style-name="P17"><text:span text:style-name="Strong_20_Emphasis"><text:span text:style-name="T6">Istidraj</text:span></text:span><text:span text:style-name="T6"> refers to a situation where Allah gives a sinner worldly success, wealth, or ease while they continue in sin. This is not a sign of Allah’s pleasure but a gradual test leading toward punishment.</text:span></text:p>
      <text:p text:style-name="P18">Allah says:</text:p>
      <text:p text:style-name="P18"><text:span text:style-name="T2">سَنَسْتَدْرِجُهُم مِّنْ حَيْثُ لَا يَعْلَمُونَ</text:span> </text:p>
      <text:p text:style-name="P19"><text:span text:style-name="Emphasis"><text:span text:style-name="T6">“We will gradually lead them to punishment from where they do not know.”</text:span></text:span><text:span text:style-name="T6"> (Qur’an 7:182)</text:span></text:p>
      <text:p text:style-name="P18">Many people wrongly assume that wealth and success mean Allah is pleased with them. Islam teaches that real success is faith and obedience, not worldly comfort.</text:p>
      <text:p text:style-name="P18">Istidraj is dangerous because it makes a person careless about repentance. Instead of turning back to Allah, they become more attached to worldly life. This concept warns believers not to judge righteousness based on material success.</text:p>
      <text:p text:style-name="P18">A true believer remains humble, thankful, and fearful of Allah even during ease. Understanding Istidraj helps Muslims protect their Eeman and stay alert.</text:p>
      <text:p text:style-name="P20"/>
      <text:h text:style-name="P21" text:outline-level="2"><text:soft-page-break/><text:span text:style-name="Strong_20_Emphasis"><text:span text:style-name="T7">F. </text:span></text:span><text:span text:style-name="Strong_20_Emphasis"><text:span text:style-name="T8">Taaghoot</text:span></text:span><text:span text:style-name="Strong_20_Emphasis"><text:span text:style-name="T7">:</text:span></text:span></text:h>
      <text:p text:style-name="P17"><text:span text:style-name="Strong_20_Emphasis"><text:span text:style-name="T6">Taaghoot</text:span></text:span><text:span text:style-name="T6"> refers to anything that is worshipped, obeyed, or followed instead of Allah. This includes idols, false gods, unjust rulers, or man-made systems that replace Allah’s law.</text:span></text:p>
      <text:p text:style-name="P18">Allah says:</text:p>
      <text:p text:style-name="P22"><text:span text:style-name="T10">فَمَن يَكْفُرْ بِالطَّاغُوتِ وَيُؤْمِن بِاللَّهِ فَقَدِ اسْتَمْسَكَ بِالْعُرْوَةِ الْوُثْقَىٰ</text:span> </text:p>
      <text:p text:style-name="P19"><text:span text:style-name="Emphasis"><text:span text:style-name="T6">“Whoever disbelieves in Taaghoot and believes in Allah has grasped the firmest handhold.”</text:span></text:span><text:span text:style-name="T6"> (Qur’an 2:256)</text:span></text:p>
      <text:p text:style-name="P18">Rejecting Taaghoot is a condition of true faith. A Muslim must believe that only Allah has the right to be obeyed absolutely. Preferring laws or ideologies over Shari‘ah threatens Eeman.</text:p>
      <text:p text:style-name="P18">Islam does not reject worldly systems, but it rejects any system that contradicts divine guidance. Recognizing and rejecting Taaghoot protects Tawheed and keeps belief pure.</text:p>
      <text:p text:style-name="P20"/>
      <text:h text:style-name="P21" text:outline-level="2"><text:span text:style-name="Strong_20_Emphasis"><text:span text:style-name="T7">G. </text:span></text:span><text:span text:style-name="Strong_20_Emphasis"><text:span text:style-name="T8">Unifying Faiths – Sabeans – Deen-e-Hanif – Buhaira Rahib</text:span></text:span><text:span text:style-name="Strong_20_Emphasis"><text:span text:style-name="T7">:</text:span></text:span></text:h>
      <text:p text:style-name="P17"><text:span text:style-name="T6">Some people promote the idea of </text:span><text:span text:style-name="Strong_20_Emphasis"><text:span text:style-name="T6">unifying all religions</text:span></text:span><text:span text:style-name="T6">, claiming that all faiths lead to salvation. They often misuse Qur’an 2:62. Scholars explain that this verse refers to people </text:span><text:span text:style-name="Strong_20_Emphasis"><text:span text:style-name="T6">before Prophet Muhammad ﷺ</text:span></text:span><text:span text:style-name="T6">, who followed their prophets sincerely.</text:span></text:p>
      <text:p text:style-name="P18">The Prophet ﷺ said:</text:p>
      <text:p text:style-name="P19"><text:span text:style-name="Emphasis"><text:span text:style-name="T6">“Whoever hears of me and does not believe in me will be among the people of Hell.”</text:span></text:span><text:span text:style-name="T6"> (Muslim)</text:span></text:p>
      <text:p text:style-name="P17"><text:soft-page-break/><text:span text:style-name="Strong_20_Emphasis"><text:span text:style-name="T6">Deen-e-Hanif</text:span></text:span><text:span text:style-name="T6"> refers to the pure monotheism of Prophet Ibrahim (AS). After Islam, salvation is only through following the Prophet Muhammad ﷺ.</text:span></text:p>
      <text:p text:style-name="P17"><text:span text:style-name="T6">Figures like </text:span><text:span text:style-name="Strong_20_Emphasis"><text:span text:style-name="T6">Buhaira Rahib</text:span></text:span><text:span text:style-name="T6"> recognized signs of prophethood but did not represent a separate path to salvation. Islam rejects unifying faiths after the final message.</text:span></text:p>
      <text:p text:style-name="P20"/>
      <text:h text:style-name="P21" text:outline-level="2"><text:span text:style-name="Strong_20_Emphasis"><text:span text:style-name="T7">H. </text:span></text:span><text:span text:style-name="Strong_20_Emphasis"><text:span text:style-name="T8">Tawassul – The Greatest Savior (الغوث الأعظم)</text:span></text:span><text:span text:style-name="Strong_20_Emphasis"><text:span text:style-name="T7">:</text:span></text:span></text:h>
      <text:p text:style-name="P17"><text:span text:style-name="Strong_20_Emphasis"><text:span text:style-name="T6">Tawassul</text:span></text:span><text:span text:style-name="T6"> means seeking closeness to Allah through lawful means. Permissible Tawassul includes calling Allah by His Names, good deeds, or asking a living person to make du‘a.</text:span></text:p>
      <text:p text:style-name="P18">Allah says:</text:p>
      <text:p text:style-name="P22"><text:span text:style-name="T10">وَلِلَّهِ الْأَسْمَاءُ الْحُسْنَىٰ فَادْعُوهُ بِهَا</text:span> </text:p>
      <text:p text:style-name="P19"><text:span text:style-name="Emphasis"><text:span text:style-name="T6">“To Allah belong the most beautiful names, so call upon Him by them.”</text:span></text:span><text:span text:style-name="T6"> (Qur’an 7:180)</text:span></text:p>
      <text:p text:style-name="P17"><text:span text:style-name="T6">Calling upon dead saints or believing someone like </text:span><text:span text:style-name="Strong_20_Emphasis"><text:span text:style-name="T6">“Al-Ghawth al-A‘zam”</text:span></text:span><text:span text:style-name="T6"> can independently save people is </text:span><text:span text:style-name="Strong_20_Emphasis"><text:span text:style-name="T6">Shirk</text:span></text:span><text:span text:style-name="T6">. The Mushrikeen also claimed intermediaries, which Allah rejected.</text:span></text:p>
      <text:p text:style-name="P18">Islam teaches direct connection with Allah. Any belief that removes this direct relationship threatens Tawheed and nullifies Eeman.</text:p>
      <text:p text:style-name="P23"><text:span text:style-name="Strong_20_Emphasis"><text:span text:style-name="T11"/></text:span></text:p>
      <text:p text:style-name="P24"/>
      <text:h text:style-name="P25" text:outline-level="2"><text:soft-page-break/><text:span text:style-name="Strong_20_Emphasis"><text:span text:style-name="T12">Q5. Turning away from Allah’s Religion, not learning it or implementing it (is an act of disbelief) — Explain the Tenth Nullifier according to your understanding.</text:span></text:span></text:h>
      <text:p text:style-name="P26">The <text:span text:style-name="Strong_20_Emphasis">Tenth Nullifier of Eeman</text:span> refers to completely turning away from Allah’s religion by <text:span text:style-name="Strong_20_Emphasis">not learning Islam, not practicing it, and showing no concern for it</text:span>. This does not mean simple ignorance or weakness, but a deliberate attitude of neglect and rejection.</text:p>
      <text:p text:style-name="P26">Allah says:</text:p>
      <text:p text:style-name="P27"><text:span text:style-name="T10">وَمَنْ أَظْلَمُ مِمَّن ذُكِّرَ بِآيَاتِ رَبِّهِ ثُمَّ أَعْرَضَ عَنْهَا</text:span> </text:p>
      <text:p text:style-name="P28"><text:span text:style-name="Emphasis">“And who is more unjust than one who is reminded of the verses of his Lord, then turns away from them?”</text:span><text:line-break/>(Qur’an 32:22)</text:p>
      <text:p text:style-name="P26">Islam places great importance on <text:span text:style-name="Strong_20_Emphasis">seeking and acting upon knowledge</text:span>. A Muslim is required to know the basics of faith and practice them. If a person completely avoids learning Tawheed, Salah, or basic obligations, and shows no interest in obeying Allah, this becomes an act of disbelief.</text:p>
      <text:p text:style-name="P26">The Prophet ﷺ said:</text:p>
      <text:p text:style-name="P29"><text:span text:style-name="T13">مَنْ يُرِدِ اللَّهُ بِهِ خَيْرًا يُفَقِّهْهُ فِي الدِّينِ</text:span><text:span text:style-name="T14"> <text:line-break/></text:span><text:span text:style-name="Emphasis"><text:span text:style-name="T15">“When Allah wants good for someone, He gives him understanding of the religion.”</text:span></text:span><text:span text:style-name="T15"><text:line-break/>(Bukhari)</text:span></text:p>
      <text:p text:style-name="P26">Turning away from religion can happen in two ways:</text:p>
      <text:list text:style-name="L4">
        <text:list-item>
          <text:p text:style-name="P30"><text:span text:style-name="Strong_20_Emphasis">Intellectual rejection</text:span> – refusing to learn Islam</text:p>
        </text:list-item>
        <text:list-item>
          <text:p text:style-name="P30"><text:span text:style-name="Strong_20_Emphasis">Practical rejection</text:span> – knowing Islam but refusing to practice it</text:p>
        </text:list-item>
      </text:list>
      <text:p text:style-name="P26"><text:soft-page-break/>Both are dangerous for Eeman. Islam teaches that knowledge without action leads to Allah’s anger, while action without knowledge leads to misguidance. This nullifier warns Muslims to protect their faith by learning Islam sincerely and implementing it in daily life.</text:p>
      <text:p text:style-name="P26">Therefore, neglecting religion is not a minor issue—it threatens the foundation of Eeman and leads a person away from Allah’s guidance.</text:p>
      <text:p text:style-name="P31"/>
      <text:h text:style-name="P32" text:outline-level="2"><text:span text:style-name="Strong_20_Emphasis">Q6. Conceptualize the Concept of Zero and One – The Binary System (0 and 1) according to the Understanding of Tawheed.</text:span></text:h>
      <text:p text:style-name="P26">The <text:span text:style-name="Strong_20_Emphasis">binary system</text:span>, which is based on <text:span text:style-name="Strong_20_Emphasis">0 and 1</text:span>, can be understood beautifully through the concept of <text:span text:style-name="Strong_20_Emphasis">Tawheed</text:span> in Islam. In computing, <text:span text:style-name="Strong_20_Emphasis">1 represents existence or truth</text:span>, while <text:span text:style-name="Strong_20_Emphasis">0 represents absence or falsehood</text:span>. Similarly, in Islam, <text:span text:style-name="Strong_20_Emphasis">Tawheed represents truth</text:span>, and <text:span text:style-name="Strong_20_Emphasis">Shirk represents falsehood</text:span>.</text:p>
      <text:p text:style-name="P26">Tawheed means believing that <text:span text:style-name="Strong_20_Emphasis">Allah is One</text:span>, without any partner. Allah says:</text:p>
      <text:p text:style-name="P27">وَإِلَٰهُكُمْ إِلَٰهٌ وَاحِدٌ ۖ لَّا إِلَٰهَ إِلَّا هُوَ </text:p>
      <text:p text:style-name="P28"><text:span text:style-name="Emphasis">“Your God is One God. There is no deity except Him.”</text:span><text:line-break/>(Qur’an 2:163)</text:p>
      <text:p text:style-name="P26">In the understanding of Tawheed:</text:p>
      <text:list text:style-name="L5">
        <text:list-item>
          <text:p text:style-name="P33"><text:span text:style-name="Strong_20_Emphasis">1 (One)</text:span> symbolizes belief in Allah alone</text:p>
        </text:list-item>
        <text:list-item>
          <text:p text:style-name="P33"><text:span text:style-name="Strong_20_Emphasis">0 (Zero)</text:span> symbolizes disbelief, Shirk, or rejection of Allah</text:p>
        </text:list-item>
      </text:list>
      <text:p text:style-name="P26"><text:soft-page-break/>Islam does not accept partial belief. Either a person affirms Tawheed completely or rejects it. Just as a computer system collapses if the binary code is corrupted, faith collapses when Tawheed is mixed with Shirk.</text:p>
      <text:p text:style-name="P26">Allah says:</text:p>
      <text:p text:style-name="P27"><text:span text:style-name="T10">وَلَوْ أَشْرَكُوا لَحَبِطَ عَنْهُم مَّا كَانُوا يَعْمَلُونَ</text:span> </text:p>
      <text:p text:style-name="P28"><text:span text:style-name="Emphasis">“If they associate others with Allah, all their deeds would be nullified.”</text:span><text:line-break/>(Qur’an 6:88)</text:p>
      <text:p text:style-name="P26">This concept teaches clarity in belief. A Muslim cannot believe in Allah and also rely on idols, saints, or false systems. Tawheed demands <text:span text:style-name="Strong_20_Emphasis">exclusive devotion</text:span>.</text:p>
      <text:p text:style-name="P26">Thus, the binary system reflects Islamic belief perfectly: <text:span text:style-name="Strong_20_Emphasis">Truth is One</text:span>, and anything against it is false. This understanding strengthens Eeman and helps Muslims remain firm upon pure Tawheed.</text:p>
      <text:p text:style-name="P23"><text:span text:style-name="Strong_20_Emphasis"><text:span text:style-name="T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3:39:23.193472400</meta:creation-date>
    <dc:date>2026-01-06T21:25:33.431676800</dc:date>
    <meta:editing-duration>PT1M46S</meta:editing-duration>
    <meta:editing-cycles>2</meta:editing-cycles>
    <meta:generator>LibreOffice/25.8.3.2$Windows_X86_64 LibreOffice_project/8ca8d55c161d602844f5428fa4b58097424e324e</meta:generator>
    <meta:document-statistic meta:table-count="0" meta:image-count="0" meta:object-count="0" meta:page-count="14" meta:paragraph-count="144" meta:word-count="2379" meta:character-count="14821" meta:non-whitespace-character-count="12566"/>
  </office:meta>
</office:document-meta>
</file>