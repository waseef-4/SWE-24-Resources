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d8120"/>
    </style:style>
    <style:style style:name="P2" style:family="paragraph" style:parent-style-name="Standard">
      <style:text-properties officeooo:paragraph-rsid="000ca73a"/>
    </style:style>
    <style:style style:name="P3" style:family="paragraph" style:parent-style-name="Standard">
      <style:text-properties style:font-name="Times New Roman" fo:font-size="16pt" officeooo:paragraph-rsid="000ca73a" style:font-size-asian="16pt" style:font-name-complex="Times New Roman1" style:font-size-complex="14pt"/>
    </style:style>
    <style:style style:name="P4" style:family="paragraph" style:parent-style-name="Standard">
      <style:text-properties style:font-name="Times New Roman" fo:font-size="16pt" style:font-size-asian="16pt" style:font-name-complex="Times New Roman1" style:font-size-complex="14pt"/>
    </style:style>
    <style:style style:name="P5" style:family="paragraph">
      <loext:graphic-properties draw:fill="solid" draw:fill-color="#a0a0a0"/>
      <style:paragraph-properties fo:text-align="center"/>
    </style:style>
    <style:style style:name="P6" style:family="paragraph" style:parent-style-name="Standard">
      <style:text-properties style:font-name="Times New Roman" fo:font-size="16pt" officeooo:paragraph-rsid="000f6e6a" style:font-size-asian="16pt" style:font-name-complex="Times New Roman1" style:font-size-complex="14pt"/>
    </style:style>
    <style:style style:name="P7" style:family="paragraph" style:parent-style-name="Standard">
      <style:text-properties officeooo:paragraph-rsid="000f835f"/>
    </style:style>
    <style:style style:name="P8" style:family="paragraph" style:parent-style-name="Heading_20_2">
      <style:text-properties style:font-name="Times New Roman" fo:font-size="16pt" fo:font-weight="bold" style:font-size-asian="16pt" style:font-weight-asian="bold" style:font-name-complex="Times New Roman1" style:font-size-complex="14pt" style:font-weight-complex="bold"/>
    </style:style>
    <style:style style:name="P9" style:family="paragraph" style:parent-style-name="Text_20_body">
      <style:paragraph-properties fo:margin-top="0in" fo:margin-bottom="0.111in" style:contextual-spacing="false" fo:line-height="108%"/>
      <style:text-properties style:font-name="Times New Roman" fo:font-size="16pt" fo:font-weight="bold" style:font-size-asian="16pt" style:font-weight-asian="bold" style:font-name-complex="Times New Roman1" style:font-size-complex="14pt" style:font-weight-complex="bold"/>
    </style:style>
    <style:style style:name="P10" style:family="paragraph" style:parent-style-name="Text_20_body">
      <style:paragraph-properties fo:margin-top="0in" fo:margin-bottom="0.111in" style:contextual-spacing="false" fo:line-height="108%"/>
      <style:text-properties style:font-name="Times New Roman" fo:font-size="18pt" fo:font-weight="normal" style:font-size-asian="18pt" style:font-weight-asian="normal" style:font-name-complex="Times New Roman1" style:font-size-complex="18pt" style:font-weight-complex="normal"/>
    </style:style>
    <style:style style:name="P11" style:family="paragraph" style:parent-style-name="Quotations">
      <style:paragraph-properties fo:margin-top="0in" fo:margin-bottom="0.111in" style:contextual-spacing="false"/>
      <style:text-properties style:font-name="Times New Roman" fo:font-size="16pt" fo:font-weight="bold" style:font-size-asian="16pt" style:font-weight-asian="bold" style:font-name-complex="Times New Roman1" style:font-size-complex="14pt" style:font-weight-complex="bold"/>
    </style:style>
    <style:style style:name="P12" style:family="paragraph" style:parent-style-name="Text_20_body">
      <style:paragraph-properties fo:margin-top="0in" fo:margin-bottom="0.111in" style:contextual-spacing="false" fo:line-height="108%"/>
      <style:text-properties style:font-name="Times New Roman" fo:font-size="16pt" fo:font-weight="normal" style:font-size-asian="16pt" style:font-weight-asian="normal" style:font-name-complex="Times New Roman1" style:font-size-complex="14pt" style:font-weight-complex="normal"/>
    </style:style>
    <style:style style:name="P13" style:family="paragraph" style:parent-style-name="Heading_20_3">
      <style:paragraph-properties fo:margin-top="0in" fo:margin-bottom="0.111in" style:contextual-spacing="false"/>
      <style:text-properties style:font-name="Times New Roman" fo:font-size="16pt" style:font-size-asian="16pt" style:font-name-complex="Times New Roman1"/>
    </style:style>
    <style:style style:name="P14" style:family="paragraph" style:parent-style-name="Text_20_body" style:list-style-name="L1">
      <style:paragraph-properties fo:margin-top="0in" fo:margin-bottom="0.111in" style:contextual-spacing="false" fo:line-height="108%"/>
      <style:text-properties officeooo:paragraph-rsid="00103e4b"/>
    </style:style>
    <style:style style:name="P15" style:family="paragraph" style:parent-style-name="Text_20_body" style:list-style-name="L1">
      <style:paragraph-properties fo:margin-top="0in" fo:margin-bottom="0.111in" style:contextual-spacing="false" fo:line-height="108%"/>
      <style:text-properties style:font-name="Times New Roman" fo:font-size="16pt" officeooo:paragraph-rsid="00103e4b" style:font-size-asian="16pt" style:font-name-complex="Times New Roman1" style:font-size-complex="14pt"/>
    </style:style>
    <style:style style:name="P16" style:family="paragraph" style:parent-style-name="Horizontal_20_Line">
      <style:paragraph-properties fo:margin-top="0in" fo:margin-bottom="0.111in" style:contextual-spacing="false"/>
      <style:text-properties style:font-name="Times New Roman" fo:font-size="16pt" fo:font-weight="normal" style:font-size-asian="16pt" style:font-weight-asian="normal" style:font-name-complex="Times New Roman1" style:font-size-complex="14pt" style:font-weight-complex="normal"/>
    </style:style>
    <style:style style:name="P17" style:family="paragraph" style:parent-style-name="Heading_20_2">
      <style:paragraph-properties fo:margin-top="0in" fo:margin-bottom="0.111in" style:contextual-spacing="false"/>
      <style:text-properties style:font-name="Times New Roman" fo:font-size="16pt" style:font-size-asian="16pt" style:font-name-complex="Times New Roman1" style:font-size-complex="14pt"/>
    </style:style>
    <style:style style:name="P18" style:family="paragraph" style:parent-style-name="Text_20_body">
      <style:paragraph-properties fo:margin-top="0in" fo:margin-bottom="0.111in" style:contextual-spacing="false" fo:line-height="108%"/>
      <style:text-properties style:font-name="Times New Roman" fo:font-size="16pt" officeooo:paragraph-rsid="0010e254" style:font-size-asian="16pt" style:font-name-complex="Times New Roman1"/>
    </style:style>
    <style:style style:name="P19" style:family="paragraph" style:parent-style-name="Text_20_body">
      <style:paragraph-properties fo:margin-top="0in" fo:margin-bottom="0.111in" style:contextual-spacing="false"/>
      <style:text-properties style:font-name="Times New Roman" fo:font-size="16pt" style:font-size-asian="16pt" style:font-name-complex="Times New Roman1" style:font-size-complex="14pt"/>
    </style:style>
    <style:style style:name="P20" style:family="paragraph" style:parent-style-name="Heading_20_2">
      <style:paragraph-properties fo:margin-top="0in" fo:margin-bottom="0.111in" style:contextual-spacing="false"/>
      <style:text-properties style:font-name="Times New Roman" fo:font-size="16pt" officeooo:paragraph-rsid="0010e254" style:font-size-asian="16pt" style:font-name-complex="Times New Roman1" style:font-size-complex="14pt"/>
    </style:style>
    <style:style style:name="P21" style:family="paragraph" style:parent-style-name="Text_20_body">
      <style:paragraph-properties fo:margin-top="0in" fo:margin-bottom="0.111in" style:contextual-spacing="false" fo:line-height="108%"/>
      <style:text-properties style:font-name="Times New Roman" fo:font-size="16pt" fo:font-weight="normal" officeooo:paragraph-rsid="00127216" style:font-size-asian="16pt" style:font-weight-asian="normal" style:font-name-complex="Times New Roman1" style:font-size-complex="14pt" style:font-weight-complex="normal"/>
    </style:style>
    <style:style style:name="P22" style:family="paragraph" style:parent-style-name="Text_20_body" style:list-style-name="L2">
      <style:paragraph-properties fo:margin-top="0in" fo:margin-bottom="0.111in" style:contextual-spacing="false" fo:line-height="108%"/>
      <style:text-properties style:font-name="Times New Roman" fo:font-size="16pt" fo:font-weight="bold" style:font-size-asian="16pt" style:font-weight-asian="bold" style:font-name-complex="Times New Roman1" style:font-size-complex="14pt" style:font-weight-complex="bold"/>
    </style:style>
    <style:style style:name="P23" style:family="paragraph" style:parent-style-name="Quotations">
      <style:paragraph-properties fo:margin-top="0in" fo:margin-bottom="0.111in" style:contextual-spacing="false"/>
      <style:text-properties style:font-name="Times New Roman" fo:font-size="16pt" fo:font-weight="normal" officeooo:paragraph-rsid="001214ba" style:font-size-asian="16pt" style:font-weight-asian="normal" style:font-name-complex="Times New Roman1" style:font-size-complex="14pt" style:font-weight-complex="normal"/>
    </style:style>
    <style:style style:name="P24" style:family="paragraph" style:parent-style-name="Text_20_body" style:list-style-name="L3">
      <style:paragraph-properties fo:margin-top="0in" fo:margin-bottom="0.111in" style:contextual-spacing="false" fo:line-height="108%"/>
      <style:text-properties style:font-name="Times New Roman" fo:font-size="16pt" fo:font-weight="bold" style:font-size-asian="16pt" style:font-weight-asian="bold" style:font-name-complex="Times New Roman1" style:font-size-complex="14pt" style:font-weight-complex="bold"/>
    </style:style>
    <style:style style:name="P25" style:family="paragraph" style:parent-style-name="Standard">
      <style:text-properties style:font-name="Times New Roman" fo:font-size="16pt" fo:font-weight="normal" style:font-size-asian="16pt" style:font-weight-asian="normal" style:font-name-complex="Times New Roman1" style:font-size-complex="14pt" style:font-weight-complex="normal"/>
    </style:style>
    <style:style style:name="T1" style:family="text">
      <style:text-properties style:font-name="Times New Roman" fo:font-size="16pt" fo:font-weight="bold" style:font-size-asian="16pt" style:font-weight-asian="bold" style:font-name-complex="Times New Roman1" style:font-size-complex="14pt" style:font-weight-complex="bold"/>
    </style:style>
    <style:style style:name="T2" style:family="text">
      <style:text-properties style:font-name="Times New Roman" fo:font-size="16pt" style:font-size-asian="16pt" style:font-name-complex="Times New Roman1" style:font-size-complex="14pt"/>
    </style:style>
    <style:style style:name="T3" style:family="text">
      <style:text-properties style:font-name="Times New Roman" fo:font-size="16pt" style:font-size-asian="16pt" style:font-name-complex="Times New Roman1" style:font-size-complex="16pt"/>
    </style:style>
    <style:style style:name="T4" style:family="text">
      <style:text-properties style:font-name="Times New Roman" fo:font-size="18pt" style:font-size-asian="18pt" style:font-name-complex="Times New Roman1" style:font-size-complex="18pt"/>
    </style:style>
    <style:style style:name="T5" style:family="text">
      <style:text-properties fo:font-family="Amiri" style:font-family-generic="roman" style:font-pitch="variable" fo:font-size="16pt" style:font-size-asian="16pt" style:font-family-complex="Amiri" style:font-family-generic-complex="system" style:font-pitch-complex="variable" style:font-size-complex="14pt"/>
    </style:style>
    <style:style style:name="T6" style:family="text">
      <style:text-properties style:font-name="Times New Roman" fo:font-size="16pt" officeooo:rsid="000d8120" style:font-size-asian="16pt" style:font-name-complex="Times New Roman1" style:font-size-complex="14pt"/>
    </style:style>
    <style:style style:name="T7" style:family="text">
      <style:text-properties fo:font-size="18pt" style:font-size-asian="18pt" style:font-size-complex="18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bold" style:font-weight-asian="bold" style:font-weight-complex="bold"/>
    </style:style>
    <style:style style:name="T12" style:family="text">
      <style:text-properties style:font-name="Times New Roman" fo:font-size="16pt" fo:font-style="normal" style:font-size-asian="16pt" style:font-style-asian="normal" style:font-name-complex="Times New Roman1" style:font-size-complex="14pt" style:font-style-complex="normal"/>
    </style:style>
    <style:style style:name="T13" style:family="text">
      <style:text-properties style:font-name="Times New Roman" fo:font-size="16pt" fo:font-style="normal" officeooo:rsid="00103e4b" style:font-size-asian="16pt" style:font-style-asian="normal" style:font-name-complex="Times New Roman1" style:font-size-complex="14pt" style:font-style-complex="normal"/>
    </style:style>
    <style:style style:name="T14" style:family="text">
      <style:text-properties style:font-name="Times New Roman" fo:font-size="16pt" fo:font-style="normal" fo:font-weight="normal" style:font-size-asian="16pt" style:font-style-asian="normal" style:font-weight-asian="normal" style:font-name-complex="Times New Roman1" style:font-size-complex="14pt" style:font-style-complex="normal" style:font-weight-complex="normal"/>
    </style:style>
    <style:style style:name="T15" style:family="text">
      <style:text-properties style:font-name="Times New Roman" fo:font-size="16pt" fo:font-weight="normal" style:font-size-asian="16pt" style:font-weight-asian="normal" style:font-name-complex="Times New Roman1" style:font-size-complex="14pt" style:font-weight-complex="normal"/>
    </style:style>
    <style:style style:name="T16" style:family="text">
      <style:text-properties fo:font-weight="normal" style:font-weight-asian="normal" style:font-size-complex="14pt"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fo:font-weight="normal" style:font-weight-asian="normal" style:font-size-complex="16pt" style:font-weight-complex="normal"/>
    </style:style>
    <style:style style:name="T21" style:family="text">
      <style:text-properties fo:font-weight="normal" officeooo:rsid="0013391c"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1. Difference Between Islam and Eemaan</text:span><text:span text:style-name="T1"/></text:p>
      <text:p text:style-name="P1" loext:marker-style-name="T2"><text:span text:style-name="T2">Islam and Eemaan are two closely related concepts in Islam, but they are not the same. Islam refers to outward actions, while Eemaan refers to inner belief. This difference is clearly explained in the famous Hadith of Jibreel.<text:line-break/></text:span><text:span text:style-name="T2">Islam means submission to Allah through visible actions. These actions include Shahadah, Salah, Zakah, Fasting in Ramadan, and Hajj. The Prophet Muhammad (ﷺ) said:</text:span></text:p>
      <text:p text:style-name="P2" loext:marker-style-name="T2"><text:span text:style-name="T2"><text:line-break/></text:span><text:span text:style-name="T3">ا</text:span><text:span text:style-name="T4">لإِسْلَامُ أَنْ تَشْهَدَ أَنْ لَا إِلَهَ إِلَّا اللهُ وَأَنَّ مُحَمَّدًا رَسُولُ اللهِ صَلَّى اللهُ عَلَيْهِ وَسَلَّمَ، وَتُقِيمَ الصَّلَاةَ، وَتُؤْتِيَ الزَّكَاةَ، وَتَصُومَ رَمَضَانَ، وَتَحُجَّ الْبَيْتَ إِنِ اسْتَطَعْتَ إِلَيْهِ سَبِيلًا</text:span><text:span text:style-name="T2"><text:line-break/>“Islam is to testify that there is no god except Allah and Muhammad is the Messenger of Allah, to establish prayer, give zakah, fast in Ramadan, and perform Hajj.”<text:line-break/>(Sahih Muslim)</text:span></text:p>
      <text:p text:style-name="Standard" loext:marker-style-name="T5"><text:span text:style-name="T2">Eemaan, on the other hand, is related to belief of the heart. It includes belief in Allah, His angels, His books, His messengers, the Last Day, and Divine </text:span><text:span text:style-name="T6">Preordainment</text:span><text:span text:style-name="T2"> (Qadar). The Prophet (ﷺ) said:<text:line-break/><text:line-break/></text:span><text:span text:style-name="T4">أَنْ تُؤْمِنَ بِاللهِ، وَمَلَائِكَتِهِ، وَكُتُبِهِ، وَرُسُلِهِ، وَالْيَوْمِ الْآخِرِ، وَالْقَدَرِ خَيْرِهِ وَشَرِّهِ</text:span><text:span text:style-name="T2"><text:line-break/>“Eemaan is to believe in Allah, His angels, His books, His messengers, the Last Day, and destiny, both good and bad.”<text:line-break/>(Sahih Muslim)</text:span></text:p>
      <text:p text:style-name="P3" loext:marker-style-name="T2">The Qur’an also highlights this difference. Allah says:</text:p>
      <text:p text:style-name="P2" loext:marker-style-name="T2"><text:span text:style-name="T2"><text:line-break/></text:span><text:span text:style-name="T4">۞ قَالَتِ الْأَعْرَابُ آمَنَّا ۖ قُل لَّمْ تُؤْمِنُوا وَلَٰكِن قُولُوا أَسْلَمْنَا وَلَمَّا يَدْخُلِ الْإِيمَانُ فِي قُلُوبِكُمْ ۖ وَإِن تُطِيعُوا اللَّهَ وَرَسُولَهُ لَا يَلِتْكُم مِّنْ أَعْمَالِكُمْ شَيْئًا ۚ إِنَّ اللَّهَ غَفُورٌ رَّحِيمٌ </text:span><text:span text:style-name="T2"><text:line-break/>“The Bedouins say, ‘We have believed.’ Say, ‘You have not believed; rather, say, “We have submitted,” for faith has not yet entered your hearts. But if you obey Allah and His Messenger, He will not deprive </text:span><text:soft-page-break/><text:span text:style-name="T2">you of anything from your deeds. Indeed, Allah is All-Forgiving, Most Merciful.’”<text:line-break/>(Qur’an 49:14)</text:span></text:p>
      <text:p text:style-name="Standard" loext:marker-style-name="T2"><text:span text:style-name="T2">Thus, Islam is related to physical deeds, while Eemaan is related to faith and belief. A person may appear Muslim outwardly but may lack strong Eemaan. However, complete Islam requires both Islam and Eemaan together.</text:span><text:span text:style-name="T2"/></text:p>
      <text:p text:style-name="P4" loext:marker-style-name="T2"/>
      <text:p text:style-name="P4" loext:marker-style-name="T2"/>
      <text:p text:style-name="Standard" loext:marker-style-name="T2"><draw:rect text:anchor-type="as-char" style:rel-width="100%" draw:z-index="0" draw:style-name="gr1" draw:text-style-name="P5" svg:width="6.5004in" svg:height="0.0213in"><text:p/></draw:rect></text:p>
      <text:p text:style-name="Standard" loext:marker-style-name="T1"><text:span text:style-name="T1">2. Difference Between رب (Rabb) and إله (Ilah)</text:span><text:span text:style-name="T1"/></text:p>
      <text:p text:style-name="Standard" loext:marker-style-name="T2"><text:span text:style-name="T2">The words </text:span><text:span text:style-name="T1">Rabb</text:span><text:span text:style-name="T2"> and </text:span><text:span text:style-name="T1">Ilah</text:span><text:span text:style-name="T2"> are often misunderstood, though both relate to Allah. Rabb means Lord, Sustainer, and Controller, while Ilah means the One who is worshipped.</text:span></text:p>
      <text:p text:style-name="Standard" loext:marker-style-name="T2"><text:span text:style-name="T2">Rabb refers to Allah’s Lordship (Rububiyyah). It includes creation, control, provision, life and death. Allah says:<text:line-break/>“All praise is for Allah, Rabb of the worlds.”<text:line-break/>(Qur’an 1:2)</text:span><text:span text:style-name="T2"/></text:p>
      <text:p text:style-name="Standard" loext:marker-style-name="T2"><text:span text:style-name="T2">Ilah refers to worship and devotion (Uluhiyyah). It means the only being worthy of worship. Allah says:<text:line-break/>“There is no Ilah except Allah.”<text:line-break/>(Qur’an 47:19)</text:span><text:span text:style-name="T2"/></text:p>
      <text:p text:style-name="Standard" loext:marker-style-name="T2"><text:span text:style-name="T2">These two words cannot be replaced with each other because their meanings are different. In </text:span><text:span text:style-name="T1">Alhamdulillahi Rabbil ‘Alameen</text:span><text:span text:style-name="T2">, Rabb is correct because the verse is praising Allah as the Sustainer of all worlds. Using Ilah here would ignore the meaning of Lordship.</text:span></text:p>
      <text:p text:style-name="Standard" loext:marker-style-name="T2"><text:soft-page-break/><text:span text:style-name="T2">Similarly, in </text:span><text:span text:style-name="T1">La ilaha illallah</text:span><text:span text:style-name="T2">, Ilah is essential because it declares exclusive worship to Allah. Replacing Ilah with Rabb would not reject false gods properly.</text:span></text:p>
      <text:p text:style-name="P6" loext:marker-style-name="T2">The Qur’an explains that even disbelievers accepted Allah as Rabb but not as Ilah:<text:line-break/><text:span text:style-name="T7"><text:line-break/>وَلَئِن سَأَلْتَهُم مَّنْ خَلَقَ السَّمَاوَاتِ وَالْأَرْضَ لَيَقُولُنَّ اللَّهُ ۚ قُلِ الْحَمْدُ لِلَّهِ ۚ بَلْ أَكْثَرُهُمْ لَا يَعْلَمُونَ</text:span><text:line-break/>"And if you ask them who created the heavens and the earth, they will surely say, 'Allah.' Say, '[All] praise is [due] to Allah'; but most of them do not know."<text:line-break/>(Qur’an 31:25)</text:p>
      <text:p text:style-name="Standard" loext:marker-style-name="T2"><text:span text:style-name="T2">So, Rabb focuses on authority and control, while Ilah focuses on worship. Both are essential but cannot replace one another.</text:span><text:span text:style-name="T2"/></text:p>
      <text:p text:style-name="P4" loext:marker-style-name="T2"/>
      <text:p text:style-name="Standard" loext:marker-style-name="T2"><draw:rect text:anchor-type="as-char" style:rel-width="100%" draw:z-index="1" draw:style-name="gr1" draw:text-style-name="P5" svg:width="6.5004in" svg:height="0.0213in"><text:p/></draw:rect></text:p>
      <text:p text:style-name="Standard" loext:marker-style-name="T1"><text:span text:style-name="T1">3. Tawheed Believed by Ancient Mushrikeen</text:span><text:span text:style-name="T1"/></text:p>
      <text:p text:style-name="Standard" loext:marker-style-name="T2"><text:span text:style-name="T2">The Mushrikeen of ancient times believed in </text:span><text:span text:style-name="T1">Tawheed ar-Rububiyyah</text:span><text:span text:style-name="T2"> but rejected </text:span><text:span text:style-name="T1">Tawheed al-Uluhiyyah</text:span><text:span text:style-name="T2">. They accepted Allah as the Creator and Sustainer but worshipped others besides Him.</text:span></text:p>
      <text:p text:style-name="P7" loext:marker-style-name="T2"><text:span text:style-name="T2">Allah says:<text:line-break/></text:span><text:span text:style-name="T4"><text:line-break/>وَلَئِن سَأَلْتَهُم مَّنْ خَلَقَ السَّمَاوَاتِ وَالْأَرْضَ لَيَقُولُنَّ اللَّهُ ۚ قُلِ الْحَمْدُ لِلَّهِ ۚ بَلْ أَكْثَرُهُمْ لَا يَعْلَمُونَ</text:span><text:span text:style-name="T2"><text:line-break/>"And if you ask them who created the heavens and the earth, they will surely say, 'Allah.' Say, '[All] praise is [due] to Allah'; but most of them do not know."<text:line-break/>(Qur’an 31:25)</text:span></text:p>
      <text:p text:style-name="P7" loext:marker-style-name="T2"><text:soft-page-break/><text:span text:style-name="T2">This shows they believed Allah was Rabb. However, they prayed to idols, saints, and angels as intermediaries. Allah says:<text:line-break/></text:span><text:span text:style-name="T2"><text:line-break/> <text:s text:c="55"/></text:span><text:span text:style-name="T4">وَمَا يُؤْمِنُ أَكْثَرُهُم بِاللَّهِ إِلَّا وَهُم مُّشْرِكُونَ</text:span><text:span text:style-name="T2"><text:line-break/>“And most of them believe in Allah except while associating partners with Him.”<text:line-break/>(Qur’an 12:106)</text:span></text:p>
      <text:p text:style-name="P7" loext:marker-style-name="T2"><text:span text:style-name="T2">This belief had no value for them in the Hereafter because worship must be for Allah alone. Allah clearly states:</text:span><text:span text:style-name="T2"><text:line-break/> <text:s text:c="72"/></text:span><text:span text:style-name="T4">إِنَّ اللَّهَ لَا يَغْفِرُ أَن يُشْرَكَ بِهِ</text:span><text:span text:style-name="T2"><text:line-break/>“Indeed, Allah does not forgive associating partners with Him.”<text:line-break/>(Qur’an 4:48)</text:span></text:p>
      <text:p text:style-name="Standard" loext:marker-style-name="T2"><text:span text:style-name="T2">The Prophet (ﷺ) fought against shirk, even though the Arabs accepted Allah as Creator. This proves that belief in Rububiyyah alone is not enough.</text:span><text:span text:style-name="T2"/></text:p>
      <text:p text:style-name="Standard" loext:marker-style-name="T2"><text:span text:style-name="T2">True success requires belief in Rububiyyah and Uluhiyyah together. The Mushrikeen failed because they did not direct worship solely to Allah. Therefore, their belief did not save them from punishment in the Hereafter.</text:span><text:span text:style-name="T2"/></text:p>
      <text:p text:style-name="P4" loext:marker-style-name="T2"/>
      <text:p text:style-name="P4" loext:marker-style-name="T2"/>
      <text:p text:style-name="P4" loext:marker-style-name="T2"/>
      <text:p text:style-name="Standard" loext:marker-style-name="T2"><draw:rect text:anchor-type="as-char" style:rel-width="100%" draw:z-index="2" draw:style-name="gr1" draw:text-style-name="P5" svg:width="6.5004in" svg:height="0.0213in"><text:p/></draw:rect></text:p>
      <text:h text:style-name="P8" text:outline-level="2"><text:span text:style-name="Strong_20_Emphasis"><text:span text:style-name="T8">Q4. Which is the Root of All Tawheed and What are the Components of Tawheedul Uluhiyyah?</text:span></text:span></text:h>
      <text:p text:style-name="P9"><text:span text:style-name="T9">The root of all forms of Tawheed is </text:span><text:span text:style-name="Strong_20_Emphasis"><text:span text:style-name="T9">Tawheed-ur-Rububiyyah</text:span></text:span><text:span text:style-name="T9">, which means believing in the </text:span><text:span text:style-name="Strong_20_Emphasis"><text:span text:style-name="T9">Oneness of Allah in His Lordship</text:span></text:span><text:span text:style-name="T9">. This includes believing that Allah alone is the Creator, Sustainer, Controller, and Owner of everything in the universe. The Qur’an states:</text:span></text:p>
      <text:p text:style-name="P10"><text:soft-page-break/><text:s text:c="36"/>أَلَا لَهُ الْخَلْقُ وَالْأَمْرُ</text:p>
      <text:p text:style-name="P11"><text:span text:style-name="Emphasis"><text:span text:style-name="T9">“His is the creation and His is the command.”</text:span></text:span><text:span text:style-name="T9"> (Qur’an 7:54)</text:span></text:p>
      <text:p text:style-name="P9"><text:span text:style-name="T9">However, Tawheed-ur-Rububiyyah alone is </text:span><text:span text:style-name="Strong_20_Emphasis"><text:span text:style-name="T9">not sufficient for salvation</text:span></text:span><text:span text:style-name="T9">. The Mushrikeen of Makkah also believed in Allah as Creator, yet they were not considered believers. This shows that the </text:span><text:span text:style-name="Strong_20_Emphasis"><text:span text:style-name="T9">practical and most important form of Tawheed is Tawheed-ul-Uluhiyyah</text:span></text:span><text:span text:style-name="T9">, which means </text:span><text:span text:style-name="Strong_20_Emphasis"><text:span text:style-name="T9">Oneness of Allah in worship</text:span></text:span><text:span text:style-name="T9">.</text:span></text:p>
      <text:p text:style-name="P9"><text:span text:style-name="Strong_20_Emphasis"><text:span text:style-name="T9">Tawheed-ul-Uluhiyyah</text:span></text:span><text:span text:style-name="T9"> refers to directing </text:span><text:span text:style-name="Strong_20_Emphasis"><text:span text:style-name="T9">all acts of worship</text:span></text:span><text:span text:style-name="T9"> exclusively to Allah. Allah says:</text:span></text:p>
      <text:p text:style-name="P12"><text:span text:style-name="T7"><text:s text:c="28"/>وَمَا خَلَقْتُ الْجِنَّ وَالْإِنسَ إِلَّا لِيَعْبُدُونِ <text:s/></text:span><text:s/></text:p>
      <text:p text:style-name="P11"><text:span text:style-name="Emphasis"><text:span text:style-name="T9">“I did not create jinn and mankind except to worship Me.”</text:span></text:span><text:span text:style-name="T9"> (Qur’an 51:56)<text:line-break/></text:span></text:p>
      <text:h text:style-name="P13" text:outline-level="3"><text:span text:style-name="Strong_20_Emphasis"><text:span text:style-name="T10">Components of Tawheed-ul-Uluhiyyah</text:span></text:span><text:span text:style-name="Strong_20_Emphasis"><text:span text:style-name="T11">:</text:span></text:span></text:h>
      <text:p text:style-name="P12">According to the course material, the main components are:</text:p>
      <text:list text:style-name="L1">
        <text:list-item>
          <text:p text:style-name="P14"><text:span text:style-name="Emphasis"><text:span text:style-name="Strong_20_Emphasis"><text:span text:style-name="T12">Love </text:span></text:span></text:span><text:span text:style-name="Emphasis"><text:span text:style-name="Strong_20_Emphasis"><text:span text:style-name="T13">(المحبة)</text:span></text:span></text:span><text:span text:style-name="Emphasis"><text:span text:style-name="Strong_20_Emphasis"><text:span text:style-name="T12">:</text:span></text:span></text:span><text:span text:style-name="Emphasis"><text:span text:style-name="T14"> Loving Allah more than anything else</text:span></text:span><text:span text:style-name="Emphasis"><text:span text:style-name="T15"><text:line-break/>(Qur’an 2:165) </text:span></text:span></text:p>
        </text:list-item>
        <text:list-item>
          <text:p text:style-name="P15"><text:span text:style-name="Strong_20_Emphasis">Fear (الخوف):</text:span> Fearing Allah alone in matters beyond human control<text:line-break/><text:span text:style-name="Emphasis">(Qur’an 16:51)</text:span></text:p>
        </text:list-item>
        <text:list-item>
          <text:p text:style-name="P15"><text:span text:style-name="Strong_20_Emphasis">Hope (الرجاء):</text:span> Hoping only in Allah’s mercy</text:p>
        </text:list-item>
        <text:list-item>
          <text:p text:style-name="P15"><text:span text:style-name="Strong_20_Emphasis">Supplication (الدعاء):</text:span> Asking help only from Allah<text:line-break/><text:span text:style-name="Emphasis">(Qur’an 40:60)</text:span></text:p>
        </text:list-item>
        <text:list-item>
          <text:p text:style-name="P15"><text:span text:style-name="Strong_20_Emphasis">Reliance (التوكل):</text:span> Trusting Allah completely<text:line-break/><text:span text:style-name="Emphasis">(Qur’an 5:23)</text:span></text:p>
        </text:list-item>
        <text:list-item>
          <text:p text:style-name="P15"><text:span text:style-name="Strong_20_Emphasis">Obedience (الطاعة):</text:span> Following Allah’s commands sincerely</text:p>
        </text:list-item>
        <text:list-item>
          <text:p text:style-name="P15"><text:soft-page-break/><text:span text:style-name="Strong_20_Emphasis">Subservience (العبودية):</text:span> Showing complete humility and devotion to Allah alone</text:p>
        </text:list-item>
        <text:list-item>
          <text:p text:style-name="P15"><text:span text:style-name="Strong_20_Emphasis">Submission (الاستسلام):</text:span> Fully surrendering to the will and judgment of Allah</text:p>
        </text:list-item>
        <text:list-item>
          <text:p text:style-name="P15"><text:span text:style-name="Strong_20_Emphasis">All types and forms of Worship (جميع أنواع العبادة):</text:span> Directing every form of worship—physical and verbal—only to Allah</text:p>
        </text:list-item>
      </text:list>
      <text:p text:style-name="P9"><text:span text:style-name="T9">All physical worship (prayer, fasting, sacrifice, Hajj) and verbal worship (du‘a, vows, seeking forgiveness) must be </text:span><text:span text:style-name="Strong_20_Emphasis"><text:span text:style-name="T9">only for Allah</text:span></text:span><text:span text:style-name="T9">. Associating partners in worship is </text:span><text:span text:style-name="Strong_20_Emphasis"><text:span text:style-name="T9">Shirk</text:span></text:span><text:span text:style-name="T9">, which Allah does not forgive if one dies without repentance </text:span><text:span text:style-name="Emphasis"><text:span text:style-name="T9">(Qur’an 4:116)</text:span></text:span><text:span text:style-name="T9">.</text:span></text:p>
      <text:p text:style-name="P16"/>
      <text:h text:style-name="P17" text:outline-level="2"><text:span text:style-name="Strong_20_Emphasis"><text:span text:style-name="T8">Q5. Illustrate the elements should be avoided in Tawheed-ul-Asma’ was Sifaat with their Arabic names.</text:span></text:span></text:h>
      <text:p text:style-name="P9"><text:span text:style-name="Strong_20_Emphasis"><text:span text:style-name="T9">Tawheed-ul-Asma’ was Sifaat</text:span></text:span><text:span text:style-name="T9"> means believing in the </text:span><text:span text:style-name="Strong_20_Emphasis"><text:span text:style-name="T9">Names and Attributes of Allah</text:span></text:span><text:span text:style-name="T9"> exactly as mentioned in the Qur’an and authentic Sunnah, </text:span><text:span text:style-name="Strong_20_Emphasis"><text:span text:style-name="T9">without distortion, comparison, or denial</text:span></text:span><text:span text:style-name="T9">. Allah says:</text:span></text:p>
      <text:p text:style-name="P10"><text:s text:c="26"/>لَيْسَ كَمِثْلِهِ شَيْءٌ ۖ وَهُوَ السَّمِيعُ الْبَصِيرُ </text:p>
      <text:p text:style-name="P11"><text:span text:style-name="Emphasis"><text:span text:style-name="T9">“There is nothing like Him, and He is the All-Hearing, the All-Seeing.”</text:span></text:span><text:span text:style-name="T9"> (Qur’an 42:11)</text:span></text:p>
      <text:p text:style-name="P18"><text:span text:style-name="T16">To protect pure belief, Islam clearly mentions </text:span><text:span text:style-name="Strong_20_Emphasis"><text:span text:style-name="T16">elements that must be avoided</text:span></text:span><text:span text:style-name="T16">:</text:span></text:p>
      <text:p text:style-name="P18"><text:span text:style-name="Strong_20_Emphasis"><text:span text:style-name="T9">1.</text:span></text:span><text:span text:style-name="Strong_20_Emphasis"><text:span text:style-name="T8"> </text:span></text:span><text:span text:style-name="Strong_20_Emphasis"><text:span text:style-name="T17">Tashbeeh (</text:span></text:span><text:span text:style-name="Strong_20_Emphasis"><text:span text:style-name="T18">تشبيه</text:span></text:span><text:span text:style-name="Strong_20_Emphasis"><text:span text:style-name="T17"> – Comparison)</text:span></text:span><text:span text:style-name="Strong_20_Emphasis"><text:span text:style-name="T19">:<text:line-break/></text:span></text:span><text:span text:style-name="T16">Comparing Allah’s attributes with those of His creation.<text:line-break/>Example: Saying Allah’s knowledge is like human knowledge.<text:line-break/>This is wrong because Allah is </text:span><text:span text:style-name="Strong_20_Emphasis"><text:span text:style-name="T16">unique and perfect</text:span></text:span><text:span text:style-name="T16">.</text:span></text:p>
      <text:h text:style-name="P13" text:outline-level="3"><text:soft-page-break/><text:span text:style-name="Strong_20_Emphasis"><text:span text:style-name="T9">2. </text:span></text:span><text:span text:style-name="Strong_20_Emphasis"><text:span text:style-name="T17">Tahreef (</text:span></text:span><text:span text:style-name="Strong_20_Emphasis"><text:span text:style-name="T20">تحريف</text:span></text:span><text:span text:style-name="Strong_20_Emphasis"><text:span text:style-name="T17"> – Distortion)</text:span></text:span><text:span text:style-name="Strong_20_Emphasis"><text:span text:style-name="T19">:<text:line-break/></text:span></text:span><text:span text:style-name="T16">Changing or misinterpreting the meanings of Allah’s Names and Attributes.<text:line-break/>Example: Explaining Allah’s attributes symbolically without evidence.</text:span></text:h>
      <text:h text:style-name="P13" text:outline-level="3"><text:span text:style-name="Strong_20_Emphasis"><text:span text:style-name="T9">3. </text:span></text:span><text:span text:style-name="Strong_20_Emphasis"><text:span text:style-name="T17">Ta‘teel (</text:span></text:span><text:span text:style-name="Strong_20_Emphasis"><text:span text:style-name="T20">تعطيل</text:span></text:span><text:span text:style-name="Strong_20_Emphasis"><text:span text:style-name="T17"> – Negation)</text:span></text:span><text:span text:style-name="Strong_20_Emphasis"><text:span text:style-name="T9">:<text:line-break/></text:span></text:span><text:span text:style-name="T16">Denying Allah’s attributes completely.<text:line-break/>Example: Saying Allah does not have attributes mentioned in the Qur’an.</text:span></text:h>
      <text:h text:style-name="P13" text:outline-level="3"><text:span text:style-name="Strong_20_Emphasis"><text:span text:style-name="T9">4. </text:span></text:span><text:span text:style-name="Strong_20_Emphasis"><text:span text:style-name="T17">Takyeef (</text:span></text:span><text:span text:style-name="Strong_20_Emphasis"><text:span text:style-name="T20">تكييف</text:span></text:span><text:span text:style-name="Strong_20_Emphasis"><text:span text:style-name="T17"> – Asking “How”)</text:span></text:span><text:span text:style-name="Strong_20_Emphasis"><text:span text:style-name="T9">:<text:line-break/></text:span></text:span><text:span text:style-name="T16">Trying to describe </text:span><text:span text:style-name="Strong_20_Emphasis"><text:span text:style-name="T16">how</text:span></text:span><text:span text:style-name="T16"> Allah’s attributes are.<text:line-break/>Example: Asking “How does Allah hear?”<text:line-break/>The correct approach is to believe </text:span><text:span text:style-name="Strong_20_Emphasis"><text:span text:style-name="T16">without questioning the nature</text:span></text:span><text:span text:style-name="T16">.</text:span></text:h>
      <text:p text:style-name="P12">Allah says:</text:p>
      <text:p text:style-name="P10"><text:s text:c="28"/>وَلِلَّهِ الْأَسْمَاءُ الْحُسْنَىٰ فَادْعُوهُ بِهَا <text:s text:c="3"/></text:p>
      <text:p text:style-name="P11"><text:span text:style-name="Emphasis"><text:span text:style-name="T9">“And to Allah belong the best names, so call upon Him by them.”</text:span></text:span><text:span text:style-name="T9"> (Qur’an 7:180)</text:span></text:p>
      <text:p text:style-name="P9"><text:span text:style-name="T9">The Prophet ﷺ warned against incorrect belief by teaching the companions to accept Allah’s attributes </text:span><text:span text:style-name="Strong_20_Emphasis"><text:span text:style-name="T9">as they are</text:span></text:span><text:span text:style-name="T9">, without alteration or imagination.</text:span></text:p>
      <text:p text:style-name="P9"><text:span text:style-name="T9">Avoiding these four elements protects a Muslim from deviation and preserves the </text:span><text:span text:style-name="Strong_20_Emphasis"><text:span text:style-name="T9">purity of Eemaan.</text:span></text:span></text:p>
      <text:p text:style-name="P16"/>
      <text:h text:style-name="P17" text:outline-level="2"/>
      <text:p text:style-name="P19"/>
      <text:h text:style-name="P20" text:outline-level="2"><text:soft-page-break/><text:span text:style-name="Strong_20_Emphasis"><text:span text:style-name="T8">Q6. Describe the Significance of Memorizing 99 Names of Allah (SWT) with a significant exam ple.</text:span></text:span></text:h>
      <text:p text:style-name="P9"><text:span text:style-name="T9">Memorizing and understanding the </text:span><text:span text:style-name="Strong_20_Emphasis"><text:span text:style-name="T9">99 Names of Allah (Al-Asma-ul-Husna)</text:span></text:span><text:span text:style-name="T9"> has great spiritual importance in Islam. Allah says:</text:span></text:p>
      <text:p text:style-name="P10"><text:s text:c="25"/>اللَّهُ لَا إِلَهَ إِلَّا هُوَ لَهُ الْأَسْمَاءُ الْحُسْنَى</text:p>
      <text:p text:style-name="P11"><text:span text:style-name="Emphasis"><text:span text:style-name="T9">“Allah—there is no deity except Him. To Him belong the best names.”</text:span></text:span><text:span text:style-name="T9"> (Qur’an 20:8)</text:span></text:p>
      <text:p text:style-name="P21">The Prophet Muhammad ﷺ said:</text:p>
      <text:p text:style-name="P21"><text:s text:c="27"/><text:span text:style-name="T7">إِنَّ لِلَّهِ تِسْعَةً وَتِسْعِينَ اسْمًا مَنْ أَحْصَاهَا دَخَلَ الْجَنَّةَ</text:span></text:p>
      <text:p text:style-name="P11"><text:span text:style-name="Emphasis"><text:span text:style-name="T9">“Allah has ninety-nine names; whoever memorizes them will enter Paradise.”</text:span></text:span><text:span text:style-name="T9"> (Bukhari)</text:span></text:p>
      <text:p text:style-name="P9"><text:span text:style-name="T9">This hadith does not mean only memorizing the names verbally, but also </text:span><text:span text:style-name="Strong_20_Emphasis"><text:span text:style-name="T9">understanding their meanings and applying them in daily life</text:span></text:span><text:span text:style-name="T9">.</text:span></text:p>
      <text:h text:style-name="P13" text:outline-level="3"><text:span text:style-name="Strong_20_Emphasis"><text:span text:style-name="T9">Significance</text:span></text:span></text:h>
      <text:list text:style-name="L2">
        <text:list-item>
          <text:p text:style-name="P22"><text:span text:style-name="Strong_20_Emphasis"><text:span text:style-name="T9">Strengthens Eemaan:</text:span></text:span><text:span text:style-name="T9"> Knowing Allah’s attributes increases faith and certainty.</text:span></text:p>
        </text:list-item>
        <text:list-item>
          <text:p text:style-name="P22"><text:span text:style-name="Strong_20_Emphasis"><text:span text:style-name="T9">Improves Worship:</text:span></text:span><text:span text:style-name="T9"> A believer worships Allah with more awareness and sincerity.</text:span></text:p>
        </text:list-item>
        <text:list-item>
          <text:p text:style-name="P22"><text:span text:style-name="Strong_20_Emphasis"><text:span text:style-name="T9">Builds Strong Character:</text:span></text:span><text:span text:style-name="T9"> Allah’s names inspire good qualities like mercy, patience, and justice.</text:span></text:p>
        </text:list-item>
        <text:list-item>
          <text:p text:style-name="P22"><text:span text:style-name="Strong_20_Emphasis"><text:span text:style-name="T9">Enhances Du‘a:</text:span></text:span><text:span text:style-name="T9"> Calling Allah using relevant names makes supplication more meaningful.</text:span></text:p>
        </text:list-item>
      </text:list>
      <text:h text:style-name="P13" text:outline-level="3"><text:span text:style-name="Strong_20_Emphasis"><text:span text:style-name="T9">Example</text:span></text:span></text:h>
      <text:p text:style-name="P9"><text:span text:style-name="T9">When a believer knows Allah is </text:span><text:span text:style-name="Strong_20_Emphasis"><text:span text:style-name="T9">Ar-Rahman (The Most Merciful)</text:span></text:span><text:span text:style-name="T9">, he never loses hope, even after committing sins. He turns back to Allah in repentance.<text:line-break/></text:span><text:soft-page-break/><text:span text:style-name="T9">When he knows Allah is </text:span><text:span text:style-name="Strong_20_Emphasis"><text:span text:style-name="T9">Al-‘Adl (The Most Just)</text:span></text:span><text:span text:style-name="T9">, he avoids injustice and treats others fairly.</text:span></text:p>
      <text:p text:style-name="P12">Allah commands:</text:p>
      <text:p text:style-name="P12"><text:s text:c="38"/><text:span text:style-name="T7">وَلِلَّهِ الْأَسْمَاءُ الْحُسْنَىٰ فَادْعُوهُ بِهَا </text:span></text:p>
      <text:p text:style-name="P11"><text:span text:style-name="Emphasis"><text:span text:style-name="T9">“And to Allah belong the best names, so invoke Him by them”</text:span></text:span><text:span text:style-name="T9"> (Qur’an 7:180)</text:span></text:p>
      <text:p text:style-name="P9"><text:span text:style-name="T9">Thus, memorizing the 99 names connects the believer’s heart with Allah, improves conduct, and leads to success in both </text:span><text:span text:style-name="Strong_20_Emphasis"><text:span text:style-name="T9">Dunya and Akhirah</text:span></text:span><text:span text:style-name="T9">.</text:span></text:p>
      <text:p text:style-name="P16"/>
      <text:h text:style-name="P17" text:outline-level="2"><text:span text:style-name="Strong_20_Emphasis"><text:span text:style-name="T8">Q7. Draw the Importance of Eemaan in Al-Qadaa’ wal Qadar (Divine Preordainment) in Islam.</text:span></text:span></text:h>
      <text:p text:style-name="P9"><text:span text:style-name="Strong_20_Emphasis"><text:span text:style-name="T9">Eemaan in Al-Qadaa’ wal Qadar</text:span></text:span><text:span text:style-name="T9"> means believing that </text:span><text:span text:style-name="Strong_20_Emphasis"><text:span text:style-name="T9">everything happens by Allah’s knowledge, will, and wisdom</text:span></text:span><text:span text:style-name="T9">, whether good or bad. It is one of the </text:span><text:span text:style-name="Strong_20_Emphasis"><text:span text:style-name="T9">six pillars of Eemaan</text:span></text:span><text:span text:style-name="T9">, as mentioned in the famous Hadith of Jibreel (Muslim).</text:span></text:p>
      <text:p text:style-name="P9"><text:span text:style-name="T9">The Prophet ﷺ said that true faith includes belief in </text:span><text:span text:style-name="Strong_20_Emphasis"><text:span text:style-name="T9">Qadar, both its good and evil</text:span></text:span><text:span text:style-name="T9">.</text:span></text:p>
      <text:p text:style-name="P12">Allah says:</text:p>
      <text:p text:style-name="P12"><text:s text:c="44"/><text:span text:style-name="T7">إِنَّا كُلَّ شَيْءٍ خَلَقْنَاهُ بِقَدَرٍ</text:span></text:p>
      <text:p text:style-name="P23"><text:span text:style-name="Emphasis">“Indeed, We have created everything according to a measure.”</text:span> (Qur’an 54:49) </text:p>
      <text:h text:style-name="P13" text:outline-level="3"><text:span text:style-name="Strong_20_Emphasis"><text:span text:style-name="T9">Importance of Believing in Qadar</text:span></text:span></text:h>
      <text:list text:style-name="L3">
        <text:list-item>
          <text:p text:style-name="P24"><text:span text:style-name="Strong_20_Emphasis"><text:span text:style-name="T9">Gives Mental Peace:</text:span></text:span><text:span text:style-name="T9"> A believer remains calm during hardship, knowing Allah is in control.</text:span></text:p>
        </text:list-item>
        <text:list-item>
          <text:p text:style-name="P24"><text:soft-page-break/><text:span text:style-name="Strong_20_Emphasis"><text:span text:style-name="T9">Removes Arrogance:</text:span></text:span><text:span text:style-name="T9"> Success is not due to personal ability alone, but Allah’s </text:span><text:span text:style-name="T21">wish</text:span><text:span text:style-name="T9">.</text:span></text:p>
        </text:list-item>
        <text:list-item>
          <text:p text:style-name="P24"><text:span text:style-name="Strong_20_Emphasis"><text:span text:style-name="T9">Encourages Patience:</text:span></text:span><text:span text:style-name="T9"> Difficulties are seen as tests, not punishments.</text:span></text:p>
        </text:list-item>
        <text:list-item>
          <text:p text:style-name="P24"><text:span text:style-name="Strong_20_Emphasis"><text:span text:style-name="T9">Builds Trust in Allah:</text:span></text:span><text:span text:style-name="T9"> One relies on Allah while still making effort.</text:span></text:p>
        </text:list-item>
      </text:list>
      <text:p text:style-name="P9"><text:span text:style-name="T9">Islam teaches </text:span><text:span text:style-name="Strong_20_Emphasis"><text:span text:style-name="T9">balance</text:span></text:span><text:span text:style-name="T9">: humans have free will and responsibility, but Allah has full knowledge and control.</text:span></text:p>
      <text:p text:style-name="P12">The Prophet ﷺ said:</text:p>
      <text:p text:style-name="P12"><text:s text:c="16"/><text:span text:style-name="T7"><text:s text:c="7"/>احْرِصْ عَلَى مَا يَنْفَعُكَ وَاسْتَعِنْ بِاللَّهِ وَلَا تَعْجِزْ</text:span></text:p>
      <text:p text:style-name="P11"><text:span text:style-name="Emphasis"><text:span text:style-name="T9">“Be keen on what benefits you, seek help from Allah, and do not give up.”</text:span></text:span><text:span text:style-name="T9"> (Muslim)</text:span></text:p>
      <text:p text:style-name="P9"><text:span text:style-name="T9">This shows that belief in Qadar does </text:span><text:span text:style-name="Strong_20_Emphasis"><text:span text:style-name="T9">not promote laziness</text:span></text:span><text:span text:style-name="T9">, but encourages effort along with trust in Allah.</text:span></text:p>
      <text:p text:style-name="P9"><text:span text:style-name="T9">Thus, Eemaan in Al-Qadaa’ wal Qadar shapes a Muslim’s mindset, strengthens patience, and completes faith, making it a </text:span><text:span text:style-name="Strong_20_Emphasis"><text:span text:style-name="T9">core belief in Islam</text:span></text:span><text:span text:style-name="T9">, exactly as taught in the course.</text:span></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icrosoft account</meta:initial-creator>
    <meta:editing-cycles>3</meta:editing-cycles>
    <meta:creation-date>2025-12-28T14:42:00</meta:creation-date>
    <dc:date>2025-12-28T23:13:28.338811400</dc:date>
    <meta:editing-duration>PT44M55S</meta:editing-duration>
    <meta:generator>LibreOffice/25.8.3.2$Windows_X86_64 LibreOffice_project/8ca8d55c161d602844f5428fa4b58097424e324e</meta:generator>
    <meta:document-statistic meta:table-count="0" meta:image-count="0" meta:object-count="0" meta:page-count="10" meta:paragraph-count="95" meta:word-count="1776" meta:character-count="11405" meta:non-whitespace-character-count="9314"/>
    <meta:user-defined meta:name="AppVersion">15.0000</meta:user-defined>
    <meta:template xlink:type="simple" xlink:actuate="onRequest" xlink:title="Normal.dotm" xlink:href=""/>
  </office:meta>
</office:document-meta>
</file>