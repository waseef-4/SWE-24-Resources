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8pt" officeooo:paragraph-rsid="00139d1b" style:font-size-asian="18pt" style:font-name-complex="Times New Roman" style:font-size-complex="18pt"/>
    </style:style>
    <style:style style:name="P2" style:family="paragraph" style:parent-style-name="Standard">
      <style:text-properties style:font-name="Times New Roman" fo:font-size="18pt" fo:font-weight="bold" officeooo:rsid="00139d1b" officeooo:paragraph-rsid="00139d1b" style:font-size-asian="18pt" style:font-weight-asian="bold" style:font-name-complex="Times New Roman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9d1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39d1b" style:font-weight-asian="bold" style:font-weight-complex="bold"/>
    </style:style>
    <style:style style:name="T4" style:family="text">
      <style:text-properties style:text-underline-style="none" fo:font-weight="bold" officeooo:rsid="00139d1b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swer: Five Qualities of Allah’s Servants with Exceptions and Rewards</text:span><text:line-break/><text:line-break/>The Qur’an beautifully describes the qualities of Allah’s true servants (ʿIbadur Rahman) in Surah Al-Furqan (25:63–75). These qualities guide Muslims toward righteous character and behavior, while also mentioning exceptions and great rewards.<text:line-break/></text:p>
      <text:p text:style-name="P1"><text:span text:style-name="T2">1. </text:span><text:span text:style-name="T3">Humbleness and Patience</text:span><text:span text:style-name="T4">:</text:span><text:line-break/>First, Allah’s servants are humble and patient. They walk on earth with humility and respond peacefully to ignorance.<text:line-break/>Allah says: “The servants of the Most Merciful are those who walk on the earth humbly…” (Qur’an 25:63).<text:line-break/>The exception is arrogance and harsh behavior, which Allah dislikes.</text:p>
      <text:p text:style-name="P1"/>
      <text:p text:style-name="P1"><text:span text:style-name="T2">2. </text:span><text:span text:style-name="T3">Devoted in Worship</text:span><text:span text:style-name="T2">:</text:span><text:line-break/>Second, they are devoted in worship, especially during the night. They pray sincerely in prostration and standing (Qur’an 25:64). Neglecting prayer is an exception that weakens faith. The Prophet ﷺ said: “The best prayer after obligatory prayers is the night prayer.” (Muslim)</text:p>
      <text:p text:style-name="P1"/>
      <text:p text:style-name="P1"><text:span text:style-name="T2">3. </text:span><text:span text:style-name="T3">Fear Allah</text:span><text:span text:style-name="T2">:</text:span><text:line-break/>Third, they fear Allah’s punishment and constantly seek protection from Hellfire (Qur’an 25:65). Ignoring accountability and the Hereafter is a serious exception.</text:p>
      <text:p text:style-name="P1"/>
      <text:p text:style-name="P1"><text:span text:style-name="T2">4. </text:span><text:span text:style-name="T3">Moderate in Spending</text:span><text:span text:style-name="T2">:</text:span><text:line-break/>Fourth, they practice moderation in spending—neither wasteful nor stingy (Qur’an 25:67). Extremes in wealth usage go against this quality.</text:p>
      <text:p text:style-name="P1"/>
      <text:p text:style-name="P2"><text:soft-page-break/>5. <text:span text:style-name="T5">Maintain Pure Belief and Moral Conduct</text:span>:</text:p>
      <text:p text:style-name="P1">Fifth, they maintain pure belief and moral conduct. They avoid Shirk, murder, and adultery (Qur’an 25:68). However, Allah makes an exception for those who repent sincerely, believe, and perform righteous deeds. Allah promises: “He will replace their evil deeds with good.” (Qur’an 25:70)<text:line-break/><text:line-break/>Reward:<text:line-break/>Allah promises such servants the highest place in Paradise, where they will be welcomed with peace and honor (Qur’an 25:75). This reward is due to their patience, repentance, and obedience.<text:line-break/><text:line-break/>Thus, these qualities define true servants of Allah and lead to eternal succes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8T23:51:01.139452900</meta:creation-date>
    <dc:date>2026-01-06T21:13:27.978127400</dc:date>
    <meta:editing-duration>PT6M52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7" meta:word-count="282" meta:character-count="1882" meta:non-whitespace-character-count="1605"/>
  </office:meta>
</office:document-meta>
</file>