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 style:font-name-complex="Times New Roman"/>
    </style:style>
    <style:style style:name="P2" style:family="paragraph" style:parent-style-name="Text_20_body">
      <style:text-properties style:font-name="Times New Roman" style:font-name-complex="Times New Roman"/>
    </style:style>
    <style:style style:name="P3" style:family="paragraph" style:parent-style-name="Text_20_body">
      <style:text-properties style:font-name="Times New Roman" fo:font-size="16pt" officeooo:paragraph-rsid="0004b0bd" style:font-size-asian="16pt" style:font-name-complex="Times New Roman" style:font-size-complex="16pt"/>
    </style:style>
    <style:style style:name="P4" style:family="paragraph" style:parent-style-name="Quotations">
      <style:paragraph-properties fo:margin-top="0in" fo:margin-bottom="0.0972in" style:contextual-spacing="false" fo:line-height="115%"/>
      <style:text-properties style:font-name="Times New Roman" style:font-name-complex="Times New Roman"/>
    </style:style>
    <style:style style:name="P5" style:family="paragraph" style:parent-style-name="Text_20_body">
      <style:text-properties style:font-name="Times New Roman" fo:font-size="16pt" style:font-size-asian="16pt" style:font-name-complex="Times New Roman" style:font-size-complex="16pt"/>
    </style:style>
    <style:style style:name="P6" style:family="paragraph" style:parent-style-name="Horizontal_20_Line">
      <style:paragraph-properties fo:margin-top="0in" fo:margin-bottom="0.0972in" style:contextual-spacing="false" fo:line-height="115%"/>
      <style:text-properties style:font-name="Times New Roman" fo:font-size="16pt" style:font-size-asian="16pt" style:font-name-complex="Times New Roman" style:font-size-complex="16pt"/>
    </style:style>
    <style:style style:name="P7" style:family="paragraph" style:parent-style-name="Heading_20_2">
      <style:paragraph-properties fo:margin-top="0in" fo:margin-bottom="0.0972in" style:contextual-spacing="false" fo:line-height="115%"/>
      <style:text-properties style:font-name="Times New Roman" style:font-name-complex="Times New Roman"/>
    </style:style>
    <style:style style:name="P8" style:family="paragraph" style:parent-style-name="Text_20_body" style:list-style-name="L1">
      <style:text-properties style:font-name="Times New Roman" fo:font-size="16pt" style:font-size-asian="16pt" style:font-name-complex="Times New Roman" style:font-size-complex="16pt"/>
    </style:style>
    <style:style style:name="P9" style:family="paragraph" style:parent-style-name="Text_20_body">
      <style:paragraph-properties fo:margin-top="0in" fo:margin-bottom="0.0972in" style:contextual-spacing="false" fo:line-height="115%"/>
      <style:text-properties style:font-name="Times New Roman" fo:font-size="16pt" style:font-size-asian="16pt" style:font-name-complex="Times New Roman" style:font-size-complex="16pt"/>
    </style:style>
    <style:style style:name="P10" style:family="paragraph" style:parent-style-name="Quotations">
      <style:paragraph-properties fo:margin-left="0in" fo:margin-top="0in" fo:margin-bottom="0.0972in" style:contextual-spacing="false" fo:line-height="115%" fo:text-indent="0in" style:auto-text-indent="false"/>
      <style:text-properties style:font-name="Times New Roman" style:font-name-complex="Times New Roman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6pt" style:font-size-asian="16pt" style:font-name-complex="Times New Roman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Q1. “Seeking Engineering knowledge is an Ibadah” — Explain it in the light of the Qur’an, Hadith, and Dr. Martin Luther King Jr.’s saying</text:span></text:span></text:h>
      <text:p text:style-name="P2"><text:span text:style-name="T1">In Islam, </text:span><text:span text:style-name="Strong_20_Emphasis"><text:span text:style-name="T1">seeking beneficial knowledge</text:span></text:span><text:span text:style-name="T1">, including engineering knowledge, is considered </text:span><text:span text:style-name="Strong_20_Emphasis"><text:span text:style-name="T1">Ibadah</text:span></text:span><text:span text:style-name="T1"> when it is done with sincerity and correct intention. Islam teaches that worship is not limited to prayer or fasting; rather, it includes all actions done to please Allah.</text:span></text:p>
      <text:p text:style-name="P3">Allah clearly states the purpose of creation:</text:p>
      <text:p text:style-name="P3"><text:s text:c="38"/>وَمَا خَلَقْتُ الْجِنَّ وَالْإِنسَ إِلَّا لِيَعْبُدُونِ</text:p>
      <text:p text:style-name="P4"><text:span text:style-name="Emphasis"><text:span text:style-name="T1">“And I did not create the jinn and mankind except to worship Me.”</text:span></text:span><text:span text:style-name="T1"><text:line-break/>(Qur’an 51:56)</text:span></text:p>
      <text:p text:style-name="P5">Engineering knowledge helps society by improving infrastructure, safety, healthcare, and technology. When a Muslim studies engineering to serve humanity, earn halal income, and fulfill responsibilities honestly, it becomes worship. The Prophet ﷺ said:</text:p>
      <text:p text:style-name="P5"><text:s text:c="39"/>طَلَبُ الْعِلْمِ فَرِيضَةٌ عَلَى كُلِّ مُسْلِمٍ </text:p>
      <text:p text:style-name="P4"><text:span text:style-name="Emphasis"><text:span text:style-name="T1">“Seeking knowledge is obligatory upon every Muslim.”</text:span></text:span><text:span text:style-name="T1"><text:line-break/>(Ibn Majah)</text:span></text:p>
      <text:p text:style-name="P2"><text:span text:style-name="T1">Islam emphasizes </text:span><text:span text:style-name="Strong_20_Emphasis"><text:span text:style-name="T1">intention (niyyah)</text:span></text:span><text:span text:style-name="T1">. The Prophet ﷺ said:</text:span></text:p>
      <text:p text:style-name="P5"><text:s text:c="47"/>إِنَّمَا الْأَعْمَالُ بِالنِّيَّاتِ </text:p>
      <text:p text:style-name="P4"><text:span text:style-name="Emphasis"><text:span text:style-name="T1">“Actions are judged by intentions.”</text:span></text:span><text:span text:style-name="T1"><text:line-break/>(Bukhari)</text:span></text:p>
      <text:p text:style-name="P5">Dr. Martin Luther King Jr. said:</text:p>
      <text:p text:style-name="P4"><text:span text:style-name="Emphasis"><text:span text:style-name="T1">“Intelligence plus character — that is the goal of true education.”</text:span></text:span></text:p>
      <text:p text:style-name="P2"><text:span text:style-name="T1">This statement aligns perfectly with Islamic teachings. Islam values knowledge that is guided by </text:span><text:span text:style-name="Strong_20_Emphasis"><text:span text:style-name="T1">character, ethics, and responsibility</text:span></text:span><text:span text:style-name="T1">. An engineer with knowledge but no morality may cause harm, while one with faith and character benefits society.</text:span></text:p>
      <text:p text:style-name="P2"><text:soft-page-break/><text:span text:style-name="T1">Therefore, seeking engineering knowledge becomes </text:span><text:span text:style-name="Strong_20_Emphasis"><text:span text:style-name="T1">Ibadah</text:span></text:span><text:span text:style-name="T1"> when it is pursued sincerely, ethically, and for the pleasure of Allah, as emphasized in the course.</text:span></text:p>
      <text:p text:style-name="P5"/>
      <text:p text:style-name="P6"/>
      <text:h text:style-name="P7" text:outline-level="2"><text:span text:style-name="Strong_20_Emphasis"><text:span text:style-name="T1"/></text:span></text:h>
      <text:h text:style-name="P7" text:outline-level="2"><text:span text:style-name="Strong_20_Emphasis"><text:span text:style-name="T1">Q2. Define Ibadah with reference from the Qur’an and explain “Working is Ibadah”.</text:span></text:span></text:h>
      <text:p text:style-name="P2"><text:span text:style-name="T1">The word </text:span><text:span text:style-name="Strong_20_Emphasis"><text:span text:style-name="T1">Ibadah (عبادة)</text:span></text:span><text:span text:style-name="T1"> in Arabic means obedience, submission, humility, and love. In Islam, Ibadah refers to </text:span><text:span text:style-name="Strong_20_Emphasis"><text:span text:style-name="T1">complete submission to Allah with ultimate love and sincerity</text:span></text:span><text:span text:style-name="T1">.</text:span></text:p>
      <text:p text:style-name="P3">Allah says:<text:span text:style-name="T2"/></text:p>
      <text:p text:style-name="P3"><text:s text:c="38"/>وَمَا خَلَقْتُ الْجِنَّ وَالْإِنسَ إِلَّا لِيَعْبُدُونِ</text:p>
      <text:p text:style-name="P4"><text:span text:style-name="Emphasis"><text:span text:style-name="T1">“And I did not create the jinn and mankind except to worship Me.”</text:span></text:span><text:span text:style-name="T1"><text:line-break/>(Qur’an 51:56)</text:span></text:p>
      <text:p text:style-name="P5">Ibn Taymiyyah defined Ibadah as everything Allah loves and accepts, including actions of the heart and body. This includes prayer, charity, honesty, helping others, and earning halal income.</text:p>
      <text:p text:style-name="P2"><text:span text:style-name="Strong_20_Emphasis"><text:span text:style-name="T1">Working is considered Ibadah</text:span></text:span><text:span text:style-name="T1"> when certain conditions are met:</text:span></text:p>
      <text:list text:style-name="L1">
        <text:list-item>
          <text:p text:style-name="P8">The work must be halal</text:p>
        </text:list-item>
        <text:list-item>
          <text:p text:style-name="P8">The intention must be sincere</text:p>
        </text:list-item>
        <text:list-item>
          <text:p text:style-name="P8">The work must be done with excellence</text:p>
        </text:list-item>
        <text:list-item>
          <text:p text:style-name="P8">It must not lead to disobedience of Allah</text:p>
        </text:list-item>
      </text:list>
      <text:p text:style-name="P5">The Prophet ﷺ said:</text:p>
      <text:p text:style-name="P4"><text:soft-page-break/><text:span text:style-name="Emphasis"><text:span text:style-name="T1">“No one eats better food than that which he earns with his own hands.”</text:span></text:span><text:span text:style-name="T1"><text:line-break/>(Bukhari)</text:span></text:p>
      <text:p text:style-name="P5">Islam does not encourage laziness or isolation from life. Rather, it teaches Muslims to work responsibly and honestly. When a person works to support family, help society, and remain independent, that work becomes worship.</text:p>
      <text:p text:style-name="P2"><text:span text:style-name="T1">Thus, Islam presents a </text:span><text:span text:style-name="Strong_20_Emphasis"><text:span text:style-name="T1">comprehensive concept of Ibadah</text:span></text:span><text:span text:style-name="T1">, where both religious and worldly activities are connected to Allah through intention and obedience.</text:span></text:p>
      <text:p text:style-name="P6"/>
      <text:p text:style-name="P9"/>
      <text:h text:style-name="P7" text:outline-level="2"><text:span text:style-name="Strong_20_Emphasis"><text:span text:style-name="T1">Q3. Why do we worship Allah although worship does not benefit Him?</text:span></text:span></text:h>
      <text:p text:style-name="P2"><text:span text:style-name="T1">Allah is </text:span><text:span text:style-name="Strong_20_Emphasis"><text:span text:style-name="T1">completely independent</text:span></text:span><text:span text:style-name="T1"> and does not need human worship. Worship does not increase His power or greatness. Allah says:</text:span></text:p>
      <text:p text:style-name="P5"><text:s text:c="41"/>إِن تَكْفُرُوا فَإِنَّ اللَّهَ غَنِيٌّ عَنكُمْ </text:p>
      <text:p text:style-name="P4"><text:span text:style-name="Emphasis"><text:span text:style-name="T1">“If you disbelieve, indeed Allah is Free from need of you.”</text:span></text:span><text:span text:style-name="T1"><text:line-break/>(Qur’an 39:7)</text:span></text:p>
      <text:p text:style-name="P2"><text:span text:style-name="T1">So why do we worship Allah? The answer is that </text:span><text:span text:style-name="Strong_20_Emphasis"><text:span text:style-name="T1">worship benefits us</text:span></text:span><text:span text:style-name="T1">, not Allah. Worship purifies the soul, builds discipline, and gives purpose to life.</text:span></text:p>
      <text:p text:style-name="P5">Allah says:</text:p>
      <text:p text:style-name="P5"><text:s text:c="48"/>قَدْ أَفْلَحَ مَن زَكَّاهَا </text:p>
      <text:p text:style-name="P4"><text:span text:style-name="Emphasis"><text:span text:style-name="T1">“He who purifies his soul is successful.”</text:span></text:span><text:span text:style-name="T1"><text:line-break/>(Qur’an 91:9)</text:span></text:p>
      <text:p text:style-name="P5">Worship helps humans recognize their dependence on Allah and keeps them away from arrogance and corruption. It brings inner peace and moral strength. The Qur’an says:</text:p>
      <text:p text:style-name="P5"/>
      <text:p text:style-name="P10"><text:soft-page-break/><text:span text:style-name="T1"><text:s text:c="37"/>إِنَّ الصَّلَاةَ تَنْهَىٰ عَنِ الْفَحْشَاءِ وَالْمُنكَرِ</text:span> </text:p>
      <text:p text:style-name="P10"><text:span text:style-name="Emphasis"><text:span text:style-name="T1">“Indeed, prayer prevents immorality and wrongdoing.”</text:span></text:span><text:span text:style-name="T1"><text:line-break/>(Qur’an 29:45)</text:span></text:p>
      <text:p text:style-name="P5">Islam teaches that the goal of life is not only worldly success but eternal success in the Hereafter. Worship prepares a believer for accountability and the meeting with Allah.</text:p>
      <text:p text:style-name="P5">The Prophet ﷺ worshipped Allah extensively, not out of need, but out of love and gratitude. Worship also brings Allah’s mercy and guidance.</text:p>
      <text:p text:style-name="P2"><text:span text:style-name="T1">Therefore, we worship Allah because </text:span><text:span text:style-name="Strong_20_Emphasis"><text:span text:style-name="T1">He deserves worship</text:span></text:span><text:span text:style-name="T1">, and because it leads to our purification, success, and fulfillment of the true purpose of life.</text:span></text:p>
      <text:p text:style-name="P2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9:17:11.200855900</meta:creation-date>
    <dc:date>2026-01-06T19:26:05.246113300</dc:date>
    <meta:editing-duration>PT8M56S</meta:editing-duration>
    <meta:editing-cycles>1</meta:editing-cycles>
    <meta:document-statistic meta:table-count="0" meta:image-count="0" meta:object-count="0" meta:page-count="4" meta:paragraph-count="44" meta:word-count="642" meta:character-count="4315" meta:non-whitespace-character-count="3426"/>
    <meta:generator>LibreOffice/25.8.3.2$Windows_X86_64 LibreOffice_project/8ca8d55c161d602844f5428fa4b58097424e324e</meta:generator>
  </office:meta>
</office:document-meta>
</file>