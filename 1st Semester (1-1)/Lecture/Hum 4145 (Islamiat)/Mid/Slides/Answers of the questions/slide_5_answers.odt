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style:font-name="Times New Roman" fo:font-size="16pt" style:font-size-asian="14pt" style:font-size-complex="16pt"/>
    </style:style>
    <style:style style:name="P2" style:family="paragraph" style:parent-style-name="Text_20_body">
      <style:text-properties style:font-name="Times New Roman" fo:font-size="16pt" style:font-size-asian="14pt" style:font-size-complex="16pt"/>
    </style:style>
    <style:style style:name="P3" style:family="paragraph" style:parent-style-name="Text_20_body">
      <style:text-properties style:font-name="Times New Roman" fo:font-size="16pt" officeooo:paragraph-rsid="0019f5bb" style:font-size-asian="14pt" style:font-size-complex="16pt"/>
    </style:style>
    <style:style style:name="P4" style:family="paragraph" style:parent-style-name="Quotations">
      <style:text-properties style:font-name="Times New Roman" fo:font-size="16pt" style:font-size-asian="14pt" style:font-size-complex="16pt"/>
    </style:style>
    <style:style style:name="P5" style:family="paragraph" style:parent-style-name="Horizontal_20_Line">
      <style:text-properties style:font-name="Times New Roman" fo:font-size="16pt" style:font-size-asian="14pt" style:font-size-complex="16pt"/>
    </style:style>
    <style:style style:name="P6" style:family="paragraph" style:parent-style-name="Horizontal_20_Line">
      <style:text-properties style:font-name="Times New Roman" fo:font-size="16pt" officeooo:paragraph-rsid="0019f5bb" style:font-size-asian="14pt" style:font-size-complex="16pt"/>
    </style:style>
    <style:style style:name="P7" style:family="paragraph" style:parent-style-name="Quotations">
      <style:paragraph-properties fo:margin-left="0in" fo:text-indent="0in" style:auto-text-indent="false"/>
      <style:text-properties style:font-name="Times New Roman" fo:font-size="16pt" style:font-size-asian="14pt" style:font-size-complex="16pt"/>
    </style:style>
    <style:style style:name="P8" style:family="paragraph" style:parent-style-name="Text_20_body">
      <style:text-properties style:font-name="Times New Roman" fo:font-size="16pt" officeooo:paragraph-rsid="001b08c6" style:font-size-asian="14pt" style:font-size-complex="16pt"/>
    </style:style>
    <style:style style:name="P9" style:family="paragraph" style:parent-style-name="Quotations">
      <style:paragraph-properties fo:margin-left="0in" fo:text-indent="0in" style:auto-text-indent="false"/>
      <style:text-properties style:font-name="Times New Roman" fo:font-size="16pt" officeooo:paragraph-rsid="001b08c6" style:font-size-asian="14pt" style:font-size-complex="16pt"/>
    </style:style>
    <style:style style:name="P10" style:family="paragraph" style:parent-style-name="Standard">
      <style:text-properties style:font-name="Times New Roman" fo:font-size="16pt" style:font-size-asian="14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Q1. Illustrate the Etiquettes Between Spouses.</text:span></text:h>
      <text:p text:style-name="P2">Islam gives great importance to <text:span text:style-name="Strong_20_Emphasis">proper etiquettes between husband and wife</text:span> in order to build a peaceful and successful family. Marriage in Islam is based on <text:span text:style-name="Strong_20_Emphasis">love, mercy, trust, and mutual respect</text:span>. Allah says:</text:p>
      <text:p text:style-name="P3">وَعَاشِرُوهُنَّ بِالْمَعْرُوفِ <text:s/></text:p>
      <text:p text:style-name="P3"><text:span text:style-name="Emphasis">“And live with them honorably.”</text:span> (Qur’an 4:19)</text:p>
      <text:p text:style-name="P2">Both spouses have <text:span text:style-name="Strong_20_Emphasis">common rights</text:span>, such as honesty, loyalty, love, mercy, and good manners. They should speak kindly to each other, avoid harsh words, and show patience. The Prophet ﷺ said:</text:p>
      <text:p text:style-name="P2"><text:s text:c="34"/>خَيْرُكُمْ خَيْرُكُمْ لِأَهْلِهِ <text:s text:c="7"/></text:p>
      <text:p text:style-name="P4"><text:span text:style-name="Emphasis">“The best of you are the best to their families.”</text:span> (Tirmidhi)</text:p>
      <text:p text:style-name="P2">The <text:span text:style-name="Strong_20_Emphasis">husband’s responsibilities</text:span> include providing food, clothing, and shelter, teaching his wife basic religious knowledge, and protecting her dignity. He must not expose her private matters or harm her emotionally or physically. The Prophet ﷺ instructed husbands to treat their wives gently (Abu Dawud).</text:p>
      <text:p text:style-name="P2">The <text:span text:style-name="Strong_20_Emphasis">wife’s responsibilities</text:span> include obeying her husband in matters that do not involve disobedience to Allah, protecting his honor, wealth, and children, and maintaining modest behavior. Allah says:</text:p>
      <text:p text:style-name="P3">الرِّجَالُ قَوَّامُونَ عَلَى النِّسَاءِ </text:p>
      <text:p text:style-name="P3"><text:span text:style-name="Emphasis">“Men are protectors and maintainers of women.”</text:span> (Qur’an 4:34)</text:p>
      <text:p text:style-name="P2">Islam encourages mutual cooperation rather than domination. When spouses follow Islamic etiquettes, their marriage becomes a source of peace, mercy, and reward from Allah.</text:p>
      <text:p text:style-name="P5"/>
      <text:h text:style-name="P1" text:outline-level="2"><text:soft-page-break/><text:span text:style-name="Strong_20_Emphasis">Q2. “O Allah’s Messenger, is there any responsibility that I have to fulfill towards my parents after they have passed away?” — Explain the four matters mentioned in the Hadith.</text:span></text:h>
      <text:p text:style-name="P2">Islam teaches that <text:span text:style-name="Strong_20_Emphasis">duties toward parents do not end after their death</text:span>. A man once asked the Prophet ﷺ about this, and the Prophet ﷺ mentioned <text:span text:style-name="Strong_20_Emphasis">four responsibilities</text:span> that remain after parents pass away.</text:p>
      <text:p text:style-name="P2"><text:span text:style-name="Strong_20_Emphasis">First</text:span>, making <text:span text:style-name="Strong_20_Emphasis">du‘a and seeking forgiveness</text:span> for them. A child’s sincere prayer benefits deceased parents. Allah loves those who pray for their parents.</text:p>
      <text:p text:style-name="P2"><text:span text:style-name="Strong_20_Emphasis">Second</text:span>, <text:span text:style-name="Strong_20_Emphasis">fulfilling their promises and pledges</text:span>. If parents made vows or commitments, the child should try to fulfill them.</text:p>
      <text:p text:style-name="P2"><text:span text:style-name="Strong_20_Emphasis">Third</text:span>, <text:span text:style-name="Strong_20_Emphasis">honoring their friends</text:span>. Showing kindness and respect to parents’ close friends is considered part of good conduct.</text:p>
      <text:p text:style-name="P2"><text:span text:style-name="Strong_20_Emphasis">Fourth</text:span>, <text:span text:style-name="Strong_20_Emphasis">maintaining family ties</text:span> that exist through parents, such as relatives from the father’s or mother’s side. Breaking family ties is strongly discouraged in Islam.</text:p>
      <text:p text:style-name="P2">This Hadith is reported in <text:span text:style-name="Strong_20_Emphasis">Musnad Ahmad</text:span> and highlights the depth of Islamic teachings regarding gratitude and loyalty. Allah commands kindness to parents repeatedly in the Qur’an (Qur’an 17:23).</text:p>
      <text:p text:style-name="P3">By fulfilling these duties, a child continues to earn reward even after the parents’ death and shows true gratitude for their sacrifices.</text:p>
      <text:p text:style-name="P3"/>
      <text:p text:style-name="P6"/>
      <text:p text:style-name="P2"/>
      <text:h text:style-name="P1" text:outline-level="2"><text:span text:style-name="Strong_20_Emphasis">Q3. Write down the Etiquettes towards One’s Parents according to Qur’an 17:23–24.</text:span></text:h>
      <text:p text:style-name="P2">Qur’an <text:span text:style-name="Strong_20_Emphasis">17:23–24</text:span> clearly outlines the <text:span text:style-name="Strong_20_Emphasis">etiquettes toward parents</text:span>, emphasizing respect, kindness, and mercy. Allah commands:</text:p>
      <text:p text:style-name="P3"><text:soft-page-break/>وَقَضَىٰ رَبُّكَ أَلَّا تَعْبُدُوا إِلَّا إِيَّاهُ وَبِالْوَالِدَيْنِ إِحْسَانًا </text:p>
      <text:p text:style-name="P3"><text:span text:style-name="Emphasis">“Worship none but Him, and be dutiful to your parents.”</text:span> (17:23)</text:p>
      <text:p text:style-name="P2">A child must never show disrespect to parents. Even saying a small word of annoyance like “uff” is forbidden. Raising one’s voice, arguing harshly, or speaking rudely is against Islamic manners.</text:p>
      <text:p text:style-name="P2">Allah further instructs children to <text:span text:style-name="Strong_20_Emphasis">lower the wing of humility</text:span> toward parents and speak gently. This means being polite, patient, and caring, especially when parents become old or weak.</text:p>
      <text:p text:style-name="P2">Another important etiquette is <text:span text:style-name="Strong_20_Emphasis">making du‘a for parents</text:span>. Allah teaches a beautiful supplication:</text:p>
      <text:p text:style-name="P2">رَّبِّ ارْحَمْهُمَا كَمَا رَبَّيَانِي صَغِيرًا <text:s text:c="5"/></text:p>
      <text:p text:style-name="P7"><text:span text:style-name="Emphasis">“My Lord! Have mercy on them as they raised me when I was small.”</text:span> (17:24)</text:p>
      <text:p text:style-name="P2">Islam also commands obedience to parents as long as it does not involve disobedience to Allah. Serving parents, fulfilling their needs, and showing gratitude are acts of worship.</text:p>
      <text:p text:style-name="P2">Thus, honoring parents is one of the greatest obligations in Islam and a means of earning Allah’s pleasure and Paradise.</text:p>
      <text:p text:style-name="P5"/>
      <text:h text:style-name="P1" text:outline-level="2"><text:span text:style-name="Strong_20_Emphasis">Q4. Describe the Steps to Purify One’s Soul and Make It Wholesome with Qur’anic References.</text:span></text:h>
      <text:p text:style-name="P2">Islam places great emphasis on <text:span text:style-name="Strong_20_Emphasis">purifying the soul (Tazkiyat an-Nafs)</text:span>. Allah says:</text:p>
      <text:p text:style-name="P8">قَدْ أَفْلَحَ مَن زَكَّاهَا </text:p>
      <text:p text:style-name="P8"><text:span text:style-name="Emphasis">“Indeed, he succeeds who purifies his soul.”</text:span> (Qur’an 91:9)</text:p>
      <text:p text:style-name="P2"><text:soft-page-break/>The <text:span text:style-name="Strong_20_Emphasis">first step</text:span> is <text:span text:style-name="Strong_20_Emphasis">sincere repentance (Tawbah)</text:span>—feeling regret for sins, stopping them, and resolving not to return. Allah promises forgiveness to those who repent sincerely (Qur’an 66:8).</text:p>
      <text:p text:style-name="P2">The <text:span text:style-name="Strong_20_Emphasis">second step</text:span> is <text:span text:style-name="Strong_20_Emphasis">self-watchfulness (Muraqabah)</text:span>—being aware that Allah sees everything.</text:p>
      <text:p text:style-name="P8">إِنَّ اللَّهَ كَانَ عَلَيْكُمْ رَقِيبًا </text:p>
      <text:p text:style-name="P9"><text:span text:style-name="Emphasis">“Surely Allah is Ever an All-Watcher over you.”</text:span> (Qur’an 4:1)</text:p>
      <text:p text:style-name="P2">The <text:span text:style-name="Strong_20_Emphasis">third step</text:span> is <text:span text:style-name="Strong_20_Emphasis">self-accountability (Muhasabah)</text:span>—regularly reviewing one’s actions and correcting mistakes. Allah says:</text:p>
      <text:p text:style-name="P2">وَلْتَنظُرْ نَفْسٌ مَّا قَدَّمَتْ لِغَدٍ </text:p>
      <text:p text:style-name="P7"><text:span text:style-name="Emphasis">“Let every soul look to what it has sent forth for tomorrow.”</text:span> (Qur’an 59:18)</text:p>
      <text:p text:style-name="P2">The <text:span text:style-name="Strong_20_Emphasis">fourth step</text:span> is <text:span text:style-name="Strong_20_Emphasis">struggling against the soul (Mujahadah)</text:span>. The human soul naturally inclines toward evil (Qur’an 12:53), so discipline and patience are required.</text:p>
      <text:p text:style-name="P2">By following these steps, a believer cleanses the heart, strengthens Eeman, and becomes closer to Allah.</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6T19:20:51.779371000</meta:creation-date>
    <dc:date>2026-01-06T19:40:21.947462200</dc:date>
    <meta:editing-duration>PT8M45S</meta:editing-duration>
    <meta:editing-cycles>2</meta:editing-cycles>
    <meta:generator>LibreOffice/25.8.3.2$Windows_X86_64 LibreOffice_project/8ca8d55c161d602844f5428fa4b58097424e324e</meta:generator>
    <meta:document-statistic meta:table-count="0" meta:image-count="0" meta:object-count="0" meta:page-count="4" meta:paragraph-count="44" meta:word-count="760" meta:character-count="4929" meta:non-whitespace-character-count="4162"/>
  </office:meta>
</office:document-meta>
</file>