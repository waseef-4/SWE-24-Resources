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2">
      <style:text-properties style:font-name="Times New Roman" fo:font-size="16pt" style:font-size-asian="14pt" style:font-size-complex="16pt"/>
    </style:style>
    <style:style style:name="P2" style:family="paragraph" style:parent-style-name="Text_20_body">
      <style:text-properties style:font-name="Times New Roman" fo:font-size="16pt" style:font-size-asian="14pt" style:font-size-complex="16pt"/>
    </style:style>
    <style:style style:name="P3" style:family="paragraph" style:parent-style-name="Text_20_body">
      <style:text-properties style:font-name="Times New Roman" fo:font-size="16pt" officeooo:paragraph-rsid="001d85aa" style:font-size-asian="14pt" style:font-size-complex="16pt"/>
    </style:style>
    <style:style style:name="P4" style:family="paragraph" style:parent-style-name="Horizontal_20_Line">
      <style:text-properties style:font-name="Times New Roman" fo:font-size="16pt" style:font-size-asian="14pt" style:font-size-complex="16pt"/>
    </style:style>
    <style:style style:name="P5" style:family="paragraph" style:parent-style-name="Standard">
      <style:text-properties style:font-name="Times New Roman" fo:font-size="16pt" style:font-size-asian="14pt" style:font-size-complex="16pt"/>
    </style:style>
    <style:style style:name="P6" style:family="paragraph" style:parent-style-name="Horizontal_20_Line">
      <style:text-properties style:font-name="Times New Roman" fo:font-size="16pt" officeooo:paragraph-rsid="001c36fb" style:font-size-asian="14pt" style:font-size-complex="16pt"/>
    </style:style>
    <style:style style:name="P7" style:family="paragraph" style:parent-style-name="Heading_20_2">
      <style:text-properties style:font-name="Times New Roman" fo:font-size="16pt" officeooo:paragraph-rsid="001c36fb" style:font-size-asian="14pt" style:font-size-complex="16pt"/>
    </style:style>
    <style:style style:name="P8" style:family="paragraph" style:parent-style-name="Text_20_body">
      <style:text-properties style:font-name="Times New Roman" fo:font-size="16pt" officeooo:paragraph-rsid="001c36fb" style:font-size-asian="14pt" style:font-size-complex="16pt"/>
    </style:style>
    <style:style style:name="P9" style:family="paragraph" style:parent-style-name="Horizontal_20_Line">
      <style:paragraph-properties fo:margin-top="0in" fo:margin-bottom="0.0972in" style:contextual-spacing="false" fo:line-height="115%"/>
      <style:text-properties style:font-name="Times New Roman" fo:font-size="16pt" style:font-size-asian="14pt" style:font-size-complex="16pt"/>
    </style:style>
    <style:style style:name="P10" style:family="paragraph" style:parent-style-name="Text_20_body">
      <style:paragraph-properties fo:margin-top="0in" fo:margin-bottom="0.0972in" style:contextual-spacing="false" fo:line-height="115%"/>
      <style:text-properties style:font-name="Times New Roman" fo:font-size="16pt" style:font-size-asian="14pt" style:font-size-complex="16pt"/>
    </style:style>
    <style:style style:name="P11" style:family="paragraph" style:parent-style-name="Heading_20_2">
      <style:paragraph-properties fo:margin-top="0in" fo:margin-bottom="0.0972in" style:contextual-spacing="false" fo:line-height="115%"/>
      <style:text-properties style:font-name="Times New Roman" fo:font-size="16pt" style:font-size-asian="14pt" style:font-size-complex="16pt"/>
    </style:style>
    <style:style style:name="P12" style:family="paragraph" style:parent-style-name="Horizontal_20_Line">
      <style:paragraph-properties fo:margin-top="0in" fo:margin-bottom="0.0972in" style:contextual-spacing="false" fo:line-height="115%"/>
      <style:text-properties style:font-name="Times New Roman" fo:font-size="16pt" officeooo:paragraph-rsid="001c36fb" style:font-size-asian="14pt" style:font-size-complex="16pt"/>
    </style:style>
    <style:style style:name="P13" style:family="paragraph" style:parent-style-name="Text_20_body">
      <style:paragraph-properties fo:margin-top="0in" fo:margin-bottom="0.0972in" style:contextual-spacing="false" fo:line-height="115%"/>
      <style:text-properties style:font-name="Times New Roman" fo:font-size="16pt" officeooo:paragraph-rsid="001c36fb" style:font-size-asian="14pt" style:font-size-complex="16pt"/>
    </style:style>
    <style:style style:name="P14" style:family="paragraph" style:parent-style-name="Heading_20_2">
      <style:paragraph-properties fo:margin-top="0in" fo:margin-bottom="0.0972in" style:contextual-spacing="false" fo:line-height="115%"/>
      <style:text-properties style:font-name="Times New Roman" fo:font-size="16pt" officeooo:paragraph-rsid="001c36fb" style:font-size-asian="14pt" style:font-size-complex="16pt"/>
    </style:style>
    <style:style style:name="P15" style:family="paragraph" style:parent-style-name="Heading_20_2">
      <style:paragraph-properties fo:margin-top="0in" fo:margin-bottom="0.0972in" style:contextual-spacing="false" fo:line-height="115%"/>
      <style:text-properties style:font-name="Times New Roman" fo:font-size="16pt" officeooo:paragraph-rsid="001d85aa" style:font-size-asian="14pt" style:font-size-complex="16pt"/>
    </style:style>
    <style:style style:name="P16" style:family="paragraph" style:parent-style-name="Text_20_body">
      <style:text-properties style:font-name="Times New Roman" fo:font-size="16pt" officeooo:paragraph-rsid="001efe8f" style:font-size-asian="14pt" style:font-size-complex="16pt"/>
    </style:style>
    <style:style style:name="T1" style:family="text">
      <style:text-properties style:font-weight-complex="bold"/>
    </style:style>
    <style:style style:name="T2" style:family="text">
      <style:text-properties style:font-name="Times New Roman" fo:font-size="16pt" style:font-size-asian="14pt" style:font-size-complex="16pt"/>
    </style:style>
    <style:style style:name="T3" style:family="text">
      <style:text-properties officeooo:rsid="001d85aa"/>
    </style:style>
    <style:style style:name="T4" style:family="text">
      <style:text-properties style:font-size-asian="16pt" style:font-weight-complex="bold"/>
    </style:style>
    <style:style style:name="T5" style:family="text">
      <style:text-properties fo:font-weight="bold" style:font-size-asian="16pt"/>
    </style:style>
    <style:style style:name="T6" style:family="text">
      <style:text-properties style:font-size-asian="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Strong_20_Emphasis">1. Define Good Characters according to Hasan Basri and Abdullah bin Mubaarak</text:span></text:h>
      <text:p text:style-name="P2">Good character is one of the most important qualities in Islam. It shapes a person’s behavior, attitude, and relationship with others. According to the sayings of the Salaf, especially Hasan Basri and Abdullah bin Mubaarak, good character is not limited to worship only, but it is reflected in daily actions and manners.</text:p>
      <text:p text:style-name="P2">Hasan Basri (رحمه الله) explained good character in a very simple way. According to him, good character includes smiling at people, showing kindness, and having a pleasant attitude. A person with good character does not harm others with words or actions. Instead, he spreads positivity and peace in society. This shows that Islam encourages soft behavior and good manners along with faith.</text:p>
      <text:p text:style-name="P2">Abdullah bin Mubaarak (رحمه الله) described good character through three main qualities. First, avoiding what is haram (forbidden). Second, seeking halal (lawful) income and lifestyle. Third, being generous and kind towards family members. This definition shows that good character is closely connected with honesty, responsibility, and care for others.</text:p>
      <text:p text:style-name="P3">The importance of good character is clearly mentioned in the Qur’an. Allah praises the Prophet Muhammad (ﷺ) by saying:</text:p>
      <text:p text:style-name="P3">وَإِنَّكَ لَعَلَىٰ خُلُقٍ عَظِيمٍ <text:line-break/><text:span text:style-name="Strong_20_Emphasis">“And indeed, you are of a great moral character.”</text:span> (Surah Al-Qalam 68:4)</text:p>
      <text:p text:style-name="P3">In Hadith, the Prophet (ﷺ) said:<text:line-break/><text:span text:style-name="Strong_20_Emphasis">“Nothing will be heavier on the Scale on the Day of Judgment than good character.”</text:span> (Tirmidhi)</text:p>
      <text:p text:style-name="P2">These references prove that good character is a core part of Islam. According to Hasan Basri and Abdullah bin Mubaarak, good character means kindness, lawful living, and positive behavior, which help build a healthy and peaceful society.</text:p>
      <text:p text:style-name="P4"><text:soft-page-break/></text:p>
      <text:h text:style-name="P1" text:outline-level="2"><text:span text:style-name="Strong_20_Emphasis">2. “Mumin’s matter is surprising” – Explain this Hadith with real-life examples</text:span></text:h>
      <text:p text:style-name="P2">The Hadith “Mumin’s matter is surprising” highlights the unique mindset and strength of a true believer. The Prophet Muhammad (ﷺ) said:<text:line-break/><text:span text:style-name="Strong_20_Emphasis">“How wonderful is the affair of a believer! There is good for him in every matter, and this is for no one except the believer. If something good happens to him, he is thankful, and that is good for him. If something bad happens to him, he is patient, and that is also good for him.”</text:span> (Sahih Muslim)</text:p>
      <text:p text:style-name="P2">This Hadith teaches that a believer remains positive in all situations. In times of happiness, a Mumin shows gratitude to Allah instead of becoming proud. Gratitude increases blessings and keeps the heart humble. For example, if a student gets good results, instead of showing arrogance, he thanks Allah and continues to work hard.</text:p>
      <text:p text:style-name="P2">In difficult times, a Mumin practices patience (sabr). He understands that hardship is a test from Allah. For instance, if someone loses a job, a believer does not lose hope or complain excessively. He remains patient, continues searching for opportunities, and trusts Allah’s plan. This patience brings inner peace and spiritual reward.</text:p>
      <text:p text:style-name="P3">The Qur’an also supports this idea. Allah says:</text:p>
      <text:p text:style-name="P3">إِنَّ اللَّهَ مَعَ الصَّابِرِينَ <text:line-break/><text:span text:style-name="Strong_20_Emphasis">“Indeed, Allah is with the patient.”</text:span> (Surah Al-Baqarah 2:153)</text:p>
      <text:p text:style-name="P2">Another Hadith says that Allah tests those whom He loves, and through patience, their sins are forgiven (Bukhari). This shows that even hardships carry goodness for a believer.</text:p>
      <text:p text:style-name="P2">Thus, the Mumin’s life is balanced between gratitude and patience. This mindset helps him stay mentally strong, spiritually connected, and <text:soft-page-break/>emotionally stable in real life. That is why the Prophet (ﷺ) called the affairs of a believer “surprising” and special.</text:p>
      <text:p text:style-name="P4"/>
      <text:h text:style-name="P1" text:outline-level="2"><text:span text:style-name="Strong_20_Emphasis">3. Discuss the verse of the Holy Qur’an posted on the Entrance Wall of Harvard University</text:span></text:h>
      <text:p text:style-name="P2">The verse of the Holy Qur’an posted on the Entrance Wall of Harvard University is from Surah An-Nisa (4:135). The verse says:<text:line-break/><text:span text:style-name="Strong_20_Emphasis">“O you who believe! Stand firmly for justice, as witnesses for Allah, even if it is against yourselves, your parents, or your relatives. Whether one is rich or poor, Allah is more worthy of both.”</text:span></text:p>
      <text:p text:style-name="P2">This verse highlights the universal principle of justice in Islam. It clearly states that justice must be upheld in all situations, without bias or favoritism. Islam does not allow injustice, even if it benefits oneself or close family members. This shows the high moral standard Islam sets for human behavior.</text:p>
      <text:p text:style-name="P2">The presence of this verse at a world-famous institution like Harvard University reflects the global importance of justice. Justice is the foundation of a stable society. Without fairness, societies collapse due to oppression and inequality. Islam emphasizes justice not only in courts, but also in daily dealings, business, family matters, and leadership.</text:p>
      <text:p text:style-name="P3">The Qur’an also states:</text:p>
      <text:p text:style-name="P3"><text:span text:style-name="T1">إِنَّ اللَّهَ يَأْمُرُ بِالْعَدْلِ وَالْإِحْسَانِ</text:span> <text:line-break/><text:span text:style-name="Strong_20_Emphasis">“Allah commands justice and kindness.”</text:span> (Surah An-Nahl 16:90)</text:p>
      <text:p text:style-name="P2">The Prophet Muhammad (ﷺ) strongly warned against injustice. He said:<text:line-break/><text:span text:style-name="Strong_20_Emphasis">“Oppression will be darkness on the Day of Judgment.”</text:span> (Bukhari and Muslim)</text:p>
      <text:p text:style-name="P2">This verse teaches Muslims to be honest, fair, and brave in speaking the truth. It reminds us that justice is a moral responsibility, not a choice. The Harvard <text:soft-page-break/>wall verse proves that Islamic teachings are timeless and relevant for all humanity, not only for Muslims.</text:p>
      <text:p text:style-name="P2"/>
      <text:p text:style-name="P4"/>
      <text:p text:style-name="P2"/>
      <text:h text:style-name="P1" text:outline-level="2"><text:span text:style-name="Strong_20_Emphasis">4. “Be compassionate towards those on earth…” – Explain this Hadith of Mercy with real-life examples</text:span></text:h>
      <text:p text:style-name="P3">The Prophet Muhammad (ﷺ) said:</text:p>
      <text:p text:style-name="P3">ارْحَمُوا مَنْ فِي الأَرْضِ يَرْحَمْكُمْ مَنْ فِي السَّمَاءِ <text:line-break/><text:span text:style-name="Strong_20_Emphasis">“Be compassionate towards those on earth, and the One above the heavens will be compassionate towards you.”</text:span> (Baihaqi)</text:p>
      <text:p text:style-name="P2">This Hadith highlights the importance of mercy in Islam. Mercy is not limited to humans only, but extends to animals, the poor, the weak, and all living beings. Islam teaches that showing kindness brings Allah’s mercy in return.</text:p>
      <text:p text:style-name="P2">In daily life, mercy can be shown in many ways. Helping a poor person, forgiving someone who made a mistake, or speaking politely are simple acts of compassion. For example, if a teacher treats students with understanding instead of harshness, it creates a positive learning environment.</text:p>
      <text:p text:style-name="P2">The Prophet (ﷺ) himself showed mercy even in difficult situations. He forgave his enemies and cared deeply for children, women, and animals. One famous Hadith mentions a man who gave water to a thirsty dog, and Allah forgave his sins because of that act of mercy (Bukhari).</text:p>
      <text:p text:style-name="P3">The Qur’an also describes the Prophet (ﷺ) as:</text:p>
      <text:p text:style-name="P3">وَمَا أَرْسَلْنَاكَ إِلَّا رَحْمَةً لِّلْعَالَمِينَ <text:line-break/><text:span text:style-name="Strong_20_Emphasis">“A mercy to all the worlds.”</text:span> (Surah Al-Anbiya 21:107)</text:p>
      <text:p text:style-name="P2"><text:soft-page-break/>This Hadith teaches that mercy strengthens social bonds and creates harmony in society. When people are compassionate, hatred and conflict decrease. Allah rewards those who show mercy by granting them peace in this life and success in the Hereafter.</text:p>
      <text:p text:style-name="P5"/>
      <text:p text:style-name="P6"/>
      <text:h text:style-name="P7" text:outline-level="2"><text:span text:style-name="Strong_20_Emphasis"><text:span text:style-name="T2"/></text:span></text:h>
      <text:p text:style-name="P8"><text:span text:style-name="Strong_20_Emphasis"><text:span text:style-name="T2"/></text:span></text:p>
      <text:p text:style-name="P8"><text:span text:style-name="Strong_20_Emphasis"><text:span text:style-name="T2"/></text:span></text:p>
      <text:h text:style-name="P7" text:outline-level="2"><text:span text:style-name="Strong_20_Emphasis">5. How a man is recorded as a liar with Allah? (According to Hadith – Imam Muslim)</text:span></text:h>
      <text:p text:style-name="P2">Islam gives great importance to truthfulness, and lying is considered a serious moral failure. According to a Hadith narrated by <text:span text:style-name="Strong_20_Emphasis">Imam Muslim</text:span>, the Prophet Muhammad (ﷺ) clearly explained how a person is recorded as a liar with Allah. He said that truth leads to righteousness, and righteousness leads to Paradise. On the other hand, lying leads to immorality, and immorality leads to Hellfire. A person who repeatedly lies and makes an effort to lie is finally <text:span text:style-name="Strong_20_Emphasis">recorded as a liar with Allah</text:span>.</text:p>
      <text:p text:style-name="P2">This Hadith shows that lying is not judged by a single mistake only. If someone lies once and then feels regret and corrects himself, Allah is Merciful. But when a person lies regularly and makes it a habit, it slowly becomes part of his character. Such a person no longer values truth and loses moral integrity. Over time, this habit damages his relationship with Allah and also with people.</text:p>
      <text:p text:style-name="P3">In real life, lying may start with small matters, such as giving false excuses, cheating in exams, or hiding the truth in business. These actions may seem harmless, but Islam teaches that repeated dishonesty darkens the heart. The Qur’an also commands believers to remain truthful: </text:p>
      <text:p text:style-name="P3"><text:soft-page-break/>يَا أَيُّهَا الَّذِينَ آمَنُوا اتَّقُوا اللَّهَ وَكُونُوا مَعَ الصَّادِقِينَ</text:p>
      <text:p text:style-name="P3"><text:span text:style-name="Emphasis">“O believers! Fear Allah and be with the truthful”</text:span> (Surah At-Tawbah: 119).</text:p>
      <text:p text:style-name="P2">Therefore, a man is recorded as a liar with Allah not because of one mistake, but because of continuous lying without repentance. Islam encourages Muslims to practice honesty in speech, actions, promises, and dealings so that they are recorded as truthful servants of Allah in both this world and the Hereafter.</text:p>
      <text:p text:style-name="P2"/>
      <text:p text:style-name="P9"/>
      <text:p text:style-name="P10"/>
      <text:h text:style-name="P11" text:outline-level="2"><text:span text:style-name="Strong_20_Emphasis">6. Illustrate the basic principle of Zulm (Oppression) here and hereafter according to Surah Al-Baqarah: 279</text:span></text:h>
      <text:p text:style-name="P3">Zulm, or oppression, is one of the most strongly condemned actions in Islam. The basic principle of Zulm is clearly stated in <text:span text:style-name="Strong_20_Emphasis">Surah Al-Baqarah: 279</text:span>, where Allah says: </text:p>
      <text:p text:style-name="P3">لَا تَظْلِمُونَ وَلَا تُظْلَمُونَ </text:p>
      <text:p text:style-name="P3"><text:span text:style-name="Emphasis">“Do no wrong, and no wrong will be done to you.”</text:span> </text:p>
      <text:p text:style-name="P3">This verse establishes a universal rule of justice that applies both in this world and in the Hereafter.</text:p>
      <text:p text:style-name="P2">In this world, Zulm includes taking others’ rights unfairly, cheating, dishonesty, abuse of power, and injustice in social or financial matters. Islam strictly forbids harming others, whether physically, emotionally, or economically. A person who oppresses others may appear successful temporarily, but Islam teaches that such success is false and short-lived. Oppression destroys trust in society and leads to conflict, fear, and moral decay.</text:p>
      <text:p text:style-name="P2">In the Hereafter, the consequences of Zulm are even more severe. The Prophet Muhammad (ﷺ) warned that anyone who wrongs another person <text:soft-page-break/>must seek forgiveness in this life. Otherwise, on the Day of Judgment, justice will be served through the transfer of good deeds. If the oppressor has no good deeds left, he will carry the sins of the oppressed person.</text:p>
      <text:p text:style-name="P2">Another Hadith states that even taking something as small as a piece of land unjustly will result in severe punishment in the Hereafter. This shows that Islam does not ignore even minor acts of oppression.</text:p>
      <text:p text:style-name="P2">Thus, the principle of Zulm teaches Muslims to live with justice, fairness, and respect for others’ rights. Avoiding oppression is not only a social duty but also a requirement for salvation in the Hereafter.</text:p>
      <text:p text:style-name="P8"/>
      <text:p text:style-name="P12"/>
      <text:p text:style-name="P13"><text:span text:style-name="Strong_20_Emphasis"><text:span text:style-name="T2"/></text:span></text:p>
      <text:p text:style-name="P13"><text:span text:style-name="Strong_20_Emphasis"><text:span text:style-name="T2"/></text:span></text:p>
      <text:h text:style-name="P14" text:outline-level="2"><text:span text:style-name="Strong_20_Emphasis">7. “Whoever cheats, he is not one of us” – Explain using real-life examples (Hadith – Tirmidhi)</text:span></text:h>
      <text:p text:style-name="P3">Cheating is considered a major moral crime in Islam. The Prophet Muhammad (ﷺ) strongly condemned cheating when he said: </text:p>
      <text:p text:style-name="P3"><text:span text:style-name="Strong_20_Emphasis"><text:span text:style-name="T1">مَنْ غَشَّ فَلَيْسَ مِنَّا</text:span></text:span><text:span text:style-name="Strong_20_Emphasis"> </text:span></text:p>
      <text:p text:style-name="P3"><text:span text:style-name="Strong_20_Emphasis">“Whoever cheats, he is not one of us.”</text:span> </text:p>
      <text:p text:style-name="P3">This Hadith, narrated by <text:span text:style-name="Strong_20_Emphasis">Tirmidhi</text:span>, shows how seriously Islam views dishonesty and deception.</text:p>
      <text:p text:style-name="P2">The context of this Hadith is very meaningful. The Prophet (ﷺ) once passed by a merchant who had hidden wet grain beneath dry grain to deceive buyers. When the Prophet discovered this, he openly rejected such behavior. This incident proves that Islam promotes transparency and fairness in all dealings, especially in business and trade.</text:p>
      <text:p text:style-name="P2"><text:soft-page-break/>In real life, cheating appears in many forms. A student may cheat in exams, a shopkeeper may sell low-quality products at high prices, or an employee may give false information to gain benefits. Even lying in online transactions or hiding defects in products are forms of cheating. Islam teaches that such actions damage both personal character and social trust.</text:p>
      <text:p text:style-name="P2">The Qur’an also emphasizes honesty and justice in dealings, and cheating is directly linked to hypocrisy in Hadith literature. A society where cheating is common becomes unstable because people lose confidence in one another.</text:p>
      <text:p text:style-name="P2">Therefore, this Hadith teaches Muslims to maintain honesty in every aspect of life. Cheating removes a person from the moral identity of true believers. A true Muslim is one who is fair, truthful, and trustworthy, whether dealing with family, society, or strangers.</text:p>
      <text:p text:style-name="P13"><text:span text:style-name="Strong_20_Emphasis"><text:span text:style-name="T2"/></text:span></text:p>
      <text:p text:style-name="P13"><text:span text:style-name="Strong_20_Emphasis"><text:span text:style-name="T2"/></text:span></text:p>
      <text:p text:style-name="P13"><text:span text:style-name="Strong_20_Emphasis"><text:span text:style-name="T2"/></text:span></text:p>
      <text:p text:style-name="P13"><text:span text:style-name="Strong_20_Emphasis"><text:span text:style-name="T2"/></text:span></text:p>
      <text:p text:style-name="P13"><text:span text:style-name="Strong_20_Emphasis"><text:span text:style-name="T2"/></text:span></text:p>
      <text:h text:style-name="P15" text:outline-level="2"><text:span text:style-name="Strong_20_Emphasis"><text:span text:style-name="T3">8. Short Notes on:</text:span></text:span></text:h>
      <text:h text:style-name="P14" text:outline-level="2"><text:span text:style-name="Strong_20_Emphasis">A. Salaf</text:span></text:h>
      <text:p text:style-name="P2">The term <text:span text:style-name="Strong_20_Emphasis">Salaf</text:span> refers to the first three generations of Muslims: the <text:span text:style-name="Strong_20_Emphasis">Sahabah (companions of the Prophet ﷺ)</text:span>, the <text:span text:style-name="Strong_20_Emphasis">Tabi‘un</text:span>, and the <text:span text:style-name="Strong_20_Emphasis">Tabi‘ al-Tabi‘in</text:span>. They are considered the best generations of Islam because they lived closest to the time of the Prophet Muhammad ﷺ and followed Islam with sincerity, simplicity, and strong moral character. Their lives are examples of true faith, honesty, patience, and justice.</text:p>
      <text:p text:style-name="P16">The importance of the Salaf is mentioned in a Hadith where the Prophet ﷺ said:</text:p>
      <text:p text:style-name="P16"><text:soft-page-break/><text:span text:style-name="T1">خَيْرُ النَّاسِ قَرْنِي ثُمَّ الَّذِينَ يَلُونَهُمْ ثُمَّ الَّذِينَ يَلُونَهُمْ</text:span> <text:line-break/><text:span text:style-name="Strong_20_Emphasis">“The best of people are my generation, then those who come after them, then those who come after them.”</text:span><text:line-break/>(Bukhari and Muslim)</text:p>
      <text:p text:style-name="P2">The Salaf followed the Qur’an and Sunnah without distortion or personal desire. They focused on good character, social justice, and obedience to Allah. Their lifestyle shows that strong faith must be reflected through actions, not only words.</text:p>
      <text:p text:style-name="P2">By studying the Salaf, Muslims learn how to practice Islam correctly and avoid moral corruption. Their lives teach humility, responsibility, and balance between worldly life and the hereafter. Therefore, the Salaf are an essential model for building good character and a healthy Islamic society.</text:p>
      <text:p text:style-name="P9"/>
      <text:h text:style-name="P11" text:outline-level="2">B. <text:span text:style-name="Strong_20_Emphasis">Ansar and Muhajir</text:span></text:h>
      <text:p text:style-name="P2">The <text:span text:style-name="Strong_20_Emphasis">Muhajir</text:span> were the Muslims who migrated from <text:span text:style-name="Strong_20_Emphasis">Makkah to Madinah</text:span> to protect their faith, leaving behind their homes and wealth. The <text:span text:style-name="Strong_20_Emphasis">Ansar</text:span> were the people of Madinah who welcomed the Muhajir and helped them with food, shelter, and support. This brotherhood is one of the greatest examples of unity and sacrifice in Islamic history.</text:p>
      <text:p text:style-name="P16">Allah praises both Ansar and Muhajir in the Qur’an:</text:p>
      <text:p text:style-name="P16"><text:span text:style-name="T4">وَالسَّابِقُونَ الْأَوَّلُونَ مِنَ الْمُهَاجِرِينَ وَالْأَنصَارِ</text:span><text:span text:style-name="T5">... </text:span><text:span text:style-name="T4">رَّضِيَ اللَّهُ عَنْهُمْ</text:span><text:span text:style-name="T6"> </text:span><text:line-break/><text:span text:style-name="Strong_20_Emphasis">“And the first forerunners among the Muhajir and the Ansar… Allah is pleased with them.”</text:span><text:line-break/>(Surah At-Tawbah 9:100)</text:p>
      <text:p text:style-name="P2">The Ansar shared their property and lives selflessly, while the Muhajir showed patience and trust in Allah. Their relationship was based on faith, not blood or tribe. This created a strong and united Muslim community.</text:p>
      <text:p text:style-name="P2">The story of Ansar and Muhajir teaches lessons of cooperation, generosity, and social responsibility. It shows how mutual support can remove inequality <text:soft-page-break/>and build peace in society. In modern times, this example reminds us to help migrants, refugees, and the needy with compassion and dignity.</text:p>
      <text:p text:style-name="P9"/>
      <text:h text:style-name="P11" text:outline-level="2">C. <text:span text:style-name="Strong_20_Emphasis">A Prison in Hell Called Bulas</text:span></text:h>
      <text:p text:style-name="P2"><text:span text:style-name="Strong_20_Emphasis">Bulas</text:span> is described in Islamic tradition as a <text:span text:style-name="Strong_20_Emphasis">special prison in Hell</text:span> for arrogant and tyrannical people. It is a place of extreme punishment prepared for those who misused power, oppressed others, and disobeyed Allah knowingly. Such punishment shows that Islam strongly condemns injustice and arrogance.</text:p>
      <text:p text:style-name="P2">The Prophet ﷺ warned against oppression and pride. He said:<text:line-break/><text:span text:style-name="Strong_20_Emphasis">“Oppression will be darkness on the Day of Judgment.”</text:span><text:line-break/>(Muslim)</text:p>
      <text:p text:style-name="P2">People who lie, cheat, or harm others without fear of Allah may face severe consequences in the Hereafter. Bulas represents the final result of continuous injustice and lack of repentance. It reminds believers that worldly power does not protect anyone from Allah’s justice.</text:p>
      <text:p text:style-name="P2">The concept of Bulas teaches moral accountability. Every action has consequences, and no injustice goes unnoticed by Allah. Therefore, Muslims are encouraged to avoid cruelty, act fairly, and seek forgiveness before death. Fear of the Hereafter helps build a just and ethical society.</text:p>
      <text:p text:style-name="P9"/>
      <text:h text:style-name="P11" text:outline-level="2">D. <text:span text:style-name="Strong_20_Emphasis">Jealousy (Hasad) and Ghibtah</text:span></text:h>
      <text:p text:style-name="P2"><text:span text:style-name="Strong_20_Emphasis">Hasad</text:span> means jealousy where a person wishes that another’s blessing be destroyed. It is a negative and harmful trait that creates hatred and dissatisfaction. Islam strictly discourages Hasad because it harms both the heart and society.</text:p>
      <text:p text:style-name="P2">The Prophet ﷺ said:<text:line-break/><text:span text:style-name="Strong_20_Emphasis">“Beware of jealousy, for jealousy destroys good deeds as fire destroys </text:span><text:soft-page-break/><text:span text:style-name="Strong_20_Emphasis">wood.”</text:span><text:line-break/>(Abu Dawood)</text:p>
      <text:p text:style-name="P2">On the other hand, <text:span text:style-name="Strong_20_Emphasis">Ghibtah</text:span> is a positive form of jealousy where a person wishes to have the same blessing without wanting harm to others. Ghibtah is allowed in Islam, especially in matters of knowledge and good deeds.</text:p>
      <text:p text:style-name="P2">Hasad leads to anger, sin, and broken relationships, while Ghibtah motivates self-improvement. Islam teaches believers to be grateful for what they have and trust Allah’s wisdom.</text:p>
      <text:p text:style-name="P2">By avoiding Hasad and practicing Ghibtah, a person can maintain inner peace and social harmony. This distinction helps Muslims develop good character and a healthy mindset.</text:p>
      <text:p text:style-name="P13"><text:span text:style-name="Strong_20_Emphasis"><text:span text:style-name="T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6T20:32:31.046337300</meta:creation-date>
    <dc:date>2026-01-06T20:55:52.321261900</dc:date>
    <meta:editing-duration>PT1M32S</meta:editing-duration>
    <meta:editing-cycles>1</meta:editing-cycles>
    <meta:document-statistic meta:table-count="0" meta:image-count="0" meta:object-count="0" meta:page-count="11" meta:paragraph-count="82" meta:word-count="2532" meta:character-count="15647" meta:non-whitespace-character-count="13178"/>
    <meta:generator>LibreOffice/25.8.3.2$Windows_X86_64 LibreOffice_project/8ca8d55c161d602844f5428fa4b58097424e324e</meta:generator>
  </office:meta>
</office:document-meta>
</file>