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2000000A04D7F717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.PingFangUITextSC" svg:font-family=".PingFangUITextSC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02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6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15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3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44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5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51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3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2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9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79cm" fo:min-width="3.17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4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1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4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279cm" fo:min-width="2.66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40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23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6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7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2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18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1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9.57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77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0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1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7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8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5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6.07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51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84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279cm" fo:min-width="2.81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0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6.8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59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73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64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3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24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22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69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5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5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19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88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43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89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83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74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6.90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29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2.23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5.293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1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solid" svg:stroke-width="0.461cm" svg:stroke-color="#5cff2a" svg:stroke-opacity="50%" draw:stroke-linejoin="round" svg:stroke-linecap="round" draw:fill="none" fo:padding-top="0.23cm" fo:padding-bottom="0.23cm" fo:padding-left="0.23cm" fo:padding-right="0.23cm" loext:decorative="false"/>
    </style:style>
    <style:style style:name="gr67" style:family="graphic" style:parent-style-name="standard">
      <style:graphic-properties draw:stroke="solid" svg:stroke-width="0.03cm" svg:stroke-color="#00cfff" draw:stroke-linejoin="round" svg:stroke-linecap="round" draw:fill="none" fo:padding-top="0.015cm" fo:padding-bottom="0.015cm" fo:padding-left="0.015cm" fo:padding-right="0.015cm" loext:decorative="false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9" style:family="graphic" style:parent-style-name="standard">
      <style:graphic-properties draw:stroke="solid" svg:stroke-width="0.03cm" svg:stroke-color="#ffffff" draw:stroke-linejoin="round" svg:stroke-linecap="round" draw:fill="none" fo:padding-top="0.015cm" fo:padding-bottom="0.015cm" fo:padding-left="0.015cm" fo:padding-right="0.015cm" loext:decorative="fals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84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in-height="0.412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6pt" style:font-size-asian="6pt" style:font-size-complex="6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8.5pt" style:font-size-asian="8.5pt" style:font-size-complex="8.5pt"/>
    </style:style>
    <style:style style:name="P18" style:family="paragraph">
      <loext:graphic-properties draw:fill="none" draw:fill-color="#ffffff"/>
    </style:style>
    <style:style style:name="T1" style:family="text">
      <style:text-properties fo:color="#000000" loext:opacity="100%" style:font-name="TimesNewRoman" fo:font-size="20pt" fo:font-weight="normal" style:font-name-asian="TimesNewRoman" style:font-size-asian="20pt" style:font-weight-asian="normal" style:font-name-complex="TimesNewRoman" style:font-size-complex="20pt" style:font-weight-complex="normal"/>
    </style:style>
    <style:style style:name="T2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style:style style:name="T3" style:family="text">
      <style:text-properties fo:color="#000000" loext:opacity="100%" style:font-name="Calibri" fo:font-size="11pt" fo:font-weight="350" style:font-name-asian="Calibri" style:font-size-asian="11pt" style:font-weight-asian="350" style:font-name-complex="Calibri" style:font-size-complex="11pt" style:font-weight-complex="350"/>
    </style:style>
    <style:style style:name="T4" style:family="text">
      <style:text-properties fo:color="#000000" loext:opacity="100%" style:font-name="Calibri" fo:font-size="18pt" fo:font-weight="350" style:font-name-asian="Calibri" style:font-size-asian="18pt" style:font-weight-asian="350" style:font-name-complex="Calibri" style:font-size-complex="18pt" style:font-weight-complex="350"/>
    </style:style>
    <style:style style:name="T5" style:family="text">
      <style:text-properties fo:color="#000000" loext:opacity="100%" style:font-name="Calibri" fo:font-size="8pt" fo:font-weight="350" style:font-name-asian="Calibri" style:font-size-asian="8pt" style:font-weight-asian="350" style:font-name-complex="Calibri" style:font-size-complex="8pt" style:font-weight-complex="350"/>
    </style:style>
    <style:style style:name="T6" style:family="text">
      <style:text-properties fo:color="#000000" loext:opacity="100%" style:font-name="Calibri" fo:font-size="12pt" fo:font-weight="350" style:font-name-asian="Calibri" style:font-size-asian="12pt" style:font-weight-asian="350" style:font-name-complex="Calibri" style:font-size-complex="12pt" style:font-weight-complex="350"/>
    </style:style>
    <style:style style:name="T7" style:family="text">
      <style:text-properties fo:color="#000000" loext:opacity="100%" style:font-name="Calibri" fo:font-size="20pt" fo:font-weight="350" style:font-name-asian="Calibri" style:font-size-asian="20pt" style:font-weight-asian="350" style:font-name-complex="Calibri" style:font-size-complex="20pt" style:font-weight-complex="350"/>
    </style:style>
    <style:style style:name="T8" style:family="text">
      <style:text-properties fo:color="#000000" loext:opacity="100%" style:font-name="Calibri" fo:font-size="9pt" fo:font-weight="350" style:font-name-asian="Calibri" style:font-size-asian="9pt" style:font-weight-asian="350" style:font-name-complex="Calibri" style:font-size-complex="9pt" style:font-weight-complex="350"/>
    </style:style>
    <style:style style:name="T9" style:family="text">
      <style:text-properties fo:color="#000000" loext:opacity="100%" style:font-name="Calibri" fo:font-size="10pt" fo:font-weight="350" style:font-name-asian="Calibri" style:font-size-asian="10pt" style:font-weight-asian="350" style:font-name-complex="Calibri" style:font-size-complex="10pt" style:font-weight-complex="350"/>
    </style:style>
    <style:style style:name="T10" style:family="text">
      <style:text-properties fo:color="#000000" loext:opacity="100%" style:font-name="Calibri" fo:font-size="14pt" fo:font-weight="350" style:font-name-asian="Calibri" style:font-size-asian="14pt" style:font-weight-asian="350" style:font-name-complex="Calibri" style:font-size-complex="14pt" style:font-weight-complex="350"/>
    </style:style>
    <style:style style:name="T11" style:family="text">
      <style:text-properties fo:color="#000000" loext:opacity="100%" style:font-name="Calibri" fo:font-size="6pt" fo:font-weight="350" style:font-name-asian="Calibri" style:font-size-asian="6pt" style:font-weight-asian="350" style:font-name-complex="Calibri" style:font-size-complex="6pt" style:font-weight-complex="350"/>
    </style:style>
    <style:style style:name="T12" style:family="text">
      <style:text-properties fo:color="#000000" loext:opacity="100%" style:font-name="Calibri" fo:font-size="16pt" fo:font-weight="350" style:font-name-asian="Calibri" style:font-size-asian="16pt" style:font-weight-asian="350" style:font-name-complex="Calibri" style:font-size-complex="16pt" style:font-weight-complex="350"/>
    </style:style>
    <style:style style:name="T13" style:family="text">
      <style:text-properties fo:color="#000000" loext:opacity="100%" style:font-name=".PingFangUITextSC" fo:font-size="8.5pt" fo:font-weight="normal" style:font-name-asian=".PingFangUITextSC" style:font-size-asian="8.5pt" style:font-weight-asian="normal" style:font-name-complex=".PingFangUITextSC" style:font-size-complex="8.5pt" style:font-weight-complex="normal" style:text-scale="95%"/>
    </style:style>
    <style:style style:name="T1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028cm" svg:height="0.784cm" svg:x="12.051cm" svg:y="1.304cm">
          <draw:text-box>
            <text:p text:style-name="P1"><text:span text:style-name="T1">BSc SWE 1st </text:span></text:p>
          </draw:text-box>
        </draw:frame>
        <draw:frame draw:style-name="gr2" draw:text-style-name="P3" draw:layer="layout" svg:width="0.634cm" svg:height="0.704cm" svg:x="2.541cm" svg:y="17.64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7cm" svg:height="0.39cm" svg:x="1.827cm" svg:y="2.479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0.634cm" svg:height="0.64cm" svg:x="5.752cm" svg:y="2.215cm">
          <draw:text-box>
            <text:p text:style-name="P1"><text:span text:style-name="T4">1 </text:span></text:p>
          </draw:text-box>
        </draw:frame>
        <draw:frame draw:style-name="gr5" draw:text-style-name="P5" draw:layer="layout" svg:width="1.159cm" svg:height="0.285cm" svg:x="5.373cm" svg:y="2.911cm">
          <draw:text-box>
            <text:p text:style-name="P1"><text:span text:style-name="T5">8.00-9.15 </text:span></text:p>
          </draw:text-box>
        </draw:frame>
        <draw:frame draw:style-name="gr4" draw:text-style-name="P3" draw:layer="layout" svg:width="0.634cm" svg:height="0.64cm" svg:x="9.431cm" svg:y="2.215cm">
          <draw:text-box>
            <text:p text:style-name="P1"><text:span text:style-name="T4">2 </text:span></text:p>
          </draw:text-box>
        </draw:frame>
        <draw:frame draw:style-name="gr6" draw:text-style-name="P5" draw:layer="layout" svg:width="1.302cm" svg:height="0.285cm" svg:x="8.981cm" svg:y="2.911cm">
          <draw:text-box>
            <text:p text:style-name="P1"><text:span text:style-name="T5">9.15-10.30 </text:span></text:p>
          </draw:text-box>
        </draw:frame>
        <draw:frame draw:style-name="gr4" draw:text-style-name="P3" draw:layer="layout" svg:width="0.634cm" svg:height="0.64cm" svg:x="12.996cm" svg:y="2.215cm">
          <draw:text-box>
            <text:p text:style-name="P1"><text:span text:style-name="T4">3 </text:span></text:p>
          </draw:text-box>
        </draw:frame>
        <draw:frame draw:style-name="gr7" draw:text-style-name="P5" draw:layer="layout" svg:width="1.446cm" svg:height="0.285cm" svg:x="12.475cm" svg:y="2.911cm">
          <draw:text-box>
            <text:p text:style-name="P1"><text:span text:style-name="T5">10.30-11.45 </text:span></text:p>
          </draw:text-box>
        </draw:frame>
        <draw:frame draw:style-name="gr4" draw:text-style-name="P3" draw:layer="layout" svg:width="0.634cm" svg:height="0.64cm" svg:x="16.498cm" svg:y="2.215cm">
          <draw:text-box>
            <text:p text:style-name="P1"><text:span text:style-name="T4">4 </text:span></text:p>
          </draw:text-box>
        </draw:frame>
        <draw:frame draw:style-name="gr7" draw:text-style-name="P5" draw:layer="layout" svg:width="1.446cm" svg:height="0.285cm" svg:x="15.968cm" svg:y="2.911cm">
          <draw:text-box>
            <text:p text:style-name="P1"><text:span text:style-name="T5">11.45-13.00 </text:span></text:p>
          </draw:text-box>
        </draw:frame>
        <draw:frame draw:style-name="gr8" draw:text-style-name="P6" draw:layer="layout" svg:width="2.158cm" svg:height="0.425cm" svg:x="18.536cm" svg:y="2.471cm">
          <draw:text-box>
            <text:p text:style-name="P1"><text:span text:style-name="T6">13.00-14.30 </text:span></text:p>
          </draw:text-box>
        </draw:frame>
        <draw:frame draw:style-name="gr4" draw:text-style-name="P3" draw:layer="layout" svg:width="0.634cm" svg:height="0.64cm" svg:x="22.267cm" svg:y="2.215cm">
          <draw:text-box>
            <text:p text:style-name="P1"><text:span text:style-name="T4">5 </text:span></text:p>
          </draw:text-box>
        </draw:frame>
        <draw:frame draw:style-name="gr7" draw:text-style-name="P5" draw:layer="layout" svg:width="1.446cm" svg:height="0.285cm" svg:x="21.738cm" svg:y="2.911cm">
          <draw:text-box>
            <text:p text:style-name="P1"><text:span text:style-name="T5">14.30-15.45 </text:span></text:p>
          </draw:text-box>
        </draw:frame>
        <draw:frame draw:style-name="gr4" draw:text-style-name="P3" draw:layer="layout" svg:width="0.634cm" svg:height="0.64cm" svg:x="25.011cm" svg:y="2.215cm">
          <draw:text-box>
            <text:p text:style-name="P1"><text:span text:style-name="T4">6 </text:span></text:p>
          </draw:text-box>
        </draw:frame>
        <draw:polygon draw:style-name="gr9" draw:text-style-name="P7" draw:layer="layout" svg:width="0.018cm" svg:height="0.018cm" svg:x="1.632cm" svg:y="2.064cm" svg:viewBox="0 0 19 19" draw:points="0,0 19,0 19,19 0,19">
          <text:p/>
        </draw:polygon>
        <draw:polygon draw:style-name="gr9" draw:text-style-name="P7" draw:layer="layout" svg:width="0.018cm" svg:height="0.018cm" svg:x="1.632cm" svg:y="2.064cm" svg:viewBox="0 0 19 19" draw:points="0,0 19,0 19,19 0,19">
          <text:p/>
        </draw:polygon>
        <draw:polygon draw:style-name="gr9" draw:text-style-name="P7" draw:layer="layout" svg:width="2.31cm" svg:height="0.018cm" svg:x="1.65cm" svg:y="2.064cm" svg:viewBox="0 0 2311 19" draw:points="0,0 2311,0 2311,19 0,19">
          <text:p/>
        </draw:polygon>
        <draw:polygon draw:style-name="gr9" draw:text-style-name="P7" draw:layer="layout" svg:width="0.018cm" svg:height="0.018cm" svg:x="3.96cm" svg:y="2.064cm" svg:viewBox="0 0 19 19" draw:points="0,0 19,0 19,19 0,19">
          <text:p/>
        </draw:polygon>
        <draw:polygon draw:style-name="gr9" draw:text-style-name="P7" draw:layer="layout" svg:width="3.891cm" svg:height="0.018cm" svg:x="3.978cm" svg:y="2.064cm" svg:viewBox="0 0 3892 19" draw:points="0,0 3892,0 3892,19 0,19">
          <text:p/>
        </draw:polygon>
        <draw:polygon draw:style-name="gr9" draw:text-style-name="P7" draw:layer="layout" svg:width="0.018cm" svg:height="0.018cm" svg:x="7.869cm" svg:y="2.064cm" svg:viewBox="0 0 19 19" draw:points="0,0 19,0 19,19 0,19">
          <text:p/>
        </draw:polygon>
        <draw:polygon draw:style-name="gr9" draw:text-style-name="P7" draw:layer="layout" svg:width="3.423cm" svg:height="0.018cm" svg:x="7.887cm" svg:y="2.064cm" svg:viewBox="0 0 3424 19" draw:points="0,0 3424,0 3424,19 0,19">
          <text:p/>
        </draw:polygon>
        <draw:polygon draw:style-name="gr9" draw:text-style-name="P7" draw:layer="layout" svg:width="0.017cm" svg:height="0.018cm" svg:x="11.31cm" svg:y="2.064cm" svg:viewBox="0 0 18 19" draw:points="0,0 18,0 18,19 0,19">
          <text:p/>
        </draw:polygon>
        <draw:polygon draw:style-name="gr9" draw:text-style-name="P7" draw:layer="layout" svg:width="3.67cm" svg:height="0.018cm" svg:x="11.327cm" svg:y="2.064cm" svg:viewBox="0 0 3671 19" draw:points="0,0 3671,0 3671,19 0,19">
          <text:p/>
        </draw:polygon>
        <draw:polygon draw:style-name="gr9" draw:text-style-name="P7" draw:layer="layout" svg:width="0.018cm" svg:height="0.018cm" svg:x="14.997cm" svg:y="2.064cm" svg:viewBox="0 0 19 19" draw:points="0,0 19,0 19,19 0,19">
          <text:p/>
        </draw:polygon>
        <draw:polygon draw:style-name="gr9" draw:text-style-name="P7" draw:layer="layout" svg:width="3.291cm" svg:height="0.018cm" svg:x="15.015cm" svg:y="2.064cm" svg:viewBox="0 0 3292 19" draw:points="0,0 3292,0 3292,19 0,19">
          <text:p/>
        </draw:polygon>
        <draw:polygon draw:style-name="gr9" draw:text-style-name="P7" draw:layer="layout" svg:width="0.017cm" svg:height="0.018cm" svg:x="18.306cm" svg:y="2.064cm" svg:viewBox="0 0 18 19" draw:points="0,0 18,0 18,19 0,19">
          <text:p/>
        </draw:polygon>
        <draw:polygon draw:style-name="gr9" draw:text-style-name="P7" draw:layer="layout" svg:width="2.497cm" svg:height="0.018cm" svg:x="18.323cm" svg:y="2.064cm" svg:viewBox="0 0 2498 19" draw:points="0,0 2498,0 2498,19 0,19">
          <text:p/>
        </draw:polygon>
        <draw:polygon draw:style-name="gr9" draw:text-style-name="P7" draw:layer="layout" svg:width="0.018cm" svg:height="0.018cm" svg:x="20.82cm" svg:y="2.064cm" svg:viewBox="0 0 19 19" draw:points="0,0 19,0 19,19 0,19">
          <text:p/>
        </draw:polygon>
        <draw:polygon draw:style-name="gr9" draw:text-style-name="P7" draw:layer="layout" svg:width="3.185cm" svg:height="0.018cm" svg:x="20.838cm" svg:y="2.064cm" svg:viewBox="0 0 3186 19" draw:points="0,0 3186,0 3186,19 0,19">
          <text:p/>
        </draw:polygon>
        <draw:polygon draw:style-name="gr9" draw:text-style-name="P7" draw:layer="layout" svg:width="0.018cm" svg:height="0.018cm" svg:x="24.023cm" svg:y="2.064cm" svg:viewBox="0 0 19 19" draw:points="0,0 19,0 19,19 0,19">
          <text:p/>
        </draw:polygon>
        <draw:polygon draw:style-name="gr9" draw:text-style-name="P7" draw:layer="layout" svg:width="2.267cm" svg:height="0.018cm" svg:x="24.041cm" svg:y="2.064cm" svg:viewBox="0 0 2268 19" draw:points="0,0 2268,0 2268,19 0,19">
          <text:p/>
        </draw:polygon>
        <draw:polygon draw:style-name="gr9" draw:text-style-name="P7" draw:layer="layout" svg:width="0.018cm" svg:height="0.018cm" svg:x="26.308cm" svg:y="2.064cm" svg:viewBox="0 0 19 19" draw:points="0,0 19,0 19,19 0,19">
          <text:p/>
        </draw:polygon>
        <draw:polygon draw:style-name="gr9" draw:text-style-name="P7" draw:layer="layout" svg:width="0.018cm" svg:height="0.018cm" svg:x="26.308cm" svg:y="2.064cm" svg:viewBox="0 0 19 19" draw:points="0,0 19,0 19,19 0,19">
          <text:p/>
        </draw:polygon>
        <draw:polygon draw:style-name="gr9" draw:text-style-name="P7" draw:layer="layout" svg:width="0.018cm" svg:height="1.121cm" svg:x="1.632cm" svg:y="2.082cm" svg:viewBox="0 0 19 1122" draw:points="0,0 19,0 19,1122 0,1122">
          <text:p/>
        </draw:polygon>
        <draw:polygon draw:style-name="gr9" draw:text-style-name="P7" draw:layer="layout" svg:width="0.018cm" svg:height="1.121cm" svg:x="3.96cm" svg:y="2.082cm" svg:viewBox="0 0 19 1122" draw:points="0,0 19,0 19,1122 0,1122">
          <text:p/>
        </draw:polygon>
        <draw:polygon draw:style-name="gr9" draw:text-style-name="P7" draw:layer="layout" svg:width="0.018cm" svg:height="1.121cm" svg:x="7.869cm" svg:y="2.082cm" svg:viewBox="0 0 19 1122" draw:points="0,0 19,0 19,1122 0,1122">
          <text:p/>
        </draw:polygon>
        <draw:polygon draw:style-name="gr9" draw:text-style-name="P7" draw:layer="layout" svg:width="0.017cm" svg:height="1.121cm" svg:x="11.31cm" svg:y="2.082cm" svg:viewBox="0 0 18 1122" draw:points="0,0 18,0 18,1122 0,1122">
          <text:p/>
        </draw:polygon>
        <draw:polygon draw:style-name="gr9" draw:text-style-name="P7" draw:layer="layout" svg:width="0.018cm" svg:height="1.121cm" svg:x="14.997cm" svg:y="2.082cm" svg:viewBox="0 0 19 1122" draw:points="0,0 19,0 19,1122 0,1122">
          <text:p/>
        </draw:polygon>
        <draw:polygon draw:style-name="gr9" draw:text-style-name="P7" draw:layer="layout" svg:width="0.017cm" svg:height="1.121cm" svg:x="18.306cm" svg:y="2.082cm" svg:viewBox="0 0 18 1122" draw:points="0,0 18,0 18,1122 0,1122">
          <text:p/>
        </draw:polygon>
        <draw:polygon draw:style-name="gr9" draw:text-style-name="P7" draw:layer="layout" svg:width="0.018cm" svg:height="1.121cm" svg:x="20.82cm" svg:y="2.082cm" svg:viewBox="0 0 19 1122" draw:points="0,0 19,0 19,1122 0,1122">
          <text:p/>
        </draw:polygon>
        <draw:polygon draw:style-name="gr9" draw:text-style-name="P7" draw:layer="layout" svg:width="0.018cm" svg:height="1.121cm" svg:x="24.023cm" svg:y="2.082cm" svg:viewBox="0 0 19 1122" draw:points="0,0 19,0 19,1122 0,1122">
          <text:p/>
        </draw:polygon>
        <draw:polygon draw:style-name="gr9" draw:text-style-name="P7" draw:layer="layout" svg:width="0.018cm" svg:height="1.121cm" svg:x="26.308cm" svg:y="2.082cm" svg:viewBox="0 0 19 1122" draw:points="0,0 19,0 19,1122 0,1122">
          <text:p/>
        </draw:polygon>
        <draw:frame draw:style-name="gr7" draw:text-style-name="P5" draw:layer="layout" svg:width="1.446cm" svg:height="0.285cm" svg:x="24.482cm" svg:y="2.911cm">
          <draw:text-box>
            <text:p text:style-name="P1"><text:span text:style-name="T5">15.45-17.00 </text:span></text:p>
          </draw:text-box>
        </draw:frame>
        <draw:frame draw:style-name="gr10" draw:text-style-name="P2" draw:layer="layout" svg:width="1.511cm" svg:height="0.708cm" svg:x="2.135cm" svg:y="4.403cm">
          <draw:text-box>
            <text:p text:style-name="P1"><text:span text:style-name="T7">Mon </text:span></text:p>
          </draw:text-box>
        </draw:frame>
        <draw:frame draw:style-name="gr11" draw:text-style-name="P8" draw:layer="layout" svg:width="4.238cm" svg:height="0.319cm" svg:x="4.056cm" svg:y="3.288cm">
          <draw:text-box>
            <text:p text:style-name="P1"><text:span text:style-name="T8">R-508 <text:s text:c="22"/></text:span><text:span text:style-name="T8"><text:tab/></text:span><text:span text:style-name="T8"> <text:s text:c="8"/>SHU <text:s text:c="6"/></text:span></text:p>
          </draw:text-box>
        </draw:frame>
        <draw:frame draw:style-name="gr12" draw:text-style-name="P8" draw:layer="layout" svg:width="0.317cm" svg:height="0.319cm" svg:x="7.491cm" svg:y="3.388cm">
          <draw:text-box>
            <text:p text:style-name="P1"><text:span text:style-name="T8"><text:s/></text:span></text:p>
          </draw:text-box>
        </draw:frame>
        <draw:frame draw:style-name="gr4" draw:text-style-name="P3" draw:layer="layout" svg:width="0.634cm" svg:height="0.64cm" svg:x="4.156cm" svg:y="3.865cm">
          <draw:text-box>
            <text:p text:style-name="P1"><text:span text:style-name="T4"><text:s/></text:span></text:p>
          </draw:text-box>
        </draw:frame>
        <draw:frame draw:style-name="gr13" draw:text-style-name="P3" draw:layer="layout" svg:width="2.526cm" svg:height="0.64cm" svg:x="4.729cm" svg:y="4.641cm">
          <draw:text-box>
            <text:p text:style-name="P1"><text:span text:style-name="T4">Phy 4143 </text:span></text:p>
          </draw:text-box>
        </draw:frame>
        <draw:frame draw:style-name="gr14" draw:text-style-name="P8" draw:layer="layout" svg:width="3.298cm" svg:height="0.319cm" svg:x="7.964cm" svg:y="3.283cm">
          <draw:text-box>
            <text:p text:style-name="P1"><text:span text:style-name="T8">R-508 <text:s text:c="30"/>BS</text:span></text:p>
          </draw:text-box>
        </draw:frame>
        <draw:frame draw:style-name="gr4" draw:text-style-name="P3" draw:layer="layout" svg:width="0.634cm" svg:height="0.64cm" svg:x="10.781cm" svg:y="3.044cm">
          <draw:text-box>
            <text:p text:style-name="P1"><text:span text:style-name="T4"><text:s/></text:span></text:p>
          </draw:text-box>
        </draw:frame>
        <draw:frame draw:style-name="gr4" draw:text-style-name="P3" draw:layer="layout" svg:width="0.634cm" svg:height="0.64cm" svg:x="8.064cm" svg:y="3.741cm">
          <draw:text-box>
            <text:p text:style-name="P1"><text:span text:style-name="T4"><text:s text:c="2"/></text:span></text:p>
          </draw:text-box>
        </draw:frame>
        <draw:frame draw:style-name="gr15" draw:text-style-name="P9" draw:layer="layout" svg:width="3.175cm" svg:height="1.279cm" svg:x="8.067cm" svg:y="4.157cm">
          <draw:text-box>
            <text:p text:style-name="P1"><text:span text:style-name="T4"><text:s/>Hum <text:s/>4147 </text:span><text:span text:style-name="T4"><text:line-break/></text:span><text:span text:style-name="T4"> <text:s text:c="5"/>- TES</text:span></text:p>
          </draw:text-box>
        </draw:frame>
        <draw:frame draw:style-name="gr16" draw:text-style-name="P10" draw:layer="layout" svg:width="3.547cm" svg:height="0.352cm" svg:x="11.392cm" svg:y="3.291cm">
          <draw:text-box>
            <text:p text:style-name="P1"><text:span text:style-name="T9">R-508 <text:s text:c="30"/>SI</text:span></text:p>
          </draw:text-box>
        </draw:frame>
        <draw:frame draw:style-name="gr17" draw:text-style-name="P5" draw:layer="layout" svg:width="0.281cm" svg:height="0.285cm" svg:x="14.028cm" svg:y="3.344cm">
          <draw:text-box>
            <text:p text:style-name="P1"><text:span text:style-name="T5"><text:s/></text:span></text:p>
          </draw:text-box>
        </draw:frame>
        <draw:frame draw:style-name="gr4" draw:text-style-name="P3" draw:layer="layout" svg:width="0.634cm" svg:height="0.64cm" svg:x="13.154cm" svg:y="3.785cm">
          <draw:text-box>
            <text:p text:style-name="P1"><text:span text:style-name="T4"><text:s/></text:span></text:p>
          </draw:text-box>
        </draw:frame>
        <draw:frame draw:style-name="gr18" draw:text-style-name="P3" draw:layer="layout" svg:width="2.517cm" svg:height="0.64cm" svg:x="11.972cm" svg:y="4.561cm">
          <draw:text-box>
            <text:p text:style-name="P1"><text:span text:style-name="T4">CSE 4107 </text:span></text:p>
          </draw:text-box>
        </draw:frame>
        <draw:frame draw:style-name="gr19" draw:text-style-name="P8" draw:layer="layout" svg:width="3.146cm" svg:height="0.319cm" svg:x="15.092cm" svg:y="3.283cm">
          <draw:text-box>
            <text:p text:style-name="P1"><text:span text:style-name="T8">R-508 <text:s text:c="22"/>MMH</text:span></text:p>
          </draw:text-box>
        </draw:frame>
        <draw:frame draw:style-name="gr4" draw:text-style-name="P3" draw:layer="layout" svg:width="0.634cm" svg:height="0.64cm" svg:x="17.821cm" svg:y="3.044cm">
          <draw:text-box>
            <text:p text:style-name="P1"><text:span text:style-name="T4"><text:s/></text:span></text:p>
          </draw:text-box>
        </draw:frame>
        <draw:frame draw:style-name="gr20" draw:text-style-name="P3" draw:layer="layout" svg:width="2.669cm" svg:height="1.279cm" svg:x="15.325cm" svg:y="3.741cm">
          <draw:text-box>
            <text:p text:style-name="P1"><text:span text:style-name="T4">Hum 4145</text:span><text:span text:style-name="T4"><text:line-break/></text:span><text:span text:style-name="T4"> - Islamiat</text:span></text:p>
          </draw:text-box>
        </draw:frame>
        <draw:frame draw:style-name="gr21" draw:text-style-name="P3" draw:layer="layout" svg:width="2.409cm" svg:height="0.64cm" svg:x="15.501cm" svg:y="5.105cm">
          <draw:text-box>
            <text:p text:style-name="P1"><text:span text:style-name="T4">(50mins) </text:span></text:p>
          </draw:text-box>
        </draw:frame>
        <draw:frame draw:style-name="gr22" draw:text-style-name="P3" draw:layer="layout" svg:width="6.238cm" svg:height="0.64cm" draw:transform="rotate (1.5707963267949) translate (19.412cm 13.128cm)">
          <draw:text-box>
            <text:p text:style-name="P1"><text:span text:style-name="T4">Lunch and Prayer Break </text:span></text:p>
          </draw:text-box>
        </draw:frame>
        <draw:frame draw:style-name="gr23" draw:text-style-name="P11" draw:layer="layout" svg:width="5.464cm" svg:height="0.352cm" svg:x="20.878cm" svg:y="3.288cm">
          <draw:text-box>
            <text:p text:style-name="P1"><text:span text:style-name="T9">SI/MIA <text:s text:c="48"/>L-1 <text:s/></text:span></text:p>
          </draw:text-box>
        </draw:frame>
        <draw:frame draw:style-name="gr24" draw:text-style-name="P3" draw:layer="layout" svg:width="2.73cm" svg:height="0.64cm" svg:x="22.505cm" svg:y="3.644cm">
          <draw:text-box>
            <text:p text:style-name="P1"><text:span text:style-name="T4"><text:s text:c="19"/></text:span></text:p>
          </draw:text-box>
        </draw:frame>
        <draw:frame draw:style-name="gr18" draw:text-style-name="P3" draw:layer="layout" svg:width="2.517cm" svg:height="0.64cm" svg:x="22.382cm" svg:y="4.35cm">
          <draw:text-box>
            <text:p text:style-name="P1"><text:span text:style-name="T4">CSE 4108 </text:span></text:p>
          </draw:text-box>
        </draw:frame>
        <draw:polygon draw:style-name="gr9" draw:text-style-name="P7" draw:layer="layout" svg:width="0.018cm" svg:height="0.017cm" svg:x="1.632cm" svg:y="3.203cm" svg:viewBox="0 0 19 18" draw:points="0,0 19,0 19,18 0,18">
          <text:p/>
        </draw:polygon>
        <draw:polygon draw:style-name="gr9" draw:text-style-name="P7" draw:layer="layout" svg:width="2.31cm" svg:height="0.017cm" svg:x="1.65cm" svg:y="3.203cm" svg:viewBox="0 0 2311 18" draw:points="0,0 2311,0 2311,18 0,18">
          <text:p/>
        </draw:polygon>
        <draw:polygon draw:style-name="gr9" draw:text-style-name="P7" draw:layer="layout" svg:width="0.018cm" svg:height="0.017cm" svg:x="3.96cm" svg:y="3.203cm" svg:viewBox="0 0 19 18" draw:points="0,0 19,0 19,18 0,18">
          <text:p/>
        </draw:polygon>
        <draw:polygon draw:style-name="gr9" draw:text-style-name="P7" draw:layer="layout" svg:width="3.891cm" svg:height="0.017cm" svg:x="3.978cm" svg:y="3.203cm" svg:viewBox="0 0 3892 18" draw:points="0,0 3892,0 3892,18 0,18">
          <text:p/>
        </draw:polygon>
        <draw:polygon draw:style-name="gr9" draw:text-style-name="P7" draw:layer="layout" svg:width="0.018cm" svg:height="0.017cm" svg:x="7.869cm" svg:y="3.203cm" svg:viewBox="0 0 19 18" draw:points="0,0 19,0 19,18 0,18">
          <text:p/>
        </draw:polygon>
        <draw:polygon draw:style-name="gr9" draw:text-style-name="P7" draw:layer="layout" svg:width="3.423cm" svg:height="0.017cm" svg:x="7.887cm" svg:y="3.203cm" svg:viewBox="0 0 3424 18" draw:points="0,0 3424,0 3424,18 0,18">
          <text:p/>
        </draw:polygon>
        <draw:polygon draw:style-name="gr9" draw:text-style-name="P7" draw:layer="layout" svg:width="0.017cm" svg:height="0.017cm" svg:x="11.31cm" svg:y="3.203cm" svg:viewBox="0 0 18 18" draw:points="0,0 18,0 18,18 0,18">
          <text:p/>
        </draw:polygon>
        <draw:polygon draw:style-name="gr9" draw:text-style-name="P7" draw:layer="layout" svg:width="3.67cm" svg:height="0.017cm" svg:x="11.327cm" svg:y="3.203cm" svg:viewBox="0 0 3671 18" draw:points="0,0 3671,0 3671,18 0,18">
          <text:p/>
        </draw:polygon>
        <draw:polygon draw:style-name="gr9" draw:text-style-name="P7" draw:layer="layout" svg:width="0.018cm" svg:height="0.017cm" svg:x="14.997cm" svg:y="3.203cm" svg:viewBox="0 0 19 18" draw:points="0,0 19,0 19,18 0,18">
          <text:p/>
        </draw:polygon>
        <draw:polygon draw:style-name="gr9" draw:text-style-name="P7" draw:layer="layout" svg:width="3.291cm" svg:height="0.017cm" svg:x="15.015cm" svg:y="3.203cm" svg:viewBox="0 0 3292 18" draw:points="0,0 3292,0 3292,18 0,18">
          <text:p/>
        </draw:polygon>
        <draw:polygon draw:style-name="gr9" draw:text-style-name="P7" draw:layer="layout" svg:width="0.017cm" svg:height="0.017cm" svg:x="18.306cm" svg:y="3.203cm" svg:viewBox="0 0 18 18" draw:points="0,0 18,0 18,18 0,18">
          <text:p/>
        </draw:polygon>
        <draw:polygon draw:style-name="gr9" draw:text-style-name="P7" draw:layer="layout" svg:width="2.497cm" svg:height="0.017cm" svg:x="18.323cm" svg:y="3.203cm" svg:viewBox="0 0 2498 18" draw:points="0,0 2498,0 2498,18 0,18">
          <text:p/>
        </draw:polygon>
        <draw:polygon draw:style-name="gr9" draw:text-style-name="P7" draw:layer="layout" svg:width="0.018cm" svg:height="0.017cm" svg:x="20.82cm" svg:y="3.203cm" svg:viewBox="0 0 19 18" draw:points="0,0 19,0 19,18 0,18">
          <text:p/>
        </draw:polygon>
        <draw:polygon draw:style-name="gr9" draw:text-style-name="P7" draw:layer="layout" svg:width="3.185cm" svg:height="0.017cm" svg:x="20.838cm" svg:y="3.203cm" svg:viewBox="0 0 3186 18" draw:points="0,0 3186,0 3186,18 0,18">
          <text:p/>
        </draw:polygon>
        <draw:polygon draw:style-name="gr9" draw:text-style-name="P7" draw:layer="layout" svg:width="0.018cm" svg:height="0.017cm" svg:x="24.023cm" svg:y="3.203cm" svg:viewBox="0 0 19 18" draw:points="0,0 19,0 19,18 0,18">
          <text:p/>
        </draw:polygon>
        <draw:polygon draw:style-name="gr9" draw:text-style-name="P7" draw:layer="layout" svg:width="2.267cm" svg:height="0.017cm" svg:x="24.041cm" svg:y="3.203cm" svg:viewBox="0 0 2268 18" draw:points="0,0 2268,0 2268,18 0,18">
          <text:p/>
        </draw:polygon>
        <draw:polygon draw:style-name="gr9" draw:text-style-name="P7" draw:layer="layout" svg:width="0.018cm" svg:height="0.017cm" svg:x="26.308cm" svg:y="3.203cm" svg:viewBox="0 0 19 18" draw:points="0,0 19,0 19,18 0,18">
          <text:p/>
        </draw:polygon>
        <draw:polygon draw:style-name="gr9" draw:text-style-name="P7" draw:layer="layout" svg:width="0.018cm" svg:height="2.938cm" svg:x="1.632cm" svg:y="3.22cm" svg:viewBox="0 0 19 2939" draw:points="0,0 19,0 19,2939 0,2939">
          <text:p/>
        </draw:polygon>
        <draw:polygon draw:style-name="gr9" draw:text-style-name="P7" draw:layer="layout" svg:width="0.018cm" svg:height="2.938cm" svg:x="3.96cm" svg:y="3.22cm" svg:viewBox="0 0 19 2939" draw:points="0,0 19,0 19,2939 0,2939">
          <text:p/>
        </draw:polygon>
        <draw:polygon draw:style-name="gr9" draw:text-style-name="P7" draw:layer="layout" svg:width="0.018cm" svg:height="2.938cm" svg:x="7.869cm" svg:y="3.22cm" svg:viewBox="0 0 19 2939" draw:points="0,0 19,0 19,2939 0,2939">
          <text:p/>
        </draw:polygon>
        <draw:polygon draw:style-name="gr9" draw:text-style-name="P7" draw:layer="layout" svg:width="0.017cm" svg:height="2.938cm" svg:x="11.31cm" svg:y="3.22cm" svg:viewBox="0 0 18 2939" draw:points="0,0 18,0 18,2939 0,2939">
          <text:p/>
        </draw:polygon>
        <draw:polygon draw:style-name="gr9" draw:text-style-name="P7" draw:layer="layout" svg:width="0.018cm" svg:height="2.938cm" svg:x="14.997cm" svg:y="3.22cm" svg:viewBox="0 0 19 2939" draw:points="0,0 19,0 19,2939 0,2939">
          <text:p/>
        </draw:polygon>
        <draw:polygon draw:style-name="gr9" draw:text-style-name="P7" draw:layer="layout" svg:width="0.017cm" svg:height="2.938cm" svg:x="18.306cm" svg:y="3.22cm" svg:viewBox="0 0 18 2939" draw:points="0,0 18,0 18,2939 0,2939">
          <text:p/>
        </draw:polygon>
        <draw:polygon draw:style-name="gr9" draw:text-style-name="P7" draw:layer="layout" svg:width="0.018cm" svg:height="2.938cm" svg:x="20.82cm" svg:y="3.22cm" svg:viewBox="0 0 19 2939" draw:points="0,0 19,0 19,2939 0,2939">
          <text:p/>
        </draw:polygon>
        <draw:polygon draw:style-name="gr9" draw:text-style-name="P7" draw:layer="layout" svg:width="0.018cm" svg:height="2.938cm" svg:x="26.308cm" svg:y="3.22cm" svg:viewBox="0 0 19 2939" draw:points="0,0 19,0 19,2939 0,2939">
          <text:p/>
        </draw:polygon>
        <draw:frame draw:style-name="gr25" draw:text-style-name="P12" draw:layer="layout" svg:width="0.493cm" svg:height="0.497cm" svg:x="21.015cm" svg:y="5.092cm">
          <draw:text-box>
            <text:p text:style-name="P1"><text:span text:style-name="T10">B </text:span></text:p>
          </draw:text-box>
        </draw:frame>
        <draw:frame draw:style-name="gr26" draw:text-style-name="P2" draw:layer="layout" svg:width="1.23cm" svg:height="0.708cm" svg:x="2.267cm" svg:y="7.579cm">
          <draw:text-box>
            <text:p text:style-name="P1"><text:span text:style-name="T7">Tue </text:span></text:p>
          </draw:text-box>
        </draw:frame>
        <draw:frame draw:style-name="gr27" draw:text-style-name="P13" draw:layer="layout" svg:width="7.186cm" svg:height="0.319cm" svg:x="4.056cm" svg:y="6.235cm">
          <draw:text-box>
            <text:p text:style-name="P1"><text:span text:style-name="T5">A <text:s text:c="90"/></text:span><text:span text:style-name="T8">SHU/FAK</text:span></text:p>
          </draw:text-box>
        </draw:frame>
        <draw:frame draw:style-name="gr28" draw:text-style-name="P3" draw:layer="layout" svg:width="3.53cm" svg:height="0.64cm" svg:x="6.164cm" svg:y="6.67cm">
          <draw:text-box>
            <text:p text:style-name="P1"><text:span text:style-name="T4">Phy 4144 <text:s text:c="7"/></text:span></text:p>
          </draw:text-box>
        </draw:frame>
        <draw:frame draw:style-name="gr29" draw:text-style-name="P14" draw:layer="layout" svg:width="0.211cm" svg:height="0.217cm" svg:x="10.71cm" svg:y="6.688cm">
          <draw:text-box>
            <text:p text:style-name="P1"><text:span text:style-name="T11"><text:s/></text:span></text:p>
          </draw:text-box>
        </draw:frame>
        <draw:frame draw:style-name="gr30" draw:text-style-name="P14" draw:layer="layout" svg:width="9.572cm" svg:height="0.217cm" svg:x="11.116cm" svg:y="7.173cm">
          <draw:text-box>
            <text:p text:style-name="P1"><text:span text:style-name="T11"><text:s text:c="200"/></text:span></text:p>
          </draw:text-box>
        </draw:frame>
        <draw:frame draw:style-name="gr31" draw:text-style-name="P14" draw:layer="layout" svg:width="1.773cm" svg:height="0.217cm" svg:x="9.46cm" svg:y="7.43cm">
          <draw:text-box>
            <text:p text:style-name="P1"><text:span text:style-name="T11">L-Measuement(AB1)</text:span></text:p>
          </draw:text-box>
        </draw:frame>
        <draw:frame draw:style-name="gr32" draw:text-style-name="P10" draw:layer="layout" svg:width="0.352cm" svg:height="0.352cm" svg:x="11.116cm" svg:y="7.324cm">
          <draw:text-box>
            <text:p text:style-name="P1"><text:span text:style-name="T9"><text:s/></text:span></text:p>
          </draw:text-box>
        </draw:frame>
        <draw:frame draw:style-name="gr4" draw:text-style-name="P3" draw:layer="layout" svg:width="0.634cm" svg:height="0.64cm" svg:x="12.174cm" svg:y="6.388cm">
          <draw:text-box>
            <text:p text:style-name="P1"><text:span text:style-name="T4"><text:s text:c="4"/></text:span></text:p>
          </draw:text-box>
        </draw:frame>
        <draw:frame draw:style-name="gr33" draw:text-style-name="P10" draw:layer="layout" svg:width="0.98cm" svg:height="0.352cm" svg:x="11.44cm" svg:y="6.2cm">
          <draw:text-box>
            <text:p text:style-name="P1"><text:span text:style-name="T9">SI/MIA</text:span></text:p>
          </draw:text-box>
        </draw:frame>
        <draw:frame draw:style-name="gr34" draw:text-style-name="P3" draw:layer="layout" svg:width="3.304cm" svg:height="0.64cm" svg:x="13.71cm" svg:y="6.388cm">
          <draw:text-box>
            <text:p text:style-name="P1"><text:span text:style-name="T4"><text:s text:c="23"/></text:span></text:p>
          </draw:text-box>
        </draw:frame>
        <draw:frame draw:style-name="gr35" draw:text-style-name="P10" draw:layer="layout" svg:width="0.515cm" svg:height="0.352cm" svg:x="17.7cm" svg:y="6.2cm">
          <draw:text-box>
            <text:p text:style-name="P1"><text:span text:style-name="T9">L-4 </text:span></text:p>
          </draw:text-box>
        </draw:frame>
        <draw:frame draw:style-name="gr18" draw:text-style-name="P3" draw:layer="layout" svg:width="2.517cm" svg:height="0.64cm" svg:x="13.622cm" svg:y="7.094cm">
          <draw:text-box>
            <text:p text:style-name="P1"><text:span text:style-name="T4">CSE 4108 </text:span></text:p>
          </draw:text-box>
        </draw:frame>
        <draw:frame draw:style-name="gr4" draw:text-style-name="P3" draw:layer="layout" svg:width="0.634cm" svg:height="0.64cm" svg:x="11.504cm" svg:y="7.87cm">
          <draw:text-box>
            <text:p text:style-name="P1"><text:span text:style-name="T4"><text:s/></text:span></text:p>
          </draw:text-box>
        </draw:frame>
        <draw:frame draw:style-name="gr36" draw:text-style-name="P15" draw:layer="layout" svg:width="0.563cm" svg:height="0.564cm" svg:x="11.504cm" svg:y="8.629cm">
          <draw:text-box>
            <text:p text:style-name="P1"><text:span text:style-name="T12">A </text:span></text:p>
          </draw:text-box>
        </draw:frame>
        <draw:frame draw:style-name="gr37" draw:text-style-name="P11" draw:layer="layout" svg:width="3.179cm" svg:height="0.352cm" svg:x="20.867cm" svg:y="6.247cm">
          <draw:text-box>
            <text:p text:style-name="P1"><text:span text:style-name="T9">R-105(AB3) <text:s text:c="10"/>SHU </text:span></text:p>
          </draw:text-box>
        </draw:frame>
        <draw:frame draw:style-name="gr4" draw:text-style-name="P3" draw:layer="layout" svg:width="0.634cm" svg:height="0.64cm" svg:x="23.838cm" svg:y="6.741cm">
          <draw:text-box>
            <text:p text:style-name="P1"><text:span text:style-name="T4"><text:s/></text:span></text:p>
          </draw:text-box>
        </draw:frame>
        <draw:frame draw:style-name="gr13" draw:text-style-name="P3" draw:layer="layout" svg:width="2.526cm" svg:height="0.64cm" svg:x="21.244cm" svg:y="7.518cm">
          <draw:text-box>
            <text:p text:style-name="P1"><text:span text:style-name="T4">Phy 4143 </text:span></text:p>
          </draw:text-box>
        </draw:frame>
        <draw:polygon draw:style-name="gr9" draw:text-style-name="P7" draw:layer="layout" svg:width="0.018cm" svg:height="0.018cm" svg:x="1.632cm" svg:y="6.158cm" svg:viewBox="0 0 19 19" draw:points="0,0 19,0 19,19 0,19">
          <text:p/>
        </draw:polygon>
        <draw:polygon draw:style-name="gr9" draw:text-style-name="P7" draw:layer="layout" svg:width="2.31cm" svg:height="0.018cm" svg:x="1.65cm" svg:y="6.158cm" svg:viewBox="0 0 2311 19" draw:points="0,0 2311,0 2311,19 0,19">
          <text:p/>
        </draw:polygon>
        <draw:polygon draw:style-name="gr9" draw:text-style-name="P7" draw:layer="layout" svg:width="0.018cm" svg:height="0.018cm" svg:x="3.96cm" svg:y="6.158cm" svg:viewBox="0 0 19 19" draw:points="0,0 19,0 19,19 0,19">
          <text:p/>
        </draw:polygon>
        <draw:polygon draw:style-name="gr9" draw:text-style-name="P7" draw:layer="layout" svg:width="3.891cm" svg:height="0.018cm" svg:x="3.978cm" svg:y="6.158cm" svg:viewBox="0 0 3892 19" draw:points="0,0 3892,0 3892,19 0,19">
          <text:p/>
        </draw:polygon>
        <draw:polygon draw:style-name="gr9" draw:text-style-name="P7" draw:layer="layout" svg:width="0.018cm" svg:height="0.018cm" svg:x="7.869cm" svg:y="6.158cm" svg:viewBox="0 0 19 19" draw:points="0,0 19,0 19,19 0,19">
          <text:p/>
        </draw:polygon>
        <draw:polygon draw:style-name="gr9" draw:text-style-name="P7" draw:layer="layout" svg:width="3.423cm" svg:height="0.018cm" svg:x="7.887cm" svg:y="6.158cm" svg:viewBox="0 0 3424 19" draw:points="0,0 3424,0 3424,19 0,19">
          <text:p/>
        </draw:polygon>
        <draw:polygon draw:style-name="gr9" draw:text-style-name="P7" draw:layer="layout" svg:width="0.017cm" svg:height="0.018cm" svg:x="11.31cm" svg:y="6.158cm" svg:viewBox="0 0 18 19" draw:points="0,0 18,0 18,19 0,19">
          <text:p/>
        </draw:polygon>
        <draw:polygon draw:style-name="gr9" draw:text-style-name="P7" draw:layer="layout" svg:width="3.67cm" svg:height="0.018cm" svg:x="11.327cm" svg:y="6.158cm" svg:viewBox="0 0 3671 19" draw:points="0,0 3671,0 3671,19 0,19">
          <text:p/>
        </draw:polygon>
        <draw:polygon draw:style-name="gr9" draw:text-style-name="P7" draw:layer="layout" svg:width="0.018cm" svg:height="0.018cm" svg:x="14.997cm" svg:y="6.158cm" svg:viewBox="0 0 19 19" draw:points="0,0 19,0 19,19 0,19">
          <text:p/>
        </draw:polygon>
        <draw:polygon draw:style-name="gr9" draw:text-style-name="P7" draw:layer="layout" svg:width="3.291cm" svg:height="0.018cm" svg:x="15.015cm" svg:y="6.158cm" svg:viewBox="0 0 3292 19" draw:points="0,0 3292,0 3292,19 0,19">
          <text:p/>
        </draw:polygon>
        <draw:polygon draw:style-name="gr9" draw:text-style-name="P7" draw:layer="layout" svg:width="0.017cm" svg:height="0.018cm" svg:x="18.306cm" svg:y="6.158cm" svg:viewBox="0 0 18 19" draw:points="0,0 18,0 18,19 0,19">
          <text:p/>
        </draw:polygon>
        <draw:polygon draw:style-name="gr9" draw:text-style-name="P7" draw:layer="layout" svg:width="0.018cm" svg:height="0.018cm" svg:x="20.82cm" svg:y="6.158cm" svg:viewBox="0 0 19 19" draw:points="0,0 19,0 19,19 0,19">
          <text:p/>
        </draw:polygon>
        <draw:polygon draw:style-name="gr9" draw:text-style-name="P7" draw:layer="layout" svg:width="3.185cm" svg:height="0.018cm" svg:x="20.838cm" svg:y="6.158cm" svg:viewBox="0 0 3186 19" draw:points="0,0 3186,0 3186,19 0,19">
          <text:p/>
        </draw:polygon>
        <draw:polygon draw:style-name="gr9" draw:text-style-name="P7" draw:layer="layout" svg:width="0.018cm" svg:height="0.018cm" svg:x="24.023cm" svg:y="6.158cm" svg:viewBox="0 0 19 19" draw:points="0,0 19,0 19,19 0,19">
          <text:p/>
        </draw:polygon>
        <draw:polygon draw:style-name="gr9" draw:text-style-name="P7" draw:layer="layout" svg:width="2.267cm" svg:height="0.018cm" svg:x="24.041cm" svg:y="6.158cm" svg:viewBox="0 0 2268 19" draw:points="0,0 2268,0 2268,19 0,19">
          <text:p/>
        </draw:polygon>
        <draw:polygon draw:style-name="gr9" draw:text-style-name="P7" draw:layer="layout" svg:width="0.018cm" svg:height="0.018cm" svg:x="26.308cm" svg:y="6.158cm" svg:viewBox="0 0 19 19" draw:points="0,0 19,0 19,19 0,19">
          <text:p/>
        </draw:polygon>
        <draw:polygon draw:style-name="gr9" draw:text-style-name="P7" draw:layer="layout" svg:width="0.018cm" svg:height="1.535cm" svg:x="1.632cm" svg:y="6.176cm" svg:viewBox="0 0 19 1536" draw:points="0,0 19,0 19,1536 0,1536">
          <text:p/>
        </draw:polygon>
        <draw:polygon draw:style-name="gr9" draw:text-style-name="P7" draw:layer="layout" svg:width="0.018cm" svg:height="1.535cm" svg:x="3.96cm" svg:y="6.176cm" svg:viewBox="0 0 19 1536" draw:points="0,0 19,0 19,1536 0,1536">
          <text:p/>
        </draw:polygon>
        <draw:polygon draw:style-name="gr9" draw:text-style-name="P7" draw:layer="layout" svg:width="0.017cm" svg:height="1.535cm" svg:x="11.31cm" svg:y="6.176cm" svg:viewBox="0 0 18 1536" draw:points="0,0 18,0 18,1536 0,1536">
          <text:p/>
        </draw:polygon>
        <draw:polygon draw:style-name="gr9" draw:text-style-name="P7" draw:layer="layout" svg:width="0.017cm" svg:height="1.535cm" svg:x="18.306cm" svg:y="6.176cm" svg:viewBox="0 0 18 1536" draw:points="0,0 18,0 18,1536 0,1536">
          <text:p/>
        </draw:polygon>
        <draw:polygon draw:style-name="gr9" draw:text-style-name="P7" draw:layer="layout" svg:width="0.018cm" svg:height="1.535cm" svg:x="20.82cm" svg:y="6.176cm" svg:viewBox="0 0 19 1536" draw:points="0,0 19,0 19,1536 0,1536">
          <text:p/>
        </draw:polygon>
        <draw:polygon draw:style-name="gr9" draw:text-style-name="P7" draw:layer="layout" svg:width="0.018cm" svg:height="1.535cm" svg:x="24.023cm" svg:y="6.176cm" svg:viewBox="0 0 19 1536" draw:points="0,0 19,0 19,1536 0,1536">
          <text:p/>
        </draw:polygon>
        <draw:polygon draw:style-name="gr9" draw:text-style-name="P7" draw:layer="layout" svg:width="0.018cm" svg:height="1.535cm" svg:x="26.308cm" svg:y="6.176cm" svg:viewBox="0 0 19 1536" draw:points="0,0 19,0 19,1536 0,1536">
          <text:p/>
        </draw:polygon>
        <draw:frame draw:style-name="gr4" draw:text-style-name="P3" draw:layer="layout" svg:width="0.634cm" svg:height="0.64cm" svg:x="25.17cm" svg:y="7.606cm">
          <draw:text-box>
            <text:p text:style-name="P1"><text:span text:style-name="T4"><text:s/></text:span></text:p>
          </draw:text-box>
        </draw:frame>
        <draw:polygon draw:style-name="gr9" draw:text-style-name="P7" draw:layer="layout" svg:width="0.018cm" svg:height="0.018cm" svg:x="1.632cm" svg:y="7.711cm" svg:viewBox="0 0 19 19" draw:points="0,0 19,0 19,19 0,19">
          <text:p/>
        </draw:polygon>
        <draw:polygon draw:style-name="gr9" draw:text-style-name="P7" draw:layer="layout" svg:width="0.018cm" svg:height="0.018cm" svg:x="3.96cm" svg:y="7.711cm" svg:viewBox="0 0 19 19" draw:points="0,0 19,0 19,19 0,19">
          <text:p/>
        </draw:polygon>
        <draw:polygon draw:style-name="gr9" draw:text-style-name="P7" draw:layer="layout" svg:width="7.332cm" svg:height="0.018cm" svg:x="3.978cm" svg:y="7.711cm" svg:viewBox="0 0 7333 19" draw:points="0,0 7333,0 7333,19 0,19">
          <text:p/>
        </draw:polygon>
        <draw:polygon draw:style-name="gr9" draw:text-style-name="P7" draw:layer="layout" svg:width="0.017cm" svg:height="0.018cm" svg:x="11.31cm" svg:y="7.711cm" svg:viewBox="0 0 18 19" draw:points="0,0 18,0 18,19 0,19">
          <text:p/>
        </draw:polygon>
        <draw:polygon draw:style-name="gr9" draw:text-style-name="P7" draw:layer="layout" svg:width="0.017cm" svg:height="0.018cm" svg:x="18.306cm" svg:y="7.711cm" svg:viewBox="0 0 18 19" draw:points="0,0 18,0 18,19 0,19">
          <text:p/>
        </draw:polygon>
        <draw:polygon draw:style-name="gr9" draw:text-style-name="P7" draw:layer="layout" svg:width="0.018cm" svg:height="0.018cm" svg:x="20.82cm" svg:y="7.711cm" svg:viewBox="0 0 19 19" draw:points="0,0 19,0 19,19 0,19">
          <text:p/>
        </draw:polygon>
        <draw:polygon draw:style-name="gr9" draw:text-style-name="P7" draw:layer="layout" svg:width="0.018cm" svg:height="0.018cm" svg:x="24.023cm" svg:y="7.711cm" svg:viewBox="0 0 19 19" draw:points="0,0 19,0 19,19 0,19">
          <text:p/>
        </draw:polygon>
        <draw:polygon draw:style-name="gr9" draw:text-style-name="P7" draw:layer="layout" svg:width="0.018cm" svg:height="0.018cm" svg:x="26.308cm" svg:y="7.711cm" svg:viewBox="0 0 19 19" draw:points="0,0 19,0 19,19 0,19">
          <text:p/>
        </draw:polygon>
        <draw:polygon draw:style-name="gr9" draw:text-style-name="P7" draw:layer="layout" svg:width="0.018cm" svg:height="0.776cm" svg:x="1.632cm" svg:y="7.729cm" svg:viewBox="0 0 19 777" draw:points="0,0 19,0 19,777 0,777">
          <text:p/>
        </draw:polygon>
        <draw:polygon draw:style-name="gr9" draw:text-style-name="P7" draw:layer="layout" svg:width="0.018cm" svg:height="0.776cm" svg:x="3.96cm" svg:y="7.729cm" svg:viewBox="0 0 19 777" draw:points="0,0 19,0 19,777 0,777">
          <text:p/>
        </draw:polygon>
        <draw:polygon draw:style-name="gr9" draw:text-style-name="P7" draw:layer="layout" svg:width="0.017cm" svg:height="0.776cm" svg:x="11.31cm" svg:y="7.729cm" svg:viewBox="0 0 18 777" draw:points="0,0 18,0 18,777 0,777">
          <text:p/>
        </draw:polygon>
        <draw:polygon draw:style-name="gr9" draw:text-style-name="P7" draw:layer="layout" svg:width="0.017cm" svg:height="0.776cm" svg:x="18.306cm" svg:y="7.729cm" svg:viewBox="0 0 18 777" draw:points="0,0 18,0 18,777 0,777">
          <text:p/>
        </draw:polygon>
        <draw:polygon draw:style-name="gr9" draw:text-style-name="P7" draw:layer="layout" svg:width="0.018cm" svg:height="0.776cm" svg:x="20.82cm" svg:y="7.729cm" svg:viewBox="0 0 19 777" draw:points="0,0 19,0 19,777 0,777">
          <text:p/>
        </draw:polygon>
        <draw:polygon draw:style-name="gr9" draw:text-style-name="P7" draw:layer="layout" svg:width="0.018cm" svg:height="0.776cm" svg:x="24.023cm" svg:y="7.729cm" svg:viewBox="0 0 19 777" draw:points="0,0 19,0 19,777 0,777">
          <text:p/>
        </draw:polygon>
        <draw:polygon draw:style-name="gr9" draw:text-style-name="P7" draw:layer="layout" svg:width="0.018cm" svg:height="0.776cm" svg:x="26.308cm" svg:y="7.729cm" svg:viewBox="0 0 19 777" draw:points="0,0 19,0 19,777 0,777">
          <text:p/>
        </draw:polygon>
        <draw:frame draw:style-name="gr24" draw:text-style-name="P3" draw:layer="layout" svg:width="2.73cm" svg:height="0.64cm" svg:x="7.632cm" svg:y="7.862cm">
          <draw:text-box>
            <text:p text:style-name="P1"><text:span text:style-name="T4"><text:s text:c="19"/></text:span></text:p>
          </draw:text-box>
        </draw:frame>
        <draw:frame draw:style-name="gr38" draw:text-style-name="P5" draw:layer="layout" svg:width="1.888cm" svg:height="0.285cm" svg:x="4.056cm" svg:y="8.52cm">
          <draw:text-box>
            <text:p text:style-name="P1"><text:span text:style-name="T5">B <text:s text:c="26"/></text:span></text:p>
          </draw:text-box>
        </draw:frame>
        <draw:frame draw:style-name="gr39" draw:text-style-name="P3" draw:layer="layout" svg:width="2.956cm" svg:height="0.64cm" svg:x="6.117cm" svg:y="8.655cm">
          <draw:text-box>
            <text:p text:style-name="P1"><text:span text:style-name="T4">Phy 4144 <text:s text:c="3"/></text:span></text:p>
          </draw:text-box>
        </draw:frame>
        <draw:frame draw:style-name="gr29" draw:text-style-name="P14" draw:layer="layout" svg:width="0.211cm" svg:height="0.217cm" svg:x="9.052cm" svg:y="8.973cm">
          <draw:text-box>
            <text:p text:style-name="P1"><text:span text:style-name="T11"><text:s/></text:span></text:p>
          </draw:text-box>
        </draw:frame>
        <draw:frame draw:style-name="gr40" draw:text-style-name="P14" draw:layer="layout" svg:width="6.079cm" svg:height="0.217cm" svg:x="5.296cm" svg:y="9.343cm">
          <draw:text-box>
            <text:p text:style-name="P1"><text:span text:style-name="T11"><text:s text:c="87"/>L-Measuement(AB1) <text:s text:c="2"/></text:span></text:p>
          </draw:text-box>
        </draw:frame>
        <draw:polygon draw:style-name="gr9" draw:text-style-name="P7" draw:layer="layout" svg:width="0.018cm" svg:height="0.018cm" svg:x="1.632cm" svg:y="8.505cm" svg:viewBox="0 0 19 19" draw:points="0,0 19,0 19,19 0,19">
          <text:p/>
        </draw:polygon>
        <draw:polygon draw:style-name="gr9" draw:text-style-name="P7" draw:layer="layout" svg:width="0.018cm" svg:height="0.018cm" svg:x="3.96cm" svg:y="8.505cm" svg:viewBox="0 0 19 19" draw:points="0,0 19,0 19,19 0,19">
          <text:p/>
        </draw:polygon>
        <draw:polygon draw:style-name="gr9" draw:text-style-name="P7" draw:layer="layout" svg:width="7.332cm" svg:height="0.018cm" svg:x="3.978cm" svg:y="8.505cm" svg:viewBox="0 0 7333 19" draw:points="0,0 7333,0 7333,19 0,19">
          <text:p/>
        </draw:polygon>
        <draw:polygon draw:style-name="gr9" draw:text-style-name="P7" draw:layer="layout" svg:width="0.017cm" svg:height="0.018cm" svg:x="11.31cm" svg:y="8.505cm" svg:viewBox="0 0 18 19" draw:points="0,0 18,0 18,19 0,19">
          <text:p/>
        </draw:polygon>
        <draw:polygon draw:style-name="gr9" draw:text-style-name="P7" draw:layer="layout" svg:width="0.017cm" svg:height="0.018cm" svg:x="18.306cm" svg:y="8.505cm" svg:viewBox="0 0 18 19" draw:points="0,0 18,0 18,19 0,19">
          <text:p/>
        </draw:polygon>
        <draw:polygon draw:style-name="gr9" draw:text-style-name="P7" draw:layer="layout" svg:width="0.018cm" svg:height="0.018cm" svg:x="20.82cm" svg:y="8.505cm" svg:viewBox="0 0 19 19" draw:points="0,0 19,0 19,19 0,19">
          <text:p/>
        </draw:polygon>
        <draw:polygon draw:style-name="gr9" draw:text-style-name="P7" draw:layer="layout" svg:width="0.018cm" svg:height="0.018cm" svg:x="24.023cm" svg:y="8.505cm" svg:viewBox="0 0 19 19" draw:points="0,0 19,0 19,19 0,19">
          <text:p/>
        </draw:polygon>
        <draw:polygon draw:style-name="gr9" draw:text-style-name="P7" draw:layer="layout" svg:width="0.018cm" svg:height="0.018cm" svg:x="26.308cm" svg:y="8.505cm" svg:viewBox="0 0 19 19" draw:points="0,0 19,0 19,19 0,19">
          <text:p/>
        </draw:polygon>
        <draw:polygon draw:style-name="gr9" draw:text-style-name="P7" draw:layer="layout" svg:width="0.018cm" svg:height="1.031cm" svg:x="1.632cm" svg:y="8.523cm" svg:viewBox="0 0 19 1032" draw:points="0,0 19,0 19,1032 0,1032">
          <text:p/>
        </draw:polygon>
        <draw:polygon draw:style-name="gr9" draw:text-style-name="P7" draw:layer="layout" svg:width="0.018cm" svg:height="1.031cm" svg:x="3.96cm" svg:y="8.523cm" svg:viewBox="0 0 19 1032" draw:points="0,0 19,0 19,1032 0,1032">
          <text:p/>
        </draw:polygon>
        <draw:polygon draw:style-name="gr9" draw:text-style-name="P7" draw:layer="layout" svg:width="0.017cm" svg:height="1.031cm" svg:x="11.31cm" svg:y="8.523cm" svg:viewBox="0 0 18 1032" draw:points="0,0 18,0 18,1032 0,1032">
          <text:p/>
        </draw:polygon>
        <draw:polygon draw:style-name="gr9" draw:text-style-name="P7" draw:layer="layout" svg:width="0.017cm" svg:height="1.031cm" svg:x="18.306cm" svg:y="8.523cm" svg:viewBox="0 0 18 1032" draw:points="0,0 18,0 18,1032 0,1032">
          <text:p/>
        </draw:polygon>
        <draw:polygon draw:style-name="gr9" draw:text-style-name="P7" draw:layer="layout" svg:width="0.018cm" svg:height="1.031cm" svg:x="20.82cm" svg:y="8.523cm" svg:viewBox="0 0 19 1032" draw:points="0,0 19,0 19,1032 0,1032">
          <text:p/>
        </draw:polygon>
        <draw:polygon draw:style-name="gr9" draw:text-style-name="P7" draw:layer="layout" svg:width="0.018cm" svg:height="1.031cm" svg:x="24.023cm" svg:y="8.523cm" svg:viewBox="0 0 19 1032" draw:points="0,0 19,0 19,1032 0,1032">
          <text:p/>
        </draw:polygon>
        <draw:polygon draw:style-name="gr9" draw:text-style-name="P7" draw:layer="layout" svg:width="0.018cm" svg:height="1.031cm" svg:x="26.308cm" svg:y="8.523cm" svg:viewBox="0 0 19 1032" draw:points="0,0 19,0 19,1032 0,1032">
          <text:p/>
        </draw:polygon>
        <draw:frame draw:style-name="gr4" draw:text-style-name="P3" draw:layer="layout" svg:width="0.634cm" svg:height="0.64cm" svg:x="11.257cm" svg:y="9.026cm">
          <draw:text-box>
            <text:p text:style-name="P1"><text:span text:style-name="T4"><text:s/></text:span></text:p>
          </draw:text-box>
        </draw:frame>
        <draw:frame draw:style-name="gr41" draw:text-style-name="P2" draw:layer="layout" svg:width="1.514cm" svg:height="0.708cm" svg:x="2.126cm" svg:y="10.235cm">
          <draw:text-box>
            <text:p text:style-name="P1"><text:span text:style-name="T7">Wed </text:span></text:p>
          </draw:text-box>
        </draw:frame>
        <draw:frame draw:style-name="gr42" draw:text-style-name="P5" draw:layer="layout" svg:width="3.844cm" svg:height="0.285cm" svg:x="4.056cm" svg:y="9.626cm">
          <draw:text-box>
            <text:p text:style-name="P1"><text:span text:style-name="T5">R-205 <text:s text:c="43"/>BS </text:span></text:p>
          </draw:text-box>
        </draw:frame>
        <draw:frame draw:style-name="gr43" draw:text-style-name="P3" draw:layer="layout" svg:width="2.813cm" svg:height="1.279cm" svg:x="4.556cm" svg:y="10.05cm">
          <draw:text-box>
            <text:p text:style-name="P1"><text:span text:style-name="T4">Hum 4147 </text:span><text:span text:style-name="T4"><text:line-break/></text:span><text:span text:style-name="T4"> <text:s text:c="4"/>- TES </text:span></text:p>
          </draw:text-box>
        </draw:frame>
        <draw:frame draw:style-name="gr44" draw:text-style-name="P10" draw:layer="layout" svg:width="3.309cm" svg:height="0.352cm" svg:x="7.964cm" svg:y="9.644cm">
          <draw:text-box>
            <text:p text:style-name="P1"><text:span text:style-name="T9">R-205 <text:s text:c="26"/>SI </text:span></text:p>
          </draw:text-box>
        </draw:frame>
        <draw:frame draw:style-name="gr18" draw:text-style-name="P3" draw:layer="layout" svg:width="2.743cm" svg:height="0.64cm" svg:x="8.364cm" svg:y="10.238cm">
          <draw:text-box>
            <text:p text:style-name="P1"><text:span text:style-name="T4">SWE 4101 </text:span></text:p>
          </draw:text-box>
        </draw:frame>
        <draw:frame draw:style-name="gr45" draw:text-style-name="P5" draw:layer="layout" svg:width="6.89cm" svg:height="0.285cm" svg:x="11.404cm" svg:y="9.626cm">
          <draw:text-box>
            <text:p text:style-name="P1"><text:span text:style-name="T5">R-301(AB3) <text:s text:c="74"/>ARMK </text:span></text:p>
          </draw:text-box>
        </draw:frame>
        <draw:frame draw:style-name="gr46" draw:text-style-name="P3" draw:layer="layout" svg:width="6.597cm" svg:height="0.64cm" svg:x="11.56cm" svg:y="10.285cm">
          <draw:text-box>
            <text:p text:style-name="P1"><text:span text:style-name="T4">HUM 4142 - Arabic(SWE) </text:span></text:p>
          </draw:text-box>
        </draw:frame>
        <draw:frame draw:style-name="gr47" draw:text-style-name="P5" draw:layer="layout" svg:width="0.738cm" svg:height="0.285cm" svg:x="21.015cm" svg:y="9.626cm">
          <draw:text-box>
            <text:p text:style-name="P1"><text:span text:style-name="T5">R-301 </text:span></text:p>
          </draw:text-box>
        </draw:frame>
        <draw:frame draw:style-name="gr48" draw:text-style-name="P3" draw:layer="layout" svg:width="3.647cm" svg:height="0.64cm" svg:x="21.835cm" svg:y="10.05cm">
          <draw:text-box>
            <text:p text:style-name="P1"><text:span text:style-name="T4">Programming </text:span></text:p>
          </draw:text-box>
        </draw:frame>
        <draw:polygon draw:style-name="gr9" draw:text-style-name="P7" draw:layer="layout" svg:width="0.018cm" svg:height="0.018cm" svg:x="1.632cm" svg:y="9.554cm" svg:viewBox="0 0 19 19" draw:points="0,0 19,0 19,19 0,19">
          <text:p/>
        </draw:polygon>
        <draw:polygon draw:style-name="gr9" draw:text-style-name="P7" draw:layer="layout" svg:width="2.31cm" svg:height="0.018cm" svg:x="1.65cm" svg:y="9.554cm" svg:viewBox="0 0 2311 19" draw:points="0,0 2311,0 2311,19 0,19">
          <text:p/>
        </draw:polygon>
        <draw:polygon draw:style-name="gr9" draw:text-style-name="P7" draw:layer="layout" svg:width="0.018cm" svg:height="0.018cm" svg:x="3.96cm" svg:y="9.554cm" svg:viewBox="0 0 19 19" draw:points="0,0 19,0 19,19 0,19">
          <text:p/>
        </draw:polygon>
        <draw:polygon draw:style-name="gr9" draw:text-style-name="P7" draw:layer="layout" svg:width="3.891cm" svg:height="0.018cm" svg:x="3.978cm" svg:y="9.554cm" svg:viewBox="0 0 3892 19" draw:points="0,0 3892,0 3892,19 0,19">
          <text:p/>
        </draw:polygon>
        <draw:polygon draw:style-name="gr9" draw:text-style-name="P7" draw:layer="layout" svg:width="0.018cm" svg:height="0.018cm" svg:x="7.869cm" svg:y="9.554cm" svg:viewBox="0 0 19 19" draw:points="0,0 19,0 19,19 0,19">
          <text:p/>
        </draw:polygon>
        <draw:polygon draw:style-name="gr9" draw:text-style-name="P7" draw:layer="layout" svg:width="3.423cm" svg:height="0.018cm" svg:x="7.887cm" svg:y="9.554cm" svg:viewBox="0 0 3424 19" draw:points="0,0 3424,0 3424,19 0,19">
          <text:p/>
        </draw:polygon>
        <draw:polygon draw:style-name="gr9" draw:text-style-name="P7" draw:layer="layout" svg:width="0.017cm" svg:height="0.018cm" svg:x="11.31cm" svg:y="9.554cm" svg:viewBox="0 0 18 19" draw:points="0,0 18,0 18,19 0,19">
          <text:p/>
        </draw:polygon>
        <draw:polygon draw:style-name="gr9" draw:text-style-name="P7" draw:layer="layout" svg:width="6.979cm" svg:height="0.018cm" svg:x="11.327cm" svg:y="9.554cm" svg:viewBox="0 0 6980 19" draw:points="0,0 6980,0 6980,19 0,19">
          <text:p/>
        </draw:polygon>
        <draw:polygon draw:style-name="gr9" draw:text-style-name="P7" draw:layer="layout" svg:width="0.017cm" svg:height="0.018cm" svg:x="18.306cm" svg:y="9.554cm" svg:viewBox="0 0 18 19" draw:points="0,0 18,0 18,19 0,19">
          <text:p/>
        </draw:polygon>
        <draw:polygon draw:style-name="gr9" draw:text-style-name="P7" draw:layer="layout" svg:width="0.018cm" svg:height="0.018cm" svg:x="20.82cm" svg:y="9.554cm" svg:viewBox="0 0 19 19" draw:points="0,0 19,0 19,19 0,19">
          <text:p/>
        </draw:polygon>
        <draw:polygon draw:style-name="gr9" draw:text-style-name="P7" draw:layer="layout" svg:width="3.185cm" svg:height="0.018cm" svg:x="20.838cm" svg:y="9.554cm" svg:viewBox="0 0 3186 19" draw:points="0,0 3186,0 3186,19 0,19">
          <text:p/>
        </draw:polygon>
        <draw:polygon draw:style-name="gr9" draw:text-style-name="P7" draw:layer="layout" svg:width="0.018cm" svg:height="0.018cm" svg:x="24.023cm" svg:y="9.554cm" svg:viewBox="0 0 19 19" draw:points="0,0 19,0 19,19 0,19">
          <text:p/>
        </draw:polygon>
        <draw:polygon draw:style-name="gr9" draw:text-style-name="P7" draw:layer="layout" svg:width="2.267cm" svg:height="0.018cm" svg:x="24.041cm" svg:y="9.554cm" svg:viewBox="0 0 2268 19" draw:points="0,0 2268,0 2268,19 0,19">
          <text:p/>
        </draw:polygon>
        <draw:polygon draw:style-name="gr9" draw:text-style-name="P7" draw:layer="layout" svg:width="0.018cm" svg:height="0.018cm" svg:x="26.308cm" svg:y="9.554cm" svg:viewBox="0 0 19 19" draw:points="0,0 19,0 19,19 0,19">
          <text:p/>
        </draw:polygon>
        <draw:polygon draw:style-name="gr9" draw:text-style-name="P7" draw:layer="layout" svg:width="0.018cm" svg:height="1.897cm" svg:x="1.632cm" svg:y="9.572cm" svg:viewBox="0 0 19 1898" draw:points="0,0 19,0 19,1898 0,1898">
          <text:p/>
        </draw:polygon>
        <draw:polygon draw:style-name="gr9" draw:text-style-name="P7" draw:layer="layout" svg:width="0.018cm" svg:height="1.897cm" svg:x="3.96cm" svg:y="9.572cm" svg:viewBox="0 0 19 1898" draw:points="0,0 19,0 19,1898 0,1898">
          <text:p/>
        </draw:polygon>
        <draw:polygon draw:style-name="gr9" draw:text-style-name="P7" draw:layer="layout" svg:width="0.018cm" svg:height="1.897cm" svg:x="7.869cm" svg:y="9.572cm" svg:viewBox="0 0 19 1898" draw:points="0,0 19,0 19,1898 0,1898">
          <text:p/>
        </draw:polygon>
        <draw:polygon draw:style-name="gr9" draw:text-style-name="P7" draw:layer="layout" svg:width="0.017cm" svg:height="1.897cm" svg:x="11.31cm" svg:y="9.572cm" svg:viewBox="0 0 18 1898" draw:points="0,0 18,0 18,1898 0,1898">
          <text:p/>
        </draw:polygon>
        <draw:polygon draw:style-name="gr9" draw:text-style-name="P7" draw:layer="layout" svg:width="0.017cm" svg:height="1.897cm" svg:x="18.306cm" svg:y="9.572cm" svg:viewBox="0 0 18 1898" draw:points="0,0 18,0 18,1898 0,1898">
          <text:p/>
        </draw:polygon>
        <draw:polygon draw:style-name="gr9" draw:text-style-name="P7" draw:layer="layout" svg:width="0.018cm" svg:height="1.897cm" svg:x="20.82cm" svg:y="9.572cm" svg:viewBox="0 0 19 1898" draw:points="0,0 19,0 19,1898 0,1898">
          <text:p/>
        </draw:polygon>
        <draw:polygon draw:style-name="gr9" draw:text-style-name="P7" draw:layer="layout" svg:width="0.018cm" svg:height="1.897cm" svg:x="26.308cm" svg:y="9.572cm" svg:viewBox="0 0 19 1898" draw:points="0,0 19,0 19,1898 0,1898">
          <text:p/>
        </draw:polygon>
        <draw:frame draw:style-name="gr49" draw:text-style-name="P3" draw:layer="layout" svg:width="2.238cm" svg:height="0.64cm" svg:x="22.532cm" svg:y="10.826cm">
          <draw:text-box>
            <text:p text:style-name="P1"><text:span text:style-name="T4">Training </text:span></text:p>
          </draw:text-box>
        </draw:frame>
        <draw:frame draw:style-name="gr50" draw:text-style-name="P2" draw:layer="layout" svg:width="1.249cm" svg:height="0.708cm" svg:x="2.259cm" svg:y="12.538cm">
          <draw:text-box>
            <text:p text:style-name="P1"><text:span text:style-name="T7">Thu </text:span></text:p>
          </draw:text-box>
        </draw:frame>
        <draw:frame draw:style-name="gr51" draw:text-style-name="P5" draw:layer="layout" svg:width="7.226cm" svg:height="0.285cm" svg:x="4.056cm" svg:y="11.54cm">
          <draw:text-box>
            <text:p text:style-name="P1"><text:span text:style-name="T5">R-301 <text:s text:c="91"/>MUA </text:span></text:p>
          </draw:text-box>
        </draw:frame>
        <draw:frame draw:style-name="gr4" draw:text-style-name="P3" draw:layer="layout" svg:width="0.634cm" svg:height="0.64cm" svg:x="4.156cm" svg:y="11.964cm">
          <draw:text-box>
            <text:p text:style-name="P1"><text:span text:style-name="T4"><text:s/></text:span></text:p>
          </draw:text-box>
        </draw:frame>
        <draw:frame draw:style-name="gr52" draw:text-style-name="P3" draw:layer="layout" svg:width="5.699cm" svg:height="0.64cm" svg:x="4.879cm" svg:y="12.741cm">
          <draw:text-box>
            <text:p text:style-name="P1"><text:span text:style-name="T4">Math 4141(100 mins) </text:span></text:p>
          </draw:text-box>
        </draw:frame>
        <draw:frame draw:style-name="gr53" draw:text-style-name="P5" draw:layer="layout" svg:width="3.58cm" svg:height="0.285cm" svg:x="11.404cm" svg:y="11.529cm">
          <draw:text-box>
            <text:p text:style-name="P1"><text:span text:style-name="T5">R-301 <text:s text:c="33"/>MMH </text:span></text:p>
          </draw:text-box>
        </draw:frame>
        <draw:frame draw:style-name="gr20" draw:text-style-name="P3" draw:layer="layout" svg:width="2.669cm" svg:height="1.279cm" svg:x="11.877cm" svg:y="12.086cm">
          <draw:text-box>
            <text:p text:style-name="P1"><text:span text:style-name="T4">Hum 4145</text:span><text:span text:style-name="T4"><text:line-break/></text:span><text:span text:style-name="T4">- Islamiat</text:span></text:p>
          </draw:text-box>
        </draw:frame>
        <draw:frame draw:style-name="gr54" draw:text-style-name="P3" draw:layer="layout" svg:width="2.553cm" svg:height="0.64cm" svg:x="11.982cm" svg:y="13.36cm">
          <draw:text-box>
            <text:p text:style-name="P1"><text:span text:style-name="T4">(50 mins) </text:span></text:p>
          </draw:text-box>
        </draw:frame>
        <draw:frame draw:style-name="gr55" draw:text-style-name="P5" draw:layer="layout" svg:width="3.197cm" svg:height="0.285cm" svg:x="15.092cm" svg:y="11.54cm">
          <draw:text-box>
            <text:p text:style-name="P1"><text:span text:style-name="T5">R-301 <text:s text:c="30"/>SAH </text:span></text:p>
          </draw:text-box>
        </draw:frame>
        <draw:frame draw:style-name="gr4" draw:text-style-name="P3" draw:layer="layout" svg:width="0.634cm" svg:height="0.64cm" svg:x="15.192cm" svg:y="11.964cm">
          <draw:text-box>
            <text:p text:style-name="P1"><text:span text:style-name="T4"><text:s/></text:span></text:p>
          </draw:text-box>
        </draw:frame>
        <draw:frame draw:style-name="gr56" draw:text-style-name="P3" draw:layer="layout" svg:width="2.887cm" svg:height="0.64cm" svg:x="15.389cm" svg:y="12.541cm">
          <draw:text-box>
            <text:p text:style-name="P1"><text:span text:style-name="T4">CSE 4107 </text:span></text:p>
          </draw:text-box>
        </draw:frame>
        <draw:frame draw:style-name="gr57" draw:text-style-name="P3" draw:layer="layout" svg:width="1.438cm" svg:height="0.64cm" svg:x="15.192cm" svg:y="13.517cm">
          <draw:text-box>
            <text:p text:style-name="P1"><text:span text:style-name="T4"><text:s text:c="10"/></text:span></text:p>
          </draw:text-box>
        </draw:frame>
        <draw:frame draw:style-name="gr4" draw:text-style-name="P3" draw:layer="layout" svg:width="0.634cm" svg:height="0.64cm" svg:x="22.426cm" svg:y="12.564cm">
          <draw:text-box>
            <text:p text:style-name="P1"><text:span text:style-name="T4"><text:s/></text:span></text:p>
          </draw:text-box>
        </draw:frame>
        <draw:polygon draw:style-name="gr9" draw:text-style-name="P7" draw:layer="layout" svg:width="0.018cm" svg:height="0.018cm" svg:x="1.632cm" svg:y="11.469cm" svg:viewBox="0 0 19 19" draw:points="0,0 19,0 19,19 0,19">
          <text:p/>
        </draw:polygon>
        <draw:polygon draw:style-name="gr9" draw:text-style-name="P7" draw:layer="layout" svg:width="2.31cm" svg:height="0.018cm" svg:x="1.65cm" svg:y="11.469cm" svg:viewBox="0 0 2311 19" draw:points="0,0 2311,0 2311,19 0,19">
          <text:p/>
        </draw:polygon>
        <draw:polygon draw:style-name="gr9" draw:text-style-name="P7" draw:layer="layout" svg:width="0.018cm" svg:height="0.018cm" svg:x="3.96cm" svg:y="11.469cm" svg:viewBox="0 0 19 19" draw:points="0,0 19,0 19,19 0,19">
          <text:p/>
        </draw:polygon>
        <draw:polygon draw:style-name="gr9" draw:text-style-name="P7" draw:layer="layout" svg:width="3.891cm" svg:height="0.018cm" svg:x="3.978cm" svg:y="11.469cm" svg:viewBox="0 0 3892 19" draw:points="0,0 3892,0 3892,19 0,19">
          <text:p/>
        </draw:polygon>
        <draw:polygon draw:style-name="gr9" draw:text-style-name="P7" draw:layer="layout" svg:width="0.018cm" svg:height="0.018cm" svg:x="7.869cm" svg:y="11.469cm" svg:viewBox="0 0 19 19" draw:points="0,0 19,0 19,19 0,19">
          <text:p/>
        </draw:polygon>
        <draw:polygon draw:style-name="gr9" draw:text-style-name="P7" draw:layer="layout" svg:width="3.423cm" svg:height="0.018cm" svg:x="7.887cm" svg:y="11.469cm" svg:viewBox="0 0 3424 19" draw:points="0,0 3424,0 3424,19 0,19">
          <text:p/>
        </draw:polygon>
        <draw:polygon draw:style-name="gr9" draw:text-style-name="P7" draw:layer="layout" svg:width="0.017cm" svg:height="0.018cm" svg:x="11.31cm" svg:y="11.469cm" svg:viewBox="0 0 18 19" draw:points="0,0 18,0 18,19 0,19">
          <text:p/>
        </draw:polygon>
        <draw:polygon draw:style-name="gr9" draw:text-style-name="P7" draw:layer="layout" svg:width="3.67cm" svg:height="0.018cm" svg:x="11.327cm" svg:y="11.469cm" svg:viewBox="0 0 3671 19" draw:points="0,0 3671,0 3671,19 0,19">
          <text:p/>
        </draw:polygon>
        <draw:polygon draw:style-name="gr9" draw:text-style-name="P7" draw:layer="layout" svg:width="0.018cm" svg:height="0.018cm" svg:x="14.997cm" svg:y="11.469cm" svg:viewBox="0 0 19 19" draw:points="0,0 19,0 19,19 0,19">
          <text:p/>
        </draw:polygon>
        <draw:polygon draw:style-name="gr9" draw:text-style-name="P7" draw:layer="layout" svg:width="3.291cm" svg:height="0.018cm" svg:x="15.015cm" svg:y="11.469cm" svg:viewBox="0 0 3292 19" draw:points="0,0 3292,0 3292,19 0,19">
          <text:p/>
        </draw:polygon>
        <draw:polygon draw:style-name="gr9" draw:text-style-name="P7" draw:layer="layout" svg:width="0.017cm" svg:height="0.018cm" svg:x="18.306cm" svg:y="11.469cm" svg:viewBox="0 0 18 19" draw:points="0,0 18,0 18,19 0,19">
          <text:p/>
        </draw:polygon>
        <draw:polygon draw:style-name="gr9" draw:text-style-name="P7" draw:layer="layout" svg:width="0.018cm" svg:height="0.018cm" svg:x="20.82cm" svg:y="11.469cm" svg:viewBox="0 0 19 19" draw:points="0,0 19,0 19,19 0,19">
          <text:p/>
        </draw:polygon>
        <draw:polygon draw:style-name="gr9" draw:text-style-name="P7" draw:layer="layout" svg:width="3.185cm" svg:height="0.018cm" svg:x="20.838cm" svg:y="11.469cm" svg:viewBox="0 0 3186 19" draw:points="0,0 3186,0 3186,19 0,19">
          <text:p/>
        </draw:polygon>
        <draw:polygon draw:style-name="gr9" draw:text-style-name="P7" draw:layer="layout" svg:width="0.018cm" svg:height="0.018cm" svg:x="24.023cm" svg:y="11.469cm" svg:viewBox="0 0 19 19" draw:points="0,0 19,0 19,19 0,19">
          <text:p/>
        </draw:polygon>
        <draw:polygon draw:style-name="gr9" draw:text-style-name="P7" draw:layer="layout" svg:width="2.267cm" svg:height="0.018cm" svg:x="24.041cm" svg:y="11.469cm" svg:viewBox="0 0 2268 19" draw:points="0,0 2268,0 2268,19 0,19">
          <text:p/>
        </draw:polygon>
        <draw:polygon draw:style-name="gr9" draw:text-style-name="P7" draw:layer="layout" svg:width="0.018cm" svg:height="0.018cm" svg:x="26.308cm" svg:y="11.469cm" svg:viewBox="0 0 19 19" draw:points="0,0 19,0 19,19 0,19">
          <text:p/>
        </draw:polygon>
        <draw:polygon draw:style-name="gr9" draw:text-style-name="P7" draw:layer="layout" svg:width="0.018cm" svg:height="2.674cm" svg:x="1.632cm" svg:y="11.487cm" svg:viewBox="0 0 19 2675" draw:points="0,0 19,0 19,2675 0,2675">
          <text:p/>
        </draw:polygon>
        <draw:polygon draw:style-name="gr9" draw:text-style-name="P7" draw:layer="layout" svg:width="0.018cm" svg:height="2.674cm" svg:x="3.96cm" svg:y="11.487cm" svg:viewBox="0 0 19 2675" draw:points="0,0 19,0 19,2675 0,2675">
          <text:p/>
        </draw:polygon>
        <draw:polygon draw:style-name="gr9" draw:text-style-name="P7" draw:layer="layout" svg:width="0.017cm" svg:height="2.674cm" svg:x="11.31cm" svg:y="11.487cm" svg:viewBox="0 0 18 2675" draw:points="0,0 18,0 18,2675 0,2675">
          <text:p/>
        </draw:polygon>
        <draw:polygon draw:style-name="gr9" draw:text-style-name="P7" draw:layer="layout" svg:width="0.018cm" svg:height="2.674cm" svg:x="14.997cm" svg:y="11.487cm" svg:viewBox="0 0 19 2675" draw:points="0,0 19,0 19,2675 0,2675">
          <text:p/>
        </draw:polygon>
        <draw:polygon draw:style-name="gr9" draw:text-style-name="P7" draw:layer="layout" svg:width="0.017cm" svg:height="2.674cm" svg:x="18.306cm" svg:y="11.487cm" svg:viewBox="0 0 18 2675" draw:points="0,0 18,0 18,2675 0,2675">
          <text:p/>
        </draw:polygon>
        <draw:polygon draw:style-name="gr9" draw:text-style-name="P7" draw:layer="layout" svg:width="0.018cm" svg:height="2.674cm" svg:x="20.82cm" svg:y="11.487cm" svg:viewBox="0 0 19 2675" draw:points="0,0 19,0 19,2675 0,2675">
          <text:p/>
        </draw:polygon>
        <draw:polygon draw:style-name="gr9" draw:text-style-name="P7" draw:layer="layout" svg:width="0.018cm" svg:height="2.674cm" svg:x="24.023cm" svg:y="11.487cm" svg:viewBox="0 0 19 2675" draw:points="0,0 19,0 19,2675 0,2675">
          <text:p/>
        </draw:polygon>
        <draw:polygon draw:style-name="gr9" draw:text-style-name="P7" draw:layer="layout" svg:width="0.018cm" svg:height="2.674cm" svg:x="26.308cm" svg:y="11.487cm" svg:viewBox="0 0 19 2675" draw:points="0,0 19,0 19,2675 0,2675">
          <text:p/>
        </draw:polygon>
        <draw:frame draw:style-name="gr4" draw:text-style-name="P3" draw:layer="layout" svg:width="0.634cm" svg:height="0.64cm" svg:x="25.17cm" svg:y="12.564cm">
          <draw:text-box>
            <text:p text:style-name="P1"><text:span text:style-name="T4"><text:s/></text:span></text:p>
          </draw:text-box>
        </draw:frame>
        <draw:frame draw:style-name="gr58" draw:text-style-name="P2" draw:layer="layout" svg:width="0.895cm" svg:height="0.708cm" svg:x="2.435cm" svg:y="15.608cm">
          <draw:text-box>
            <text:p text:style-name="P1"><text:span text:style-name="T7">Fri </text:span></text:p>
          </draw:text-box>
        </draw:frame>
        <draw:frame draw:style-name="gr59" draw:text-style-name="P5" draw:layer="layout" svg:width="3.838cm" svg:height="0.285cm" svg:x="4.04cm" svg:y="14.217cm">
          <draw:text-box>
            <text:p text:style-name="P1"><text:span text:style-name="T5">R-301 <text:s text:c="40"/>SAH </text:span></text:p>
          </draw:text-box>
        </draw:frame>
        <draw:frame draw:style-name="gr4" draw:text-style-name="P3" draw:layer="layout" svg:width="0.634cm" svg:height="0.64cm" svg:x="5.911cm" svg:y="14.655cm">
          <draw:text-box>
            <text:p text:style-name="P1"><text:span text:style-name="T4"><text:s/></text:span></text:p>
          </draw:text-box>
        </draw:frame>
        <draw:frame draw:style-name="gr60" draw:text-style-name="P3" draw:layer="layout" svg:width="2.743cm" svg:height="0.64cm" svg:x="4.523cm" svg:y="15.623cm">
          <draw:text-box>
            <text:p text:style-name="P1"><text:span text:style-name="T4">SWE 4101 </text:span></text:p>
          </draw:text-box>
        </draw:frame>
        <draw:frame draw:style-name="gr4" draw:text-style-name="P3" draw:layer="layout" svg:width="0.634cm" svg:height="0.64cm" svg:x="8.064cm" svg:y="14.311cm">
          <draw:text-box>
            <text:p text:style-name="P1"><text:span text:style-name="T4"><text:s/></text:span></text:p>
          </draw:text-box>
        </draw:frame>
        <draw:frame draw:style-name="gr61" draw:text-style-name="P5" draw:layer="layout" svg:width="6.905cm" svg:height="0.285cm" svg:x="11.404cm" svg:y="14.232cm">
          <draw:text-box>
            <text:p text:style-name="P1"><text:span text:style-name="T5">R-301 <text:s text:c="86"/>MUA </text:span></text:p>
          </draw:text-box>
        </draw:frame>
        <draw:frame draw:style-name="gr4" draw:text-style-name="P3" draw:layer="layout" svg:width="0.634cm" svg:height="0.64cm" svg:x="11.504cm" svg:y="14.655cm">
          <draw:text-box>
            <text:p text:style-name="P1"><text:span text:style-name="T4"><text:s text:c="2"/></text:span></text:p>
          </draw:text-box>
        </draw:frame>
        <draw:frame draw:style-name="gr52" draw:text-style-name="P3" draw:layer="layout" svg:width="5.699cm" svg:height="0.64cm" svg:x="12.104cm" svg:y="15.423cm">
          <draw:text-box>
            <text:p text:style-name="P1"><text:span text:style-name="T4">Math 4141(100 mins) </text:span></text:p>
          </draw:text-box>
        </draw:frame>
        <draw:polygon draw:style-name="gr9" draw:text-style-name="P7" draw:layer="layout" svg:width="0.018cm" svg:height="0.018cm" svg:x="1.632cm" svg:y="14.161cm" svg:viewBox="0 0 19 19" draw:points="0,0 19,0 19,19 0,19">
          <text:p/>
        </draw:polygon>
        <draw:polygon draw:style-name="gr9" draw:text-style-name="P7" draw:layer="layout" svg:width="2.31cm" svg:height="0.018cm" svg:x="1.65cm" svg:y="14.161cm" svg:viewBox="0 0 2311 19" draw:points="0,0 2311,0 2311,19 0,19">
          <text:p/>
        </draw:polygon>
        <draw:polygon draw:style-name="gr9" draw:text-style-name="P7" draw:layer="layout" svg:width="0.018cm" svg:height="0.018cm" svg:x="3.96cm" svg:y="14.161cm" svg:viewBox="0 0 19 19" draw:points="0,0 19,0 19,19 0,19">
          <text:p/>
        </draw:polygon>
        <draw:polygon draw:style-name="gr9" draw:text-style-name="P7" draw:layer="layout" svg:width="3.891cm" svg:height="0.018cm" svg:x="3.978cm" svg:y="14.161cm" svg:viewBox="0 0 3892 19" draw:points="0,0 3892,0 3892,19 0,19">
          <text:p/>
        </draw:polygon>
        <draw:polygon draw:style-name="gr9" draw:text-style-name="P7" draw:layer="layout" svg:width="0.018cm" svg:height="0.018cm" svg:x="7.869cm" svg:y="14.161cm" svg:viewBox="0 0 19 19" draw:points="0,0 19,0 19,19 0,19">
          <text:p/>
        </draw:polygon>
        <draw:polygon draw:style-name="gr9" draw:text-style-name="P7" draw:layer="layout" svg:width="3.423cm" svg:height="0.018cm" svg:x="7.887cm" svg:y="14.161cm" svg:viewBox="0 0 3424 19" draw:points="0,0 3424,0 3424,19 0,19">
          <text:p/>
        </draw:polygon>
        <draw:polygon draw:style-name="gr9" draw:text-style-name="P7" draw:layer="layout" svg:width="0.017cm" svg:height="0.018cm" svg:x="11.31cm" svg:y="14.161cm" svg:viewBox="0 0 18 19" draw:points="0,0 18,0 18,19 0,19">
          <text:p/>
        </draw:polygon>
        <draw:polygon draw:style-name="gr9" draw:text-style-name="P7" draw:layer="layout" svg:width="3.67cm" svg:height="0.018cm" svg:x="11.327cm" svg:y="14.161cm" svg:viewBox="0 0 3671 19" draw:points="0,0 3671,0 3671,19 0,19">
          <text:p/>
        </draw:polygon>
        <draw:polygon draw:style-name="gr9" draw:text-style-name="P7" draw:layer="layout" svg:width="0.018cm" svg:height="0.018cm" svg:x="14.997cm" svg:y="14.161cm" svg:viewBox="0 0 19 19" draw:points="0,0 19,0 19,19 0,19">
          <text:p/>
        </draw:polygon>
        <draw:polygon draw:style-name="gr9" draw:text-style-name="P7" draw:layer="layout" svg:width="3.291cm" svg:height="0.018cm" svg:x="15.015cm" svg:y="14.161cm" svg:viewBox="0 0 3292 19" draw:points="0,0 3292,0 3292,19 0,19">
          <text:p/>
        </draw:polygon>
        <draw:polygon draw:style-name="gr9" draw:text-style-name="P7" draw:layer="layout" svg:width="0.017cm" svg:height="0.018cm" svg:x="18.306cm" svg:y="14.161cm" svg:viewBox="0 0 18 19" draw:points="0,0 18,0 18,19 0,19">
          <text:p/>
        </draw:polygon>
        <draw:polygon draw:style-name="gr9" draw:text-style-name="P7" draw:layer="layout" svg:width="0.018cm" svg:height="0.018cm" svg:x="20.82cm" svg:y="14.161cm" svg:viewBox="0 0 19 19" draw:points="0,0 19,0 19,19 0,19">
          <text:p/>
        </draw:polygon>
        <draw:polygon draw:style-name="gr9" draw:text-style-name="P7" draw:layer="layout" svg:width="3.185cm" svg:height="0.018cm" svg:x="20.838cm" svg:y="14.161cm" svg:viewBox="0 0 3186 19" draw:points="0,0 3186,0 3186,19 0,19">
          <text:p/>
        </draw:polygon>
        <draw:polygon draw:style-name="gr9" draw:text-style-name="P7" draw:layer="layout" svg:width="0.018cm" svg:height="0.018cm" svg:x="24.023cm" svg:y="14.161cm" svg:viewBox="0 0 19 19" draw:points="0,0 19,0 19,19 0,19">
          <text:p/>
        </draw:polygon>
        <draw:polygon draw:style-name="gr9" draw:text-style-name="P7" draw:layer="layout" svg:width="2.267cm" svg:height="0.018cm" svg:x="24.041cm" svg:y="14.161cm" svg:viewBox="0 0 2268 19" draw:points="0,0 2268,0 2268,19 0,19">
          <text:p/>
        </draw:polygon>
        <draw:polygon draw:style-name="gr9" draw:text-style-name="P7" draw:layer="layout" svg:width="0.018cm" svg:height="0.018cm" svg:x="26.308cm" svg:y="14.161cm" svg:viewBox="0 0 19 19" draw:points="0,0 19,0 19,19 0,19">
          <text:p/>
        </draw:polygon>
        <draw:polygon draw:style-name="gr9" draw:text-style-name="P7" draw:layer="layout" svg:width="0.018cm" svg:height="0.776cm" svg:x="1.632cm" svg:y="14.179cm" svg:viewBox="0 0 19 777" draw:points="0,0 19,0 19,777 0,777">
          <text:p/>
        </draw:polygon>
        <draw:polygon draw:style-name="gr9" draw:text-style-name="P7" draw:layer="layout" svg:width="0.018cm" svg:height="0.776cm" svg:x="3.96cm" svg:y="14.179cm" svg:viewBox="0 0 19 777" draw:points="0,0 19,0 19,777 0,777">
          <text:p/>
        </draw:polygon>
        <draw:polygon draw:style-name="gr9" draw:text-style-name="P7" draw:layer="layout" svg:width="0.018cm" svg:height="0.776cm" svg:x="7.869cm" svg:y="14.179cm" svg:viewBox="0 0 19 777" draw:points="0,0 19,0 19,777 0,777">
          <text:p/>
        </draw:polygon>
        <draw:polygon draw:style-name="gr9" draw:text-style-name="P7" draw:layer="layout" svg:width="0.017cm" svg:height="0.776cm" svg:x="11.31cm" svg:y="14.179cm" svg:viewBox="0 0 18 777" draw:points="0,0 18,0 18,777 0,777">
          <text:p/>
        </draw:polygon>
        <draw:polygon draw:style-name="gr9" draw:text-style-name="P7" draw:layer="layout" svg:width="0.017cm" svg:height="0.776cm" svg:x="18.306cm" svg:y="14.179cm" svg:viewBox="0 0 18 777" draw:points="0,0 18,0 18,777 0,777">
          <text:p/>
        </draw:polygon>
        <draw:polygon draw:style-name="gr9" draw:text-style-name="P7" draw:layer="layout" svg:width="0.018cm" svg:height="0.776cm" svg:x="20.82cm" svg:y="14.179cm" svg:viewBox="0 0 19 777" draw:points="0,0 19,0 19,777 0,777">
          <text:p/>
        </draw:polygon>
        <draw:polygon draw:style-name="gr9" draw:text-style-name="P7" draw:layer="layout" svg:width="0.018cm" svg:height="0.776cm" svg:x="26.308cm" svg:y="14.179cm" svg:viewBox="0 0 19 777" draw:points="0,0 19,0 19,777 0,777">
          <text:p/>
        </draw:polygon>
        <draw:frame draw:style-name="gr4" draw:text-style-name="P3" draw:layer="layout" svg:width="0.634cm" svg:height="0.64cm" svg:x="23.564cm" svg:y="14.311cm">
          <draw:text-box>
            <text:p text:style-name="P1"><text:span text:style-name="T4"><text:s/></text:span></text:p>
          </draw:text-box>
        </draw:frame>
        <draw:frame draw:style-name="gr17" draw:text-style-name="P5" draw:layer="layout" svg:width="0.281cm" svg:height="0.285cm" svg:x="21.015cm" svg:y="15.026cm">
          <draw:text-box>
            <text:p text:style-name="P1"><text:span text:style-name="T5">A</text:span></text:p>
          </draw:text-box>
        </draw:frame>
        <draw:frame draw:style-name="gr4" draw:text-style-name="P3" draw:layer="layout" svg:width="0.634cm" svg:height="0.64cm" svg:x="21.174cm" svg:y="14.761cm">
          <draw:text-box>
            <text:p text:style-name="P1"><text:span text:style-name="T4"><text:s/></text:span></text:p>
          </draw:text-box>
        </draw:frame>
        <draw:frame draw:style-name="gr62" draw:text-style-name="P5" draw:layer="layout" svg:width="1.292cm" svg:height="0.285cm" svg:x="20.815cm" svg:y="15.805cm">
          <draw:text-box>
            <text:p text:style-name="P1"><text:span text:style-name="T5"><text:s text:c="2"/>AA <text:s text:c="12"/></text:span></text:p>
          </draw:text-box>
        </draw:frame>
        <draw:polygon draw:style-name="gr9" draw:text-style-name="P7" draw:layer="layout" svg:width="0.018cm" svg:height="0.017cm" svg:x="1.632cm" svg:y="14.955cm" svg:viewBox="0 0 19 18" draw:points="0,0 19,0 19,18 0,18">
          <text:p/>
        </draw:polygon>
        <draw:polygon draw:style-name="gr9" draw:text-style-name="P7" draw:layer="layout" svg:width="0.018cm" svg:height="0.017cm" svg:x="3.96cm" svg:y="14.955cm" svg:viewBox="0 0 19 18" draw:points="0,0 19,0 19,18 0,18">
          <text:p/>
        </draw:polygon>
        <draw:polygon draw:style-name="gr9" draw:text-style-name="P7" draw:layer="layout" svg:width="0.018cm" svg:height="0.017cm" svg:x="7.869cm" svg:y="14.955cm" svg:viewBox="0 0 19 18" draw:points="0,0 19,0 19,18 0,18">
          <text:p/>
        </draw:polygon>
        <draw:polygon draw:style-name="gr9" draw:text-style-name="P7" draw:layer="layout" svg:width="0.017cm" svg:height="0.017cm" svg:x="11.31cm" svg:y="14.955cm" svg:viewBox="0 0 18 18" draw:points="0,0 18,0 18,18 0,18">
          <text:p/>
        </draw:polygon>
        <draw:polygon draw:style-name="gr9" draw:text-style-name="P7" draw:layer="layout" svg:width="0.017cm" svg:height="0.017cm" svg:x="18.306cm" svg:y="14.955cm" svg:viewBox="0 0 18 18" draw:points="0,0 18,0 18,18 0,18">
          <text:p/>
        </draw:polygon>
        <draw:polygon draw:style-name="gr9" draw:text-style-name="P7" draw:layer="layout" svg:width="0.018cm" svg:height="0.017cm" svg:x="20.82cm" svg:y="14.955cm" svg:viewBox="0 0 19 18" draw:points="0,0 19,0 19,18 0,18">
          <text:p/>
        </draw:polygon>
        <draw:polygon draw:style-name="gr9" draw:text-style-name="P7" draw:layer="layout" svg:width="5.47cm" svg:height="0.017cm" svg:x="20.838cm" svg:y="14.955cm" svg:viewBox="0 0 5471 18" draw:points="0,0 5471,0 5471,18 0,18">
          <text:p/>
        </draw:polygon>
        <draw:polygon draw:style-name="gr9" draw:text-style-name="P7" draw:layer="layout" svg:width="0.018cm" svg:height="0.017cm" svg:x="26.308cm" svg:y="14.955cm" svg:viewBox="0 0 19 18" draw:points="0,0 19,0 19,18 0,18">
          <text:p/>
        </draw:polygon>
        <draw:polygon draw:style-name="gr9" draw:text-style-name="P7" draw:layer="layout" svg:width="0.018cm" svg:height="1.112cm" svg:x="1.632cm" svg:y="14.972cm" svg:viewBox="0 0 19 1113" draw:points="0,0 19,0 19,1113 0,1113">
          <text:p/>
        </draw:polygon>
        <draw:polygon draw:style-name="gr9" draw:text-style-name="P7" draw:layer="layout" svg:width="0.018cm" svg:height="1.112cm" svg:x="3.96cm" svg:y="14.972cm" svg:viewBox="0 0 19 1113" draw:points="0,0 19,0 19,1113 0,1113">
          <text:p/>
        </draw:polygon>
        <draw:polygon draw:style-name="gr9" draw:text-style-name="P7" draw:layer="layout" svg:width="0.018cm" svg:height="1.112cm" svg:x="7.869cm" svg:y="14.972cm" svg:viewBox="0 0 19 1113" draw:points="0,0 19,0 19,1113 0,1113">
          <text:p/>
        </draw:polygon>
        <draw:polygon draw:style-name="gr9" draw:text-style-name="P7" draw:layer="layout" svg:width="0.017cm" svg:height="1.112cm" svg:x="11.31cm" svg:y="14.972cm" svg:viewBox="0 0 18 1113" draw:points="0,0 18,0 18,1113 0,1113">
          <text:p/>
        </draw:polygon>
        <draw:polygon draw:style-name="gr9" draw:text-style-name="P7" draw:layer="layout" svg:width="0.017cm" svg:height="1.112cm" svg:x="18.306cm" svg:y="14.972cm" svg:viewBox="0 0 18 1113" draw:points="0,0 18,0 18,1113 0,1113">
          <text:p/>
        </draw:polygon>
        <draw:polygon draw:style-name="gr9" draw:text-style-name="P7" draw:layer="layout" svg:width="0.018cm" svg:height="1.112cm" svg:x="20.82cm" svg:y="14.972cm" svg:viewBox="0 0 19 1113" draw:points="0,0 19,0 19,1113 0,1113">
          <text:p/>
        </draw:polygon>
        <draw:polygon draw:style-name="gr9" draw:text-style-name="P7" draw:layer="layout" svg:width="0.018cm" svg:height="1.112cm" svg:x="26.308cm" svg:y="14.972cm" svg:viewBox="0 0 19 1113" draw:points="0,0 19,0 19,1113 0,1113">
          <text:p/>
        </draw:polygon>
        <draw:frame draw:style-name="gr63" draw:text-style-name="P3" draw:layer="layout" svg:width="2.232cm" svg:height="0.634cm" svg:x="22.585cm" svg:y="15.34cm">
          <draw:text-box>
            <text:p text:style-name="P1"><text:span text:style-name="T12">CSE 4104 </text:span></text:p>
          </draw:text-box>
        </draw:frame>
        <draw:frame draw:style-name="gr64" draw:text-style-name="P5" draw:layer="layout" svg:width="5.293cm" svg:height="0.285cm" svg:x="21.015cm" svg:y="16.155cm">
          <draw:text-box>
            <text:p text:style-name="P1"><text:span text:style-name="T5">B <text:s text:c="74"/>L6 </text:span></text:p>
          </draw:text-box>
        </draw:frame>
        <draw:polygon draw:style-name="gr9" draw:text-style-name="P7" draw:layer="layout" svg:width="0.018cm" svg:height="0.017cm" svg:x="1.632cm" svg:y="16.084cm" svg:viewBox="0 0 19 18" draw:points="0,0 19,0 19,18 0,18">
          <text:p/>
        </draw:polygon>
        <draw:polygon draw:style-name="gr9" draw:text-style-name="P7" draw:layer="layout" svg:width="0.018cm" svg:height="0.017cm" svg:x="3.96cm" svg:y="16.084cm" svg:viewBox="0 0 19 18" draw:points="0,0 19,0 19,18 0,18">
          <text:p/>
        </draw:polygon>
        <draw:polygon draw:style-name="gr9" draw:text-style-name="P7" draw:layer="layout" svg:width="0.018cm" svg:height="0.017cm" svg:x="7.869cm" svg:y="16.084cm" svg:viewBox="0 0 19 18" draw:points="0,0 19,0 19,18 0,18">
          <text:p/>
        </draw:polygon>
        <draw:polygon draw:style-name="gr9" draw:text-style-name="P7" draw:layer="layout" svg:width="0.017cm" svg:height="0.017cm" svg:x="11.31cm" svg:y="16.084cm" svg:viewBox="0 0 18 18" draw:points="0,0 18,0 18,18 0,18">
          <text:p/>
        </draw:polygon>
        <draw:polygon draw:style-name="gr9" draw:text-style-name="P7" draw:layer="layout" svg:width="0.017cm" svg:height="0.017cm" svg:x="18.306cm" svg:y="16.084cm" svg:viewBox="0 0 18 18" draw:points="0,0 18,0 18,18 0,18">
          <text:p/>
        </draw:polygon>
        <draw:polygon draw:style-name="gr9" draw:text-style-name="P7" draw:layer="layout" svg:width="0.018cm" svg:height="0.017cm" svg:x="20.82cm" svg:y="16.084cm" svg:viewBox="0 0 19 18" draw:points="0,0 19,0 19,18 0,18">
          <text:p/>
        </draw:polygon>
        <draw:polygon draw:style-name="gr9" draw:text-style-name="P7" draw:layer="layout" svg:width="5.47cm" svg:height="0.017cm" svg:x="20.838cm" svg:y="16.084cm" svg:viewBox="0 0 5471 18" draw:points="0,0 5471,0 5471,18 0,18">
          <text:p/>
        </draw:polygon>
        <draw:polygon draw:style-name="gr9" draw:text-style-name="P7" draw:layer="layout" svg:width="0.018cm" svg:height="0.017cm" svg:x="26.308cm" svg:y="16.084cm" svg:viewBox="0 0 19 18" draw:points="0,0 19,0 19,18 0,18">
          <text:p/>
        </draw:polygon>
        <draw:polygon draw:style-name="gr9" draw:text-style-name="P7" draw:layer="layout" svg:width="0.018cm" svg:height="0.954cm" svg:x="1.632cm" svg:y="16.101cm" svg:viewBox="0 0 19 955" draw:points="0,0 19,0 19,955 0,955">
          <text:p/>
        </draw:polygon>
        <draw:polygon draw:style-name="gr9" draw:text-style-name="P7" draw:layer="layout" svg:width="0.018cm" svg:height="0.954cm" svg:x="3.96cm" svg:y="16.101cm" svg:viewBox="0 0 19 955" draw:points="0,0 19,0 19,955 0,955">
          <text:p/>
        </draw:polygon>
        <draw:polygon draw:style-name="gr9" draw:text-style-name="P7" draw:layer="layout" svg:width="0.018cm" svg:height="0.954cm" svg:x="7.869cm" svg:y="16.101cm" svg:viewBox="0 0 19 955" draw:points="0,0 19,0 19,955 0,955">
          <text:p/>
        </draw:polygon>
        <draw:polygon draw:style-name="gr9" draw:text-style-name="P7" draw:layer="layout" svg:width="0.017cm" svg:height="0.954cm" svg:x="11.31cm" svg:y="16.101cm" svg:viewBox="0 0 18 955" draw:points="0,0 18,0 18,955 0,955">
          <text:p/>
        </draw:polygon>
        <draw:polygon draw:style-name="gr9" draw:text-style-name="P7" draw:layer="layout" svg:width="0.017cm" svg:height="0.954cm" svg:x="18.306cm" svg:y="16.101cm" svg:viewBox="0 0 18 955" draw:points="0,0 18,0 18,955 0,955">
          <text:p/>
        </draw:polygon>
        <draw:polygon draw:style-name="gr9" draw:text-style-name="P7" draw:layer="layout" svg:width="0.018cm" svg:height="0.954cm" svg:x="20.82cm" svg:y="16.101cm" svg:viewBox="0 0 19 955" draw:points="0,0 19,0 19,955 0,955">
          <text:p/>
        </draw:polygon>
        <draw:polygon draw:style-name="gr9" draw:text-style-name="P7" draw:layer="layout" svg:width="0.018cm" svg:height="0.954cm" svg:x="26.308cm" svg:y="16.101cm" svg:viewBox="0 0 19 955" draw:points="0,0 19,0 19,955 0,955">
          <text:p/>
        </draw:polygon>
        <draw:frame draw:style-name="gr65" draw:text-style-name="P12" draw:layer="layout" svg:width="2.217cm" svg:height="0.564cm" svg:x="22.547cm" svg:y="16.352cm">
          <draw:text-box>
            <text:p text:style-name="P1"><text:span text:style-name="T12">CSE 4104</text:span><text:span text:style-name="T10"> </text:span></text:p>
          </draw:text-box>
        </draw:frame>
        <draw:polygon draw:style-name="gr9" draw:text-style-name="P7" draw:layer="layout" svg:width="0.018cm" svg:height="0.017cm" svg:x="1.632cm" svg:y="17.055cm" svg:viewBox="0 0 19 18" draw:points="0,0 19,0 19,18 0,18">
          <text:p/>
        </draw:polygon>
        <draw:polygon draw:style-name="gr9" draw:text-style-name="P7" draw:layer="layout" svg:width="0.018cm" svg:height="0.017cm" svg:x="3.96cm" svg:y="17.055cm" svg:viewBox="0 0 19 18" draw:points="0,0 19,0 19,18 0,18">
          <text:p/>
        </draw:polygon>
        <draw:polygon draw:style-name="gr9" draw:text-style-name="P7" draw:layer="layout" svg:width="0.018cm" svg:height="0.017cm" svg:x="7.869cm" svg:y="17.055cm" svg:viewBox="0 0 19 18" draw:points="0,0 19,0 19,18 0,18">
          <text:p/>
        </draw:polygon>
        <draw:polygon draw:style-name="gr9" draw:text-style-name="P7" draw:layer="layout" svg:width="0.017cm" svg:height="0.017cm" svg:x="11.31cm" svg:y="17.055cm" svg:viewBox="0 0 18 18" draw:points="0,0 18,0 18,18 0,18">
          <text:p/>
        </draw:polygon>
        <draw:polygon draw:style-name="gr9" draw:text-style-name="P7" draw:layer="layout" svg:width="0.017cm" svg:height="0.017cm" svg:x="18.306cm" svg:y="17.055cm" svg:viewBox="0 0 18 18" draw:points="0,0 18,0 18,18 0,18">
          <text:p/>
        </draw:polygon>
        <draw:polygon draw:style-name="gr9" draw:text-style-name="P7" draw:layer="layout" svg:width="0.018cm" svg:height="0.017cm" svg:x="20.82cm" svg:y="17.055cm" svg:viewBox="0 0 19 18" draw:points="0,0 19,0 19,18 0,18">
          <text:p/>
        </draw:polygon>
        <draw:polygon draw:style-name="gr9" draw:text-style-name="P7" draw:layer="layout" svg:width="5.47cm" svg:height="0.017cm" svg:x="20.838cm" svg:y="17.055cm" svg:viewBox="0 0 5471 18" draw:points="0,0 5471,0 5471,18 0,18">
          <text:p/>
        </draw:polygon>
        <draw:polygon draw:style-name="gr9" draw:text-style-name="P7" draw:layer="layout" svg:width="0.018cm" svg:height="0.017cm" svg:x="26.308cm" svg:y="17.055cm" svg:viewBox="0 0 19 18" draw:points="0,0 19,0 19,18 0,18">
          <text:p/>
        </draw:polygon>
        <draw:polygon draw:style-name="gr9" draw:text-style-name="P7" draw:layer="layout" svg:width="0.018cm" svg:height="0.529cm" svg:x="1.632cm" svg:y="17.072cm" svg:viewBox="0 0 19 530" draw:points="0,0 19,0 19,530 0,530">
          <text:p/>
        </draw:polygon>
        <draw:polygon draw:style-name="gr9" draw:text-style-name="P7" draw:layer="layout" svg:width="0.018cm" svg:height="0.018cm" svg:x="1.632cm" svg:y="17.601cm" svg:viewBox="0 0 19 19" draw:points="0,0 19,0 19,19 0,19">
          <text:p/>
        </draw:polygon>
        <draw:polygon draw:style-name="gr9" draw:text-style-name="P7" draw:layer="layout" svg:width="0.018cm" svg:height="0.018cm" svg:x="1.632cm" svg:y="17.601cm" svg:viewBox="0 0 19 19" draw:points="0,0 19,0 19,19 0,19">
          <text:p/>
        </draw:polygon>
        <draw:polygon draw:style-name="gr9" draw:text-style-name="P7" draw:layer="layout" svg:width="2.31cm" svg:height="0.018cm" svg:x="1.65cm" svg:y="17.601cm" svg:viewBox="0 0 2311 19" draw:points="0,0 2311,0 2311,19 0,19">
          <text:p/>
        </draw:polygon>
        <draw:polygon draw:style-name="gr9" draw:text-style-name="P7" draw:layer="layout" svg:width="0.018cm" svg:height="0.529cm" svg:x="3.96cm" svg:y="17.072cm" svg:viewBox="0 0 19 530" draw:points="0,0 19,0 19,530 0,530">
          <text:p/>
        </draw:polygon>
        <draw:polygon draw:style-name="gr9" draw:text-style-name="P7" draw:layer="layout" svg:width="0.018cm" svg:height="0.018cm" svg:x="3.96cm" svg:y="17.601cm" svg:viewBox="0 0 19 19" draw:points="0,0 19,0 19,19 0,19">
          <text:p/>
        </draw:polygon>
        <draw:polygon draw:style-name="gr9" draw:text-style-name="P7" draw:layer="layout" svg:width="3.891cm" svg:height="0.018cm" svg:x="3.978cm" svg:y="17.601cm" svg:viewBox="0 0 3892 19" draw:points="0,0 3892,0 3892,19 0,19">
          <text:p/>
        </draw:polygon>
        <draw:polygon draw:style-name="gr9" draw:text-style-name="P7" draw:layer="layout" svg:width="0.018cm" svg:height="0.529cm" svg:x="7.869cm" svg:y="17.072cm" svg:viewBox="0 0 19 530" draw:points="0,0 19,0 19,530 0,530">
          <text:p/>
        </draw:polygon>
        <draw:polygon draw:style-name="gr9" draw:text-style-name="P7" draw:layer="layout" svg:width="0.018cm" svg:height="0.018cm" svg:x="7.869cm" svg:y="17.601cm" svg:viewBox="0 0 19 19" draw:points="0,0 19,0 19,19 0,19">
          <text:p/>
        </draw:polygon>
        <draw:polygon draw:style-name="gr9" draw:text-style-name="P7" draw:layer="layout" svg:width="3.423cm" svg:height="0.018cm" svg:x="7.887cm" svg:y="17.601cm" svg:viewBox="0 0 3424 19" draw:points="0,0 3424,0 3424,19 0,19">
          <text:p/>
        </draw:polygon>
        <draw:polygon draw:style-name="gr9" draw:text-style-name="P7" draw:layer="layout" svg:width="0.017cm" svg:height="0.529cm" svg:x="11.31cm" svg:y="17.072cm" svg:viewBox="0 0 18 530" draw:points="0,0 18,0 18,530 0,530">
          <text:p/>
        </draw:polygon>
        <draw:polygon draw:style-name="gr9" draw:text-style-name="P7" draw:layer="layout" svg:width="0.017cm" svg:height="0.018cm" svg:x="11.31cm" svg:y="17.601cm" svg:viewBox="0 0 18 19" draw:points="0,0 18,0 18,19 0,19">
          <text:p/>
        </draw:polygon>
        <draw:polygon draw:style-name="gr9" draw:text-style-name="P7" draw:layer="layout" svg:width="6.979cm" svg:height="0.018cm" svg:x="11.327cm" svg:y="17.601cm" svg:viewBox="0 0 6980 19" draw:points="0,0 6980,0 6980,19 0,19">
          <text:p/>
        </draw:polygon>
        <draw:polygon draw:style-name="gr9" draw:text-style-name="P7" draw:layer="layout" svg:width="0.017cm" svg:height="0.529cm" svg:x="18.306cm" svg:y="17.072cm" svg:viewBox="0 0 18 530" draw:points="0,0 18,0 18,530 0,530">
          <text:p/>
        </draw:polygon>
        <draw:polygon draw:style-name="gr9" draw:text-style-name="P7" draw:layer="layout" svg:width="0.017cm" svg:height="0.018cm" svg:x="18.306cm" svg:y="17.601cm" svg:viewBox="0 0 18 19" draw:points="0,0 18,0 18,19 0,19">
          <text:p/>
        </draw:polygon>
        <draw:polygon draw:style-name="gr9" draw:text-style-name="P7" draw:layer="layout" svg:width="2.497cm" svg:height="0.018cm" svg:x="18.323cm" svg:y="17.601cm" svg:viewBox="0 0 2498 19" draw:points="0,0 2498,0 2498,19 0,19">
          <text:p/>
        </draw:polygon>
        <draw:polygon draw:style-name="gr9" draw:text-style-name="P7" draw:layer="layout" svg:width="0.018cm" svg:height="0.529cm" svg:x="20.82cm" svg:y="17.072cm" svg:viewBox="0 0 19 530" draw:points="0,0 19,0 19,530 0,530">
          <text:p/>
        </draw:polygon>
        <draw:polygon draw:style-name="gr9" draw:text-style-name="P7" draw:layer="layout" svg:width="0.018cm" svg:height="0.018cm" svg:x="20.82cm" svg:y="17.601cm" svg:viewBox="0 0 19 19" draw:points="0,0 19,0 19,19 0,19">
          <text:p/>
        </draw:polygon>
        <draw:polygon draw:style-name="gr9" draw:text-style-name="P7" draw:layer="layout" svg:width="5.47cm" svg:height="0.018cm" svg:x="20.838cm" svg:y="17.601cm" svg:viewBox="0 0 5471 19" draw:points="0,0 5471,0 5471,19 0,19">
          <text:p/>
        </draw:polygon>
        <draw:polygon draw:style-name="gr9" draw:text-style-name="P7" draw:layer="layout" svg:width="0.018cm" svg:height="0.529cm" svg:x="26.308cm" svg:y="17.072cm" svg:viewBox="0 0 19 530" draw:points="0,0 19,0 19,530 0,530">
          <text:p/>
        </draw:polygon>
        <draw:polygon draw:style-name="gr9" draw:text-style-name="P7" draw:layer="layout" svg:width="0.018cm" svg:height="0.018cm" svg:x="26.308cm" svg:y="17.601cm" svg:viewBox="0 0 19 19" draw:points="0,0 19,0 19,19 0,19">
          <text:p/>
        </draw:polygon>
        <draw:polygon draw:style-name="gr9" draw:text-style-name="P7" draw:layer="layout" svg:width="0.018cm" svg:height="0.018cm" svg:x="26.308cm" svg:y="17.601cm" svg:viewBox="0 0 19 19" draw:points="0,0 19,0 19,19 0,19">
          <text:p/>
        </draw:polygon>
        <draw:path draw:style-name="gr66" draw:text-style-name="P16" draw:layer="layout" svg:width="0.503cm" svg:height="0.026cm" svg:x="21.845cm" svg:y="6.415cm" svg:viewBox="0 0 504 27" svg:d="M0 0c55 3 111 6 167 9s113 6 169 9c56 2 112 6 168 9">
          <text:p/>
        </draw:path>
        <draw:path draw:style-name="gr66" draw:text-style-name="P16" draw:layer="layout" svg:width="0.267cm" svg:height="0.022cm" svg:x="12.35cm" svg:y="9.765cm" svg:viewBox="0 0 268 23" svg:d="M0 0c46 4 90 7 135 12 44 4 88 7 133 11">
          <text:p/>
        </draw:path>
        <draw:path draw:style-name="gr66" draw:text-style-name="P16" draw:layer="layout" svg:width="0.001cm" svg:height="0.009cm" svg:x="11.051cm" svg:y="7.507cm" svg:viewBox="0 0 2 10" svg:d="M2 10c0-3-2-7-2-10">
          <text:p/>
        </draw:path>
        <draw:path draw:style-name="gr66" draw:text-style-name="P16" draw:layer="layout" svg:width="0.013cm" svg:height="0.003cm" svg:x="11.002cm" svg:y="9.423cm" svg:viewBox="0 0 14 4" svg:d="M14 0c-5 2-9 2-14 4">
          <text:p/>
        </draw:path>
        <draw:path draw:style-name="gr67" draw:text-style-name="P16" draw:layer="layout" svg:width="0.166cm" svg:height="0.22cm" svg:x="14.556cm" svg:y="8.367cm" svg:viewBox="0 0 167 221" svg:d="M0 16c1-3 1-6 2-10 0-3 1-5 2-6s3 0 5 3 3 14 5 32c1 19 0 41-1 68-2 26-3 49-4 67-1 19-1 32-1 38 0 7 0 10 0 11s0 1 0 1v1h2c1 0 6 0 17-1 10 0 25-2 45-5 19-2 34-4 45-6 10-1 16-2 19-2 1 0 2 0 3 0 0 0 2 0 5 0 3-1 6-1 9-2 3 0 6-1 9-1 2 0 4-1 4-1 1 0 1 0 1 0 0-1-1-1-3 0">
          <text:p/>
        </draw:path>
        <draw:path draw:style-name="gr67" draw:text-style-name="P16" draw:layer="layout" svg:width="0.156cm" svg:height="0.233cm" svg:x="14.803cm" svg:y="8.349cm" svg:viewBox="0 0 157 234" svg:d="M81 39c0-3 1-7 3-12 2-3 2-4 2-2s-3 10-8 24-12 34-21 58c-10 25-20 50-30 72-11 23-18 38-22 45-4 8-6 11-5 9 0-1 2-8 7-19 4-11 10-28 18-50 8-24 17-51 29-83 11-32 22-54 33-66 12-12 21-17 28-15s11 11 14 26c2 16 3 37 3 64-1 27 0 52 2 74 1 21 5 36 10 45 4 9 8 14 10 15s3 0 3-2">
          <text:p/>
        </draw:path>
        <draw:path draw:style-name="gr67" draw:text-style-name="P16" draw:layer="layout" svg:width="0.078cm" svg:height="0.007cm" svg:x="14.86cm" svg:y="8.488cm" svg:viewBox="0 0 79 8" svg:d="M0 8c-1-2 3-3 11-4 12-2 34-3 68-4">
          <text:p/>
        </draw:path>
        <draw:path draw:style-name="gr67" draw:text-style-name="P16" draw:layer="layout" svg:width="0.171cm" svg:height="0.323cm" svg:x="15.055cm" svg:y="8.294cm" svg:viewBox="0 0 172 324" svg:d="M9 108c0-2 0-5-2-8 0-3-1 0 0 7 0 8 1 20 1 38 1 18 1 38 0 60-1 21-3 40-5 55-2 17-3 26-3 28v3-1c0-1 0-4 0-9 1-5 1-18 2-37s3-45 6-77c3-33 9-64 20-95 10-30 23-51 40-62 17-12 33-13 48-5 15 9 24 26 28 51 4 26 2 52-8 79-9 28-20 47-31 58-10 11-17 17-19 18l-2 1 2-1c2-1 8-3 18-6 10-4 23-5 39-3 17 2 26 12 29 31 2 19-4 38-19 54s-31 27-49 33c-26 9-44 4-54-16">
          <text:p/>
        </draw:path>
        <draw:polygon draw:style-name="gr67" draw:text-style-name="P16" draw:layer="layout" svg:width="1.257cm" svg:height="0.61cm" svg:x="14.309cm" svg:y="8.195cm" svg:viewBox="0 0 1258 611" draw:points="0,0 1258,0 1258,611 0,611">
          <text:p/>
        </draw:polygon>
        <draw:path draw:style-name="gr67" draw:text-style-name="P16" draw:layer="layout" svg:width="0.166cm" svg:height="0.221cm" svg:x="23.275cm" svg:y="5.354cm" svg:viewBox="0 0 167 222" svg:d="M0 16c1-3 1-6 2-9 0-3 1-5 2-7 1-1 3 0 5 3s3 14 5 34c1 18 0 40-1 67-2 26-3 48-4 67-1 18-1 31-1 37 0 7 0 11 0 11 0 1 0 2 0 2v1h2c1 0 6 0 17-1 10-1 26-2 46-5 19-3 34-5 45-6 10-1 16-2 18-2 1 0 2 0 3 0 0 0 2 0 5-1 3 0 6-1 9-1 3-1 6-1 9-2 2 0 4 0 4 0 1 0 1-1 1-1 0 0-1 0-3 0">
          <text:p/>
        </draw:path>
        <draw:path draw:style-name="gr67" draw:text-style-name="P16" draw:layer="layout" svg:width="0.156cm" svg:height="0.234cm" svg:x="23.522cm" svg:y="5.336cm" svg:viewBox="0 0 157 235" svg:d="M81 39c0-3 1-6 3-11 2-4 2-4 2-2s-3 10-8 24-12 33-21 58c-10 25-20 49-30 72-11 22-18 37-22 45-4 7-6 10-5 9 0-2 2-8 7-19 4-11 10-28 18-51s17-51 29-83c11-31 22-53 33-65 11-13 20-18 28-16 7 2 11 11 14 27 2 15 3 36 3 64-1 27 0 52 2 73 1 21 5 36 10 46 4 9 8 14 10 14 2 1 3 1 3-1">
          <text:p/>
        </draw:path>
        <draw:path draw:style-name="gr67" draw:text-style-name="P16" draw:layer="layout" svg:width="0.078cm" svg:height="0.008cm" svg:x="23.579cm" svg:y="5.474cm" svg:viewBox="0 0 79 9" svg:d="M0 9c-1-2 3-3 11-4 13-2 35-4 68-5">
          <text:p/>
        </draw:path>
        <draw:path draw:style-name="gr67" draw:text-style-name="P16" draw:layer="layout" svg:width="0.171cm" svg:height="0.323cm" svg:x="23.774cm" svg:y="5.28cm" svg:viewBox="0 0 172 324" svg:d="M9 109c0-1 0-4-2-8 0-2-1 0 0 8 0 7 1 20 1 38 1 18 1 38 0 59s-3 40-5 56c-2 15-3 24-3 27v2c0-2 0-5 0-10 1-5 1-17 2-36s3-45 6-77 9-64 20-94c10-32 23-52 40-64 17-11 33-13 48-4 15 8 24 25 28 52 4 25 2 52-8 79-9 27-20 46-31 57-10 11-17 17-19 18l-2 1 2-1c2 0 8-3 18-6s23-4 39-3c17 2 26 12 29 32 2 19-4 36-19 52s-31 27-49 34c-26 8-44 3-54-16">
          <text:p/>
        </draw:path>
        <draw:polygon draw:style-name="gr67" draw:text-style-name="P16" draw:layer="layout" svg:width="1.257cm" svg:height="0.61cm" svg:x="23.028cm" svg:y="5.182cm" svg:viewBox="0 0 1258 611" draw:points="0,0 1258,0 1258,611 0,611">
          <text:p/>
        </draw:polygon>
        <draw:path draw:style-name="gr67" draw:text-style-name="P16" draw:layer="layout" svg:width="0.166cm" svg:height="0.22cm" svg:x="23.537cm" svg:y="14.483cm" svg:viewBox="0 0 167 221" svg:d="M0 16c0-3 1-6 1-10 1-3 2-5 3-6s2 0 4 3 4 14 5 32c1 19 1 41-1 67-1 26-2 50-3 68-1 19-1 31-1 38 0 6-1 10-1 11s0 1 0 1v1c0 0 1 0 2 0s7 0 18-1c10 0 25-2 44-5s34-5 45-6c12-1 18-2 20-2 1 0 2 0 2 0 1 0 2 0 5 0 3-1 6-1 10-2 3 0 6-1 8-1 3 0 4-1 5-1s1 0 1 0c0-1-1-1-3 0">
          <text:p/>
        </draw:path>
        <draw:path draw:style-name="gr67" draw:text-style-name="P16" draw:layer="layout" svg:width="0.157cm" svg:height="0.233cm" svg:x="23.783cm" svg:y="14.465cm" svg:viewBox="0 0 158 234" svg:d="M82 39c1-3 2-7 4-12 1-3 2-4 2-2-1 2-3 10-8 24s-12 34-22 59-20 49-30 71c-10 23-17 38-22 45-4 8-6 11-6 9 0-1 3-8 8-19 4-11 10-28 18-51 8-22 18-50 29-82 12-32 23-54 34-66s20-17 27-15c6 2 11 11 13 26 3 15 4 37 3 64 0 28 0 53 2 74s5 36 10 45 8 14 10 15 3 0 4-2">
          <text:p/>
        </draw:path>
        <draw:path draw:style-name="gr67" draw:text-style-name="P16" draw:layer="layout" svg:width="0.079cm" svg:height="0.008cm" svg:x="23.84cm" svg:y="14.603cm" svg:viewBox="0 0 80 9" svg:d="M0 9c0-1 4-2 12-3 11-2 33-4 68-6">
          <text:p/>
        </draw:path>
        <draw:path draw:style-name="gr67" draw:text-style-name="P16" draw:layer="layout" svg:width="0.171cm" svg:height="0.324cm" svg:x="24.036cm" svg:y="14.41cm" svg:viewBox="0 0 172 325" svg:d="M8 107c1-1 0-4-1-7s-1 0-1 7c1 8 1 20 2 38s1 38 0 59c-2 22-3 40-5 56s-3 25-3 28v3-1c0-1 0-5 0-10s1-17 2-36 3-45 5-77c3-33 10-64 20-95 10-30 24-51 40-63 17-11 33-12 48-4 15 9 24 26 28 51 4 26 1 52-8 79-10 28-20 47-31 58s-18 17-20 18h-2 2c3-1 9-3 18-7 10-3 23-4 40-2 16 2 27 12 29 31 3 19-4 37-19 53-15 17-31 28-49 34-26 9-43 4-54-16">
          <text:p/>
        </draw:path>
        <draw:polygon draw:style-name="gr67" draw:text-style-name="P16" draw:layer="layout" svg:width="1.256cm" svg:height="0.611cm" svg:x="23.29cm" svg:y="14.311cm" svg:viewBox="0 0 1257 612" draw:points="0,0 1257,0 1257,612 0,612">
          <text:p/>
        </draw:polygon>
        <draw:path draw:style-name="gr67" draw:text-style-name="P16" draw:layer="layout" svg:width="0.166cm" svg:height="0.221cm" svg:x="7.082cm" svg:y="7.985cm" svg:viewBox="0 0 167 222" svg:d="M0 16c1-3 1-6 2-9 0-3 1-5 2-7 1-1 3 0 5 3s3 14 5 33c1 19 0 42-1 68-2 26-3 48-4 67-1 18-1 31-1 38 0 6 0 10 0 11v1 1c0 0 1 0 2 0s7 0 17-1 25-2 45-5c19-3 34-5 45-6 10-1 16-2 18-2s2 0 3 0c0 0 3 0 6-1 3 0 6-1 9-1 4-1 6-1 9-1 2-1 4-1 4-1 1 0 2-1 1-1 0 0-1 0-3 0">
          <text:p/>
        </draw:path>
        <draw:path draw:style-name="gr67" draw:text-style-name="P16" draw:layer="layout" svg:width="0.156cm" svg:height="0.234cm" svg:x="7.329cm" svg:y="7.967cm" svg:viewBox="0 0 157 235" svg:d="M82 39c0-3 1-6 4-11 1-3 1-4 1-2s-3 10-9 24c-5 14-12 34-21 59-10 25-20 48-30 71-11 23-18 38-22 45s-6 10-5 9c0-2 2-8 7-19 4-11 10-28 18-51s17-50 29-82c11-32 22-54 34-66 12-13 20-18 27-16s11 11 14 27c2 15 3 36 3 65-1 27 0 51 2 72s5 36 10 46c4 9 8 14 10 14 2 1 3 1 3-1">
          <text:p/>
        </draw:path>
        <draw:path draw:style-name="gr67" draw:text-style-name="P16" draw:layer="layout" svg:width="0.078cm" svg:height="0.008cm" svg:x="7.386cm" svg:y="8.105cm" svg:viewBox="0 0 79 9" svg:d="M0 9c-1-2 3-3 11-5 12-1 34-3 68-4">
          <text:p/>
        </draw:path>
        <draw:path draw:style-name="gr67" draw:text-style-name="P16" draw:layer="layout" svg:width="0.171cm" svg:height="0.324cm" svg:x="7.581cm" svg:y="7.911cm" svg:viewBox="0 0 172 325" svg:d="M9 108c0-1 0-4-2-8 0-2 0 0 0 8 0 7 1 20 2 38 0 18 0 38-1 59-1 22-3 40-5 56s-3 25-3 27v2c0-2 0-5 0-10 1-5 1-17 2-36s3-44 6-77c3-32 9-64 20-94s24-51 41-63c16-12 32-14 47-4 15 8 24 25 28 51 4 25 2 52-8 79-9 27-20 46-31 57-10 11-17 17-19 18l-2 1 2-1c2 0 8-3 18-6s23-4 39-3c17 2 26 13 29 32 2 19-4 36-19 52s-31 27-49 34c-25 10-43 3-53-16">
          <text:p/>
        </draw:path>
        <draw:polygon draw:style-name="gr67" draw:text-style-name="P16" draw:layer="layout" svg:width="1.256cm" svg:height="0.61cm" svg:x="6.836cm" svg:y="7.813cm" svg:viewBox="0 0 1257 611" draw:points="0,0 1257,0 1257,611 0,611">
          <text:p/>
        </draw:polygon>
        <draw:frame draw:style-name="gr68" draw:text-style-name="P16" draw:layer="layout" svg:width="25.251cm" svg:height="3.001cm" svg:x="1.47cm" svg:y="18.056cm">
          <draw:image xlink:href="Pictures/1000000000000542000000A04D7F7177.png" xlink:type="simple" xlink:show="embed" xlink:actuate="onLoad" draw:mime-type="image/png">
            <text:p/>
          </draw:image>
        </draw:frame>
        <draw:path draw:style-name="gr69" draw:text-style-name="P16" draw:layer="layout" svg:width="1.463cm" svg:height="0.117cm" svg:x="25.322cm" svg:y="18.02cm" svg:viewBox="0 0 1464 118" svg:d="M144 87c-3-1-4-2-3-2 2-1 4-1 9-2 4-1 34-3 89-5 57-3 132-5 228-8 96-2 177 0 243 6s106 12 118 19c12 6-6 11-54 15-49 3-119 6-211 6-92 1-185 2-279 2-94 1-151 1-169 0-18 0-4-3 43-8s122-10 225-15c102-4 191-6 267-6s103 2 80 4c-22 3-79 2-172-1-92-4-184-11-275-22-93-10-138-19-136-27 2-7 47-13 137-18 89-7 190-8 303-4 114 4 181 12 202 27 22 14-11 26-98 35-86 8-195 13-325 15-132 3-227 2-287 0s-86-4-78-5c8-2 27-5 59-10 32-4 103-12 216-22 111-10 211-16 301-20l112-2-5 1c-18 2-75 3-169 4-94 0-177-3-250-10-74-7-100-14-80-21 20-6 76-10 170-12 93-2 179 2 258 11 78 9 112 19 99 30-12 11-58 18-138 21-81 3-147 4-199 2-52-1-76-2-70-3 5-1 18-3 38-7 21-4 78-8 172-13 93-6 185-8 274-7s139 5 151 12c11 7-14 11-76 14-62 2-125 3-188 2-64-1-93-4-87-9 5-5 52-11 142-18 89-7 193-12 312-15 118-4 204 0 257 8 54 9 77 14 71 15-7 1-23 5-49 10-26 6-81 11-164 14-84 4-154 6-208 5-55-1-68-2-41-5 27-2 85-5 172-7 88-2 170 1 246 7 76 7 111 14 106 22-5 7-40 11-106 11-66-1-131-5-196-12-64-7-106-14-126-21-19-7-26-10-21-10 5-1 17-1 37-2s55-1 106 0 88 3 113 8c24 4 12 8-36 11-49 3-111 3-187 1-76-3-128-8-156-16s-38-12-29-13c8-1 29-3 63-6 34-4 87-6 159-8 72-1 126 0 162 5s34 9-7 11-96 2-165-1c-70-2-116-7-138-13-23-7-28-10-15-11 12-1 44-3 94-7 51-3 126-4 226-2 100 1 172 9 216 21 44 13 48 21 11 25-36 4-95 6-178 5-82-1-150-5-202-10-53-6-77-9-72-10 4 0 15-2 34-5 18-3 63-5 136-7 73-3 139-2 197 3 59 4 81 9 68 13-13 5-48 7-106 6-57 0-101-2-130-6-30-3-42-5-35-6 7 0 23-1 49-2s67 0 123 3c55 4 88 11 98 20 10 10-12 17-65 20s-105 2-155-3-72-10-66-15c5-6 34-10 85-12 51-3 92-1 125 5 32 6 45 10 40 10-5 1-18 3-39 6-22 4-58 4-110 1s-85-8-98-15c-14-7-3-12 31-16 34-3 67-2 99 3 31 5 43 9 34 12-10 3-22 4-37 4-16 0-22 2-19 6">
          <text:p/>
        </draw:path>
        <draw:path draw:style-name="gr69" draw:text-style-name="P16" draw:layer="layout" svg:width="0.241cm" svg:height="0.322cm" svg:x="1.66cm" svg:y="18.016cm" svg:viewBox="0 0 242 323" svg:d="M48 277c1-8 3-19 8-31s14-22 26-30c12-9 21-14 28-16 6-1 6 4 1 15-6 11-14 24-24 38s-17 22-21 23c-3 1-1-7 6-22 7-16 16-30 27-44 11-13 17-18 18-15 2 3-2 13-11 28-10 16-17 27-22 32-6 6-7 5-5-3s7-17 16-29c9-11 15-16 18-15 4 1 2 10-6 25-7 15-15 28-23 37-8 8-13 11-15 8s1-12 10-26c8-14 17-24 26-31s11-3 7 11c-4 15-13 30-27 45-14 16-28 26-40 30s-21 4-26 1c-6-4-7-11-5-21 3-10 12-23 27-37 16-15 28-20 38-18 11 3 12 14 5 34-8 19-18 34-31 44s-24 14-35 13c-10-1-16-8-18-21-1-13 4-33 18-60 13-27 31-52 53-77 22-23 37-37 45-41 7-4 9 0 5 10-4 11-12 22-25 34-13 14-25 22-35 25-10 4-15 1-13-9s12-25 31-46c20-21 40-37 61-48s35-9 40 8c5 16 2 33-10 50-11 17-28 28-47 33-19 4-31 2-37-8-6-9-2-25 14-47 16-23 37-45 65-67 27-22 46-30 57-22s8 27-10 58-38 53-61 66c-24 13-40 18-47 11-7-6-6-18 2-36 7-19 23-41 46-67 22-26 44-39 64-39 21 0 29 14 25 42s-20 50-47 67c-27 16-54 21-79 15s-40-22-44-48c-5-26 4-50 24-72 21-22 44-30 68-24 24 5 40 21 49 48s2 49-22 66c-24 18-51 24-78 18-28-6-43-21-47-46-3-24 8-46 34-64 25-19 53-25 80-19s43 22 48 50c5 27-7 50-37 69-29 18-60 25-90 21-31-4-48-17-51-40-4-24 6-48 30-73 24-24 49-38 76-40 26-2 40 8 41 29 2 22-13 43-43 63-31 21-60 31-86 29s-39-13-38-34 14-41 38-60c24-20 47-26 69-20 24 6 29 25 18 57-12 33-35 56-70 69-35 14-58 14-70 0s-13-33-3-59 27-44 51-54 38-14 43-12c7 2 11 11 11 27">
          <text:p/>
        </draw:path>
        <draw:path draw:style-name="gr69" draw:text-style-name="P16" draw:layer="layout" svg:width="0.085cm" svg:height="0.066cm" svg:x="1.736cm" svg:y="18.197cm" svg:viewBox="0 0 86 67" svg:d="M81 12c0-2 2-6 4-11l1-1-2 5c-3 5-12 16-28 31-16 17-29 26-41 30-13 3-17 0-14-11s10-22 19-32 14-14 15-13c0 2-3 7-11 16-7 9-12 14-13 17-2 2 0 1 7-3 7-5 12-8 14-8 2-1 0 1-8 5-8 5-14 7-18 5-3-1 4-6 17-15s24-15 34-17c10-3 12-1 7 6-9 9-15 17-19 23">
          <text:p/>
        </draw:path>
        <draw:path draw:style-name="gr69" draw:text-style-name="P16" draw:layer="layout" svg:width="0.094cm" svg:height="0.059cm" svg:x="1.658cm" svg:y="18.176cm" svg:viewBox="0 0 95 60" svg:d="M95 19c1-5-1-10-6-17-4-4-11-1-21 10s-22 21-37 33c-15 11-24 16-29 15-4-1-2-7 7-18 9-10 17-18 24-22 7-5 9-6 8-5s-4 3-9 7-8 7-11 9c-3 3-5 7-4 13">
          <text:p/>
        </draw:path>
        <draw:frame draw:style-name="gr70" draw:text-style-name="P17" draw:layer="layout" svg:width="0.284cm" svg:height="0.302cm" svg:x="1.639cm" svg:y="17.964cm">
          <draw:text-box>
            <text:p text:style-name="P1"><text:span text:style-name="T13">。</text:span></text:p>
          </draw:text-box>
        </draw:frame>
        <draw:frame draw:style-name="gr71" draw:text-style-name="P18" draw:layer="layout" svg:width="1.905cm" svg:height="0.412cm" svg:x="22.672cm" svg:y="17.175cm">
          <draw:text-box>
            <text:p><text:span text:style-name="T14"><text:s/>Bi-Weekly</text:span></text:p>
          </draw:text-box>
        </draw:frame>
        <draw:frame draw:style-name="gr72" draw:text-style-name="P18" draw:layer="layout" svg:width="0.002cm" svg:height="0.937cm" svg:x="30.927cm" svg:y="12.09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.PingFangUITextSC" svg:font-family=".PingFangUITextSC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6T22:54:03.061199000</dc:date>
    <meta:editing-duration>PT10M4S</meta:editing-duration>
    <meta:editing-cycles>3</meta:editing-cycles>
    <meta:generator>LibreOffice/25.8.3.2$Windows_X86_64 LibreOffice_project/8ca8d55c161d602844f5428fa4b58097424e324e</meta:generator>
    <meta:document-statistic meta:object-count="366"/>
  </office:meta>
</office:document-meta>
</file>